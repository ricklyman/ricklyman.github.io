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master-page-name="">
      <style:table-properties style:width="6.925in" style:page-number="auto" fo:break-before="auto" fo:break-after="auto" table:align="margins"/>
    </style:style>
    <style:style style:name="Table2.A" style:family="table-column">
      <style:table-column-properties style:column-width="6.925in" style:rel-column-width="65535*"/>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style:writing-mode="page"/>
    </style:style>
    <style:style style:name="Table4" style:family="table" style:master-page-name="">
      <style:table-properties style:width="6.925in" style:page-number="auto" fo:break-before="auto" fo:break-after="auto" table:align="margins"/>
    </style:style>
    <style:style style:name="Table4.A" style:family="table-column">
      <style:table-column-properties style:column-width="6.925in" style:rel-column-width="65535*"/>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style:writing-mode="page"/>
    </style:style>
    <style:style style:name="Table6" style:family="table" style:master-page-name="">
      <style:table-properties style:width="6.925in" style:page-number="auto" fo:break-before="auto" fo:break-after="auto" table:align="margins"/>
    </style:style>
    <style:style style:name="Table6.A" style:family="table-column">
      <style:table-column-properties style:column-width="6.925in" style:rel-column-width="65535*"/>
    </style:style>
    <style:style style:name="Table6.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style:writing-mode="page"/>
    </style:style>
    <style:style style:name="Table8" style:family="table" style:master-page-name="">
      <style:table-properties style:width="6.925in" style:page-number="auto" fo:break-before="auto" fo:break-after="auto" table:align="margins"/>
    </style:style>
    <style:style style:name="Table8.A" style:family="table-column">
      <style:table-column-properties style:column-width="6.925in" style:rel-column-width="65535*"/>
    </style:style>
    <style:style style:name="Table8.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10" style:family="table" style:master-page-name="">
      <style:table-properties style:width="6.925in" style:page-number="auto" fo:break-before="auto" fo:break-after="auto" table:align="margins"/>
    </style:style>
    <style:style style:name="Table10.A" style:family="table-column">
      <style:table-column-properties style:column-width="6.925in" style:rel-column-width="65535*"/>
    </style:style>
    <style:style style:name="Table10.A1" style:family="table-cell">
      <style:table-cell-properties fo:background-color="transparent" fo:padding="0.0382in" fo:border="0.5pt solid #000000"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0.5pt solid #000000" style:writing-mode="page">
        <style:background-image/>
      </style:table-cell-properties>
    </style:style>
    <style:style style:name="Table12" style:family="table" style:master-page-name="">
      <style:table-properties style:width="6.925in" style:page-number="auto" fo:break-before="auto" fo:break-after="auto" table:align="margins"/>
    </style:style>
    <style:style style:name="Table12.A" style:family="table-column">
      <style:table-column-properties style:column-width="6.925in" style:rel-column-width="65535*"/>
    </style:style>
    <style:style style:name="Table12.A1" style:family="table-cell">
      <style:table-cell-properties fo:background-color="transparent" fo:padding="0.0382in" fo:border="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0.5pt solid #000000" style:writing-mode="page">
        <style:background-image/>
      </style:table-cell-properties>
    </style:style>
    <style:style style:name="Table14" style:family="table" style:master-page-name="">
      <style:table-properties style:width="6.925in" style:page-number="auto" fo:break-before="auto" fo:break-after="auto" table:align="margin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transparent" fo:padding="0.0382in" fo:border="0.5pt solid #000000" style:writing-mode="page">
        <style:background-image/>
      </style:table-cell-properties>
    </style:style>
    <style:style style:name="Table16" style:family="table" style:master-page-name="">
      <style:table-properties style:width="6.925in" style:page-number="auto" fo:break-before="auto" fo:break-after="auto" table:align="margins"/>
    </style:style>
    <style:style style:name="Table16.A" style:family="table-column">
      <style:table-column-properties style:column-width="6.925in" style:rel-column-width="65535*"/>
    </style:style>
    <style:style style:name="Table16.A1" style:family="table-cell">
      <style:table-cell-properties fo:background-color="transparent" fo:padding="0.0382in" fo:border="0.5pt solid #000000" style:writing-mode="page">
        <style:background-image/>
      </style:table-cell-properties>
    </style:style>
    <style:style style:name="Table17" style:family="table" style:master-page-name="">
      <style:table-properties style:width="6.925in" style:page-number="auto" fo:break-before="auto" fo:break-after="auto" table:align="margins"/>
    </style:style>
    <style:style style:name="Table17.A" style:family="table-column">
      <style:table-column-properties style:column-width="6.925in" style:rel-column-width="65535*"/>
    </style:style>
    <style:style style:name="Table17.A1" style:family="table-cell">
      <style:table-cell-properties fo:background-color="transparent" fo:padding="0.0382in" fo:border="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0.5pt solid #000000" style:writing-mode="page">
        <style:background-image/>
      </style:table-cell-properties>
    </style:style>
    <style:style style:name="Table19" style:family="table" style:master-page-name="">
      <style:table-properties style:width="6.925in" style:page-number="auto" fo:break-before="auto" fo:break-after="auto" table:align="margins"/>
    </style:style>
    <style:style style:name="Table19.A" style:family="table-column">
      <style:table-column-properties style:column-width="6.925in" style:rel-column-width="65535*"/>
    </style:style>
    <style:style style:name="Table19.A1" style:family="table-cell">
      <style:table-cell-properties fo:background-color="transparent" fo:padding="0.0382in" fo:border="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transparent" fo:padding="0.0382in" fo:border="0.5pt solid #000000" style:writing-mode="page">
        <style:background-image/>
      </style:table-cell-properties>
    </style:style>
    <style:style style:name="Table21" style:family="table" style:master-page-name="">
      <style:table-properties style:width="6.925in" style:page-number="auto" fo:break-before="auto" fo:break-after="auto" table:align="margin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0.5pt solid #000000" style:writing-mode="page">
        <style:background-image/>
      </style:table-cell-properties>
    </style:style>
    <style:style style:name="P1" style:family="paragraph" style:parent-style-name="Heading_20_3">
      <style:paragraph-properties fo:margin-left="0in" fo:margin-right="0in" fo:margin-top="0in" fo:margin-bottom="0in" style:contextual-spacing="false" fo:line-height="114%" fo:orphans="2" fo:widows="2" fo:text-indent="0in" style:auto-text-indent="false" fo:padding="0in" fo:border="none" fo:keep-with-next="auto"/>
      <style:text-properties fo:color="#1f1f1f" loext:opacity="100%" style:font-name="Google Sans"/>
    </style:style>
    <style:style style:name="P2" style:family="paragraph" style:parent-style-name="Heading_20_3">
      <style:paragraph-properties fo:margin-left="0in" fo:margin-right="0in" fo:margin-top="0in" fo:margin-bottom="0in" style:contextual-spacing="false" fo:line-height="114%" fo:orphans="2" fo:widows="2" fo:text-indent="0in" style:auto-text-indent="false" fo:padding="0in" fo:border="none" fo:keep-with-next="auto"/>
    </style:style>
    <style:style style:name="P3" style:family="paragraph" style:parent-style-name="Preformatted_20_Text">
      <style:paragraph-properties fo:margin-left="0in" fo:margin-right="0in" fo:margin-top="0in" fo:margin-bottom="0in" style:contextual-spacing="false" fo:line-height="114%" fo:orphans="2" fo:widows="2" fo:text-indent="0in" style:auto-text-indent="false" fo:padding="0in" fo:border="none" fo:keep-with-next="auto"/>
    </style:style>
    <style:style style:name="P4" style:family="paragraph" style:parent-style-name="Preformatted_20_Text">
      <style:paragraph-properties fo:margin-left="0in" fo:margin-right="0in" fo:margin-top="0in" fo:margin-bottom="0in" style:contextual-spacing="false" fo:line-height="114%" fo:orphans="2" fo:widows="2" fo:padding="0in" fo:border="none" fo:keep-with-next="auto"/>
    </style:style>
    <style:style style:name="P5" style:family="paragraph" style:parent-style-name="Preformatted_20_Text" style:list-style-name="L5">
      <style:paragraph-properties fo:margin-left="0in" fo:margin-right="0in" fo:margin-top="0in" fo:margin-bottom="0in" style:contextual-spacing="false" fo:line-height="114%" fo:orphans="2" fo:widows="2" fo:text-indent="0in" style:auto-text-indent="false" fo:padding="0in" fo:border="none" fo:keep-with-next="auto"/>
    </style:style>
    <style:style style:name="P6" style:family="paragraph" style:parent-style-name="Preformatted_20_Text" style:list-style-name="L5">
      <style:paragraph-properties fo:margin-left="0in" fo:margin-right="0in" fo:margin-top="0in" fo:margin-bottom="0in" style:contextual-spacing="false" fo:line-height="114%" fo:orphans="2" fo:widows="2" fo:padding="0in" fo:border="none" fo:keep-with-next="auto"/>
    </style:style>
    <style:style style:name="P7" style:family="paragraph" style:parent-style-name="Preformatted_20_Text" style:list-style-name="L6">
      <style:paragraph-properties fo:margin-left="0in" fo:margin-right="0in" fo:margin-top="0in" fo:margin-bottom="0in" style:contextual-spacing="false" fo:line-height="114%" fo:orphans="2" fo:widows="2" fo:text-indent="0in" style:auto-text-indent="false" fo:padding="0in" fo:border="none" fo:keep-with-next="auto"/>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officeooo:rsid="000863c3" officeooo:paragraph-rsid="000863c3"/>
    </style:style>
    <style:style style:name="P10" style:family="paragraph" style:parent-style-name="Table_20_Contents">
      <style:paragraph-properties fo:margin-left="0in" fo:margin-right="0in" fo:orphans="2" fo:widows="2" fo:text-indent="0in" style:auto-text-indent="false"/>
      <style:text-properties fo:font-variant="normal" fo:text-transform="none" fo:color="#e3e3e3" loext:opacity="100%" style:font-name="Google Sans Flex" fo:font-size="12.75pt" fo:letter-spacing="normal" fo:font-style="normal" fo:font-weight="normal"/>
    </style:style>
    <style:style style:name="P11" style:family="paragraph" style:parent-style-name="Text_20_body">
      <style:paragraph-properties fo:margin-left="0in" fo:margin-right="0in" fo:margin-top="0in" fo:margin-bottom="0in" style:contextual-spacing="false" fo:line-height="114%" fo:orphans="2" fo:widows="2" fo:text-indent="0in" style:auto-text-indent="false" fo:padding="0in" fo:border="none" fo:keep-with-next="auto"/>
    </style:style>
    <style:style style:name="P12" style:family="paragraph" style:parent-style-name="Text_20_body" style:list-style-name="L1">
      <style:paragraph-properties fo:margin-left="0in" fo:margin-right="0in" fo:margin-top="0in" fo:margin-bottom="0in" style:contextual-spacing="false" fo:line-height="114%" fo:orphans="2" fo:widows="2" fo:text-indent="0in" style:auto-text-indent="false" fo:padding="0in" fo:border="none" fo:keep-with-next="auto"/>
    </style:style>
    <style:style style:name="P13" style:family="paragraph" style:parent-style-name="Text_20_body" style:list-style-name="L2">
      <style:paragraph-properties fo:margin-left="0in" fo:margin-right="0in" fo:margin-top="0in" fo:margin-bottom="0in" style:contextual-spacing="false" fo:line-height="114%" fo:orphans="2" fo:widows="2" fo:text-indent="0in" style:auto-text-indent="false" fo:padding="0in" fo:border="none" fo:keep-with-next="auto"/>
    </style:style>
    <style:style style:name="P14" style:family="paragraph" style:parent-style-name="Text_20_body" style:list-style-name="L3">
      <style:paragraph-properties fo:margin-left="0in" fo:margin-right="0in" fo:margin-top="0in" fo:margin-bottom="0in" style:contextual-spacing="false" fo:line-height="114%" fo:orphans="2" fo:widows="2" fo:text-indent="0in" style:auto-text-indent="false" fo:padding="0in" fo:border="none" fo:keep-with-next="auto"/>
    </style:style>
    <style:style style:name="P15" style:family="paragraph" style:parent-style-name="Text_20_body" style:list-style-name="L4">
      <style:paragraph-properties fo:margin-left="0in" fo:margin-right="0in" fo:margin-top="0in" fo:margin-bottom="0in" style:contextual-spacing="false" fo:line-height="114%" fo:orphans="2" fo:widows="2" fo:text-indent="0in" style:auto-text-indent="false" fo:padding="0in" fo:border="none" fo:keep-with-next="auto"/>
    </style:style>
    <style:style style:name="P16" style:family="paragraph" style:parent-style-name="Text_20_body" style:list-style-name="L5">
      <style:paragraph-properties fo:margin-left="0in" fo:margin-right="0in" fo:margin-top="0in" fo:margin-bottom="0in" style:contextual-spacing="false" fo:line-height="114%" fo:orphans="2" fo:widows="2" fo:text-indent="0in" style:auto-text-indent="false" fo:padding="0in" fo:border="none" fo:keep-with-next="auto"/>
    </style:style>
    <style:style style:name="P17" style:family="paragraph" style:parent-style-name="Text_20_body" style:list-style-name="L6">
      <style:paragraph-properties fo:margin-left="0in" fo:margin-right="0in" fo:margin-top="0in" fo:margin-bottom="0in" style:contextual-spacing="false" fo:line-height="114%" fo:orphans="2" fo:widows="2" fo:text-indent="0in" style:auto-text-indent="false" fo:padding="0in" fo:border="none" fo:keep-with-next="auto"/>
    </style:style>
    <style:style style:name="P18" style:family="paragraph" style:parent-style-name="Text_20_body" style:list-style-name="L7">
      <style:paragraph-properties fo:margin-left="0in" fo:margin-right="0in" fo:margin-top="0in" fo:margin-bottom="0in" style:contextual-spacing="false" fo:line-height="114%" fo:orphans="2" fo:widows="2" fo:text-indent="0in" style:auto-text-indent="false" fo:padding="0in" fo:border="none" fo:keep-with-next="auto"/>
    </style:style>
    <style:style style:name="P19" style:family="paragraph" style:parent-style-name="Text_20_body" style:list-style-name="L8">
      <style:paragraph-properties fo:margin-left="0in" fo:margin-right="0in" fo:margin-top="0in" fo:margin-bottom="0in" style:contextual-spacing="false" fo:line-height="114%" fo:orphans="2" fo:widows="2" fo:text-indent="0in" style:auto-text-indent="false" fo:padding="0in" fo:border="none" fo:keep-with-next="auto"/>
    </style:style>
    <style:style style:name="P20" style:family="paragraph" style:parent-style-name="Text_20_body" style:list-style-name="L9">
      <style:paragraph-properties fo:margin-left="0in" fo:margin-right="0in" fo:margin-top="0in" fo:margin-bottom="0in" style:contextual-spacing="false" fo:line-height="114%" fo:orphans="2" fo:widows="2" fo:text-indent="0in" style:auto-text-indent="false" fo:padding="0in" fo:border="none" fo:keep-with-next="auto"/>
    </style:style>
    <style:style style:name="P21" style:family="paragraph" style:parent-style-name="Text_20_body" style:list-style-name="L10">
      <style:paragraph-properties fo:margin-left="0in" fo:margin-right="0in" fo:margin-top="0in" fo:margin-bottom="0in" style:contextual-spacing="false" fo:line-height="114%" fo:orphans="2" fo:widows="2" fo:text-indent="0in" style:auto-text-indent="false" fo:padding="0in" fo:border="none" fo:keep-with-next="auto"/>
    </style:style>
    <style:style style:name="P22" style:family="paragraph" style:parent-style-name="Text_20_body" style:list-style-name="L11">
      <style:paragraph-properties fo:margin-left="0in" fo:margin-right="0in" fo:margin-top="0in" fo:margin-bottom="0in" style:contextual-spacing="false" fo:line-height="114%" fo:orphans="2" fo:widows="2" fo:text-indent="0in" style:auto-text-indent="false" fo:padding="0in" fo:border="none" fo:keep-with-next="auto"/>
    </style:style>
    <style:style style:name="P23" style:family="paragraph" style:parent-style-name="Text_20_body" style:list-style-name="L12">
      <style:paragraph-properties fo:margin-left="0in" fo:margin-right="0in" fo:margin-top="0in" fo:margin-bottom="0in" style:contextual-spacing="false" fo:line-height="114%" fo:orphans="2" fo:widows="2" fo:text-indent="0in" style:auto-text-indent="false" fo:padding="0in" fo:border="none" fo:keep-with-next="auto"/>
    </style:style>
    <style:style style:name="P24" style:family="paragraph" style:parent-style-name="Text_20_body" style:list-style-name="L13">
      <style:paragraph-properties fo:margin-left="0in" fo:margin-right="0in" fo:margin-top="0in" fo:margin-bottom="0in" style:contextual-spacing="false" fo:line-height="114%" fo:orphans="2" fo:widows="2" fo:text-indent="0in" style:auto-text-indent="false" fo:padding="0in" fo:border="none" fo:keep-with-next="auto"/>
    </style:style>
    <style:style style:name="P25" style:family="paragraph" style:parent-style-name="Text_20_body" style:list-style-name="L14">
      <style:paragraph-properties fo:margin-left="0in" fo:margin-right="0in" fo:margin-top="0in" fo:margin-bottom="0in" style:contextual-spacing="false" fo:line-height="114%" fo:orphans="2" fo:widows="2" fo:text-indent="0in" style:auto-text-indent="false" fo:padding="0in" fo:border="none" fo:keep-with-next="auto"/>
    </style:style>
    <style:style style:name="P26" style:family="paragraph" style:parent-style-name="Text_20_body">
      <style:paragraph-properties fo:margin-left="0in" fo:margin-right="0in" fo:margin-top="0in" fo:margin-bottom="0in" style:contextual-spacing="false" fo:line-height="114%" fo:orphans="2" fo:widows="2" fo:text-indent="0in" style:auto-text-indent="false"/>
      <style:text-properties fo:color="#ffffff" loext:opacity="100%" style:font-name="Google Sans Text" loext:padding="0in" loext:border="none"/>
    </style:style>
    <style:style style:name="P27" style:family="paragraph" style:parent-style-name="Text_20_body" style:list-style-name="L5">
      <style:paragraph-properties fo:margin-left="0in" fo:margin-right="0in" fo:margin-top="0in" fo:margin-bottom="0in" style:contextual-spacing="false" fo:line-height="114%" fo:orphans="2" fo:widows="2" fo:text-indent="0in" style:auto-text-indent="false" fo:padding="0in" fo:border="none" fo:keep-with-next="auto"/>
      <style:text-properties fo:color="#ffffff" loext:opacity="100%" style:font-name="Google Sans Text" loext:padding="0in" loext:border="none"/>
    </style:style>
    <style:style style:name="P28" style:family="paragraph" style:parent-style-name="Text_20_body" style:list-style-name="L6">
      <style:paragraph-properties fo:margin-left="0in" fo:margin-right="0in" fo:margin-top="0in" fo:margin-bottom="0in" style:contextual-spacing="false" fo:line-height="114%" fo:orphans="2" fo:widows="2" fo:text-indent="0in" style:auto-text-indent="false" fo:padding="0in" fo:border="none" fo:keep-with-next="auto"/>
      <style:text-properties fo:color="#ffffff" loext:opacity="100%" style:font-name="Google Sans Text" loext:padding="0in" loext:border="none"/>
    </style:style>
    <style:style style:name="P29" style:family="paragraph" style:parent-style-name="Text_20_body">
      <style:paragraph-properties fo:margin-left="0in" fo:margin-right="0in" fo:margin-top="0in" fo:margin-bottom="0in" style:contextual-spacing="false" fo:line-height="114%" fo:orphans="2" fo:widows="2" fo:text-indent="0in" style:auto-text-indent="false" fo:padding="0in" fo:border="none" fo:keep-with-next="auto"/>
      <style:text-properties fo:color="#1f1f1f" loext:opacity="100%" style:font-name="Google Sans Text"/>
    </style:style>
    <style:style style:name="P30" style:family="paragraph" style:parent-style-name="Text_20_body" style:list-style-name="L3">
      <style:paragraph-properties fo:margin-left="0in" fo:margin-right="0in" fo:margin-top="0in" fo:margin-bottom="0in" style:contextual-spacing="false" fo:line-height="114%" fo:orphans="2" fo:widows="2" fo:text-indent="0in" style:auto-text-indent="false" fo:padding="0in" fo:border="none" fo:keep-with-next="auto"/>
      <style:text-properties fo:color="#1f1f1f" loext:opacity="100%" style:font-name="Google Sans Text"/>
    </style:style>
    <style:style style:name="P31" style:family="paragraph" style:parent-style-name="Text_20_body" style:list-style-name="L5">
      <style:paragraph-properties fo:margin-left="0in" fo:margin-right="0in" fo:margin-top="0in" fo:margin-bottom="0in" style:contextual-spacing="false" fo:line-height="114%" fo:orphans="2" fo:widows="2" fo:text-indent="0in" style:auto-text-indent="false" fo:padding="0in" fo:border="none" fo:keep-with-next="auto"/>
      <style:text-properties fo:color="#1f1f1f" loext:opacity="100%" style:font-name="Google Sans Text"/>
    </style:style>
    <style:style style:name="P32" style:family="paragraph" style:parent-style-name="Text_20_body" style:list-style-name="L6">
      <style:paragraph-properties fo:margin-left="0in" fo:margin-right="0in" fo:margin-top="0in" fo:margin-bottom="0in" style:contextual-spacing="false" fo:line-height="114%" fo:orphans="2" fo:widows="2" fo:text-indent="0in" style:auto-text-indent="false" fo:padding="0in" fo:border="none" fo:keep-with-next="auto"/>
      <style:text-properties fo:color="#1f1f1f" loext:opacity="100%" style:font-name="Google Sans Text"/>
    </style:style>
    <style:style style:name="P33" style:family="paragraph" style:parent-style-name="Text_20_body" style:list-style-name="L8">
      <style:paragraph-properties fo:margin-left="0in" fo:margin-right="0in" fo:margin-top="0in" fo:margin-bottom="0in" style:contextual-spacing="false" fo:line-height="114%" fo:orphans="2" fo:widows="2" fo:text-indent="0in" style:auto-text-indent="false" fo:padding="0in" fo:border="none" fo:keep-with-next="auto"/>
      <style:text-properties fo:color="#1f1f1f" loext:opacity="100%" style:font-name="Google Sans Text"/>
    </style:style>
    <style:style style:name="P34" style:family="paragraph" style:parent-style-name="Text_20_body" style:list-style-name="L9">
      <style:paragraph-properties fo:margin-left="0in" fo:margin-right="0in" fo:margin-top="0in" fo:margin-bottom="0in" style:contextual-spacing="false" fo:line-height="114%" fo:orphans="2" fo:widows="2" fo:text-indent="0in" style:auto-text-indent="false" fo:padding="0in" fo:border="none" fo:keep-with-next="auto"/>
      <style:text-properties fo:color="#1f1f1f" loext:opacity="100%" style:font-name="Google Sans Text"/>
    </style:style>
    <style:style style:name="P35" style:family="paragraph" style:parent-style-name="Text_20_body" style:list-style-name="L9">
      <style:paragraph-properties fo:margin-left="0in" fo:margin-right="0in" fo:margin-top="0in" fo:margin-bottom="0in" style:contextual-spacing="false" fo:line-height="114%" fo:orphans="2" fo:widows="2" fo:text-indent="0in" style:auto-text-indent="false" fo:padding="0in" fo:border="none" fo:keep-with-next="auto"/>
      <style:text-properties fo:color="#1f1f1f" loext:opacity="100%" style:font-name="Google Sans Text" fo:font-weight="bold" loext:padding="0in" loext:border="none"/>
    </style:style>
    <style:style style:name="P36" style:family="paragraph" style:parent-style-name="Text_20_body">
      <style:paragraph-properties fo:text-align="start" style:justify-single-word="false"/>
      <style:text-properties fo:color="#1f1f1f" loext:opacity="100%" style:text-outline="false" style:text-line-through-style="none" style:text-line-through-type="none" style:font-name="Google Sans Tex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000000" loext:opacity="55%" style:font-name="Google Sans Text" fo:font-size="11.25pt" fo:font-style="normal" fo:font-weight="normal" loext:padding="0in" loext:border="none"/>
    </style:style>
    <style:style style:name="T2" style:family="text">
      <style:text-properties fo:font-variant="normal" fo:text-transform="none" fo:color="#000000" loext:opacity="55%" style:font-name="Google Sans Text" fo:font-size="11.25pt" loext:padding="0in" loext:border="none"/>
    </style:style>
    <style:style style:name="T3" style:family="text">
      <style:text-properties fo:font-variant="normal" fo:text-transform="none" fo:color="#969dff" loext:opacity="100%" style:font-name="Google Sans Text" fo:font-size="10.5pt" fo:font-style="normal" fo:font-weight="normal" loext:padding="0in" loext:border="none"/>
    </style:style>
    <style:style style:name="T4" style:family="text">
      <style:text-properties fo:font-variant="normal" fo:text-transform="none" fo:color="#ffffff" loext:opacity="100%" style:font-name="Google Sans Text" fo:font-size="10.5pt" fo:font-style="normal" fo:font-weight="normal" loext:padding="0in" loext:border="none"/>
    </style:style>
    <style:style style:name="T5" style:family="text">
      <style:text-properties fo:font-variant="normal" fo:text-transform="none" fo:color="#ffffff" loext:opacity="100%" loext:padding="0in" loext:border="none"/>
    </style:style>
    <style:style style:name="T6" style:family="text">
      <style:text-properties fo:font-variant="normal" fo:text-transform="none" fo:color="#808080" loext:opacity="100%" style:font-name="Google Sans Text" fo:font-size="10.5pt" fo:font-style="normal" fo:font-weight="normal" loext:padding="0in" loext:border="none"/>
    </style:style>
    <style:style style:name="T7" style:family="text">
      <style:text-properties fo:font-variant="normal" fo:text-transform="none" fo:color="#ffdb0f" loext:opacity="100%" style:font-name="Google Sans Text" fo:font-size="10.5pt" fo:font-style="normal" fo:font-weight="normal" loext:padding="0in" loext:border="none"/>
    </style:style>
    <style:style style:name="T8" style:family="text">
      <style:text-properties fo:font-variant="normal" fo:text-transform="none" fo:color="#60d673" loext:opacity="100%" style:font-name="Google Sans Text" fo:font-size="10.5pt" fo:font-style="normal" fo:font-weight="normal" loext:padding="0in" loext:border="none"/>
    </style:style>
    <style:style style:name="T9" style:family="text">
      <style:text-properties fo:font-variant="normal" fo:text-transform="none" fo:color="#ff5a59" loext:opacity="100%" style:font-name="Google Sans Text" fo:font-size="10.5pt" fo:font-style="normal" fo:font-weight="normal" loext:padding="0in" loext:border="none"/>
    </style:style>
    <style:style style:name="T10" style:family="text">
      <style:text-properties fo:font-variant="normal" fo:text-transform="none" fo:color="#ff5a59" loext:opacity="100%" style:font-name="Google Sans Text" fo:font-size="10.5pt" fo:font-style="normal" fo:font-weight="bold" loext:padding="0in" loext:border="none"/>
    </style:style>
    <style:style style:name="T11" style:family="text">
      <style:text-properties fo:font-variant="normal" fo:text-transform="none" fo:color="#ff5a59" loext:opacity="100%" loext:padding="0in" loext:border="none"/>
    </style:style>
    <style:style style:name="T12" style:family="text">
      <style:text-properties fo:font-variant="normal" fo:text-transform="none" fo:color="#ff96da" loext:opacity="100%" style:font-name="Google Sans Text" fo:font-size="10.5pt" fo:font-style="normal" fo:font-weight="normal" loext:padding="0in" loext:border="none"/>
    </style:style>
    <style:style style:name="T13" style:family="text">
      <style:text-properties fo:font-variant="normal" fo:text-transform="none" fo:color="#4fa0ff" loext:opacity="100%" style:font-name="Google Sans Text" fo:font-size="10.5pt" fo:font-style="normal" fo:font-weight="normal" loext:padding="0in" loext:border="none"/>
    </style:style>
    <style:style style:name="T14" style:family="text">
      <style:text-properties style:font-name="Google Sans Text" fo:font-style="italic" loext:padding="0in" loext:border="none"/>
    </style:style>
    <style:style style:name="T15" style:family="text">
      <style:text-properties fo:color="#1f1f1f" loext:opacity="100%"/>
    </style:style>
    <style:style style:name="T16" style:family="text">
      <style:text-properties fo:color="#1f1f1f" loext:opacity="100%" style:font-name="Google Sans Text"/>
    </style:style>
    <style:style style:name="T17" style:family="text">
      <style:text-properties fo:color="#1f1f1f" loext:opacity="100%" style:font-name="Google Sans Text" fo:font-weight="bold" loext:padding="0in" loext:border="none"/>
    </style:style>
    <style:style style:name="T18" style:family="text">
      <style:text-properties fo:color="#1f1f1f" loext:opacity="100%" style:font-name="Google Sans Text" fo:font-style="italic" loext:padding="0in" loext:border="none"/>
    </style:style>
    <style:style style:name="T19" style:family="text">
      <style:text-properties fo:color="#1f1f1f" loext:opacity="100%" style:font-name="Google Sans Text" loext:padding="0in" loext:border="none"/>
    </style:style>
    <style:style style:name="T20" style:family="text">
      <style:text-properties fo:color="#1f1f1f" loext:opacity="100%" style:font-name="Google Sans"/>
    </style:style>
    <style:style style:name="T21" style:family="text">
      <style:text-properties fo:color="#1f1f1f" loext:opacity="100%" loext:padding="0in" loext:border="none"/>
    </style:style>
    <style:style style:name="T22" style:family="text">
      <style:text-properties fo:font-weight="bold" loext:padding="0in" loext:border="non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Default Style">
        <table:table-column table:style-name="Table1.A"/>
        <table:table-row>
          <table:table-cell table:style-name="Table1.A1" office:value-type="string">
            <text:p text:style-name="P8">add websocket support</text:p>
          </table:table-cell>
        </table:table-row>
      </table:table>
      <text:p text:style-name="Standard"/>
      <table:table table:name="Table2" table:style-name="Table2">
        <table:table-column table:style-name="Table2.A"/>
        <table:table-row>
          <table:table-cell table:style-name="Table2.A1" office:value-type="string">
            <text:p text:style-name="P11"><text:span text:style-name="T16">To add WebSocket support to your </text:span><text:span text:style-name="Source_20_Text"><text:span text:style-name="T1">aiohttp</text:span></text:span><text:span text:style-name="T16"> application, you need to use the </text:span><text:span text:style-name="Source_20_Text"><text:span text:style-name="T1">web.WebSocketResponse</text:span></text:span><text:span text:style-name="T16"> class. This allows you to upgrade a standard HTTP request into a persistent WebSocket connection.</text:span></text:p>
            <text:section text:style-name="Sect1" text:name="model-response-message-contentr_ebd173ad504d6d5d">
              <text:p text:style-name="P11"><text:soft-page-break/><text:span text:style-name="T16">Here is the updated version of your code, adding a </text:span><text:span text:style-name="Source_20_Text"><text:span text:style-name="T1">/ws</text:span></text:span><text:span text:style-name="T16"> endpoint that handles WebSocket connections, receives messages from a client, and echoes them back.</text:span></text:p>
              <text:p text:style-name="P26">Python</text:p>
              <text:p text:style-name="P3"><text:span text:style-name="Source_20_Text"><text:span text:style-name="T3">from</text:span></text:span><text:span text:style-name="Source_20_Text"><text:span text:style-name="T4"> aiohttp </text:span></text:span><text:span text:style-name="Source_20_Text"><text:span text:style-name="T3">import</text:span></text:span><text:span text:style-name="Source_20_Text"><text:span text:style-name="T4"> web</text:span></text:span></text:p>
              <text:p text:style-name="P4"/>
              <text:p text:style-name="P3"><text:span text:style-name="Source_20_Text"><text:span text:style-name="T6"># Standard async request handler for HTTP</text:span></text:span></text:p>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handle</text:span></text:span><text:span text:style-name="Source_20_Text"><text:span text:style-name="T4">(request):</text:span></text:span></text:p>
              <text:p text:style-name="P3"><text:span text:style-name="Source_20_Text"><text:span text:style-name="T5"><text:s text:c="4"/></text:span></text:span><text:span text:style-name="Source_20_Text"><text:span text:style-name="T4">name = request.match_info.get(</text:span></text:span><text:span text:style-name="Source_20_Text"><text:span text:style-name="T8">'name'</text:span></text:span><text:span text:style-name="Source_20_Text"><text:span text:style-name="T4">, </text:span></text:span><text:span text:style-name="Source_20_Text"><text:span text:style-name="T8">"Anonymous"</text:span></text:span><text:span text:style-name="Source_20_Text"><text:span text:style-name="T4">)</text:span></text:span></text:p>
              <text:p text:style-name="P3"><text:span text:style-name="Source_20_Text"><text:span text:style-name="T5"><text:s text:c="4"/></text:span></text:span><text:span text:style-name="Source_20_Text"><text:span text:style-name="T4">text = </text:span></text:span><text:span text:style-name="Source_20_Text"><text:span text:style-name="T8">f"Hello, {name}"</text:span></text:span></text:p>
              <text:p text:style-name="P3"><text:span text:style-name="Source_20_Text"><text:span text:style-name="T5"><text:s text:c="4"/></text:span></text:span><text:span text:style-name="Source_20_Text"><text:span text:style-name="T3">return</text:span></text:span><text:span text:style-name="Source_20_Text"><text:span text:style-name="T4"> web.Response(text=text)</text:span></text:span></text:p>
              <text:p text:style-name="P4"/>
              <text:p text:style-name="P3"><text:span text:style-name="Source_20_Text"><text:span text:style-name="T6"># WebSocket handler</text:span></text:span></text:p>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websocket_handler</text:span></text:span><text:span text:style-name="Source_20_Text"><text:span text:style-name="T4">(request):</text:span></text:span></text:p>
              <text:p text:style-name="P3"><text:span text:style-name="Source_20_Text"><text:span text:style-name="T5"><text:s text:c="4"/></text:span></text:span><text:span text:style-name="Source_20_Text"><text:span text:style-name="T6"># Upgrade the HTTP request to a WebSocket connection</text:span></text:span></text:p>
              <text:p text:style-name="P4"><text:span text:style-name="Source_20_Text"><text:span text:style-name="T5"><text:s text:c="4"/></text:span></text:span><text:span text:style-name="Source_20_Text"><text:span text:style-name="T4">ws = web.WebSocketResponse()</text:span></text:span></text:p>
              <text:p text:style-name="P3"><text:span text:style-name="Source_20_Text"><text:span text:style-name="T5"><text:s text:c="4"/></text:span></text:span><text:span text:style-name="Source_20_Text"><text:span text:style-name="T3">await</text:span></text:span><text:span text:style-name="Source_20_Text"><text:span text:style-name="T4"> ws.prepare(request)</text:span></text:span></text:p>
              <text:p text:style-name="P4"/>
              <text:p text:style-name="P3"><text:span text:style-name="Source_20_Text"><text:span text:style-name="T5"><text:s text:c="4"/></text:span></text:span><text:span text:style-name="Source_20_Text"><text:span text:style-name="T4">print(</text:span></text:span><text:span text:style-name="Source_20_Text"><text:span text:style-name="T8">"WebSocket connection established"</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6"># Keep the connection open and listen for messages</text:span></text:span></text:p>
              <text:p text:style-name="P3"><text:span text:style-name="Source_20_Text"><text:span text:style-name="T5"><text:s text:c="4"/></text:span></text:span><text:span text:style-name="Source_20_Text"><text:span text:style-name="T3">async</text:span></text:span><text:span text:style-name="Source_20_Text"><text:span text:style-name="T4"> </text:span></text:span><text:span text:style-name="Source_20_Text"><text:span text:style-name="T3">for</text:span></text:span><text:span text:style-name="Source_20_Text"><text:span text:style-name="T4"> msg </text:span></text:span><text:span text:style-name="Source_20_Text"><text:span text:style-name="T3">in</text:span></text:span><text:span text:style-name="Source_20_Text"><text:span text:style-name="T4"> ws:</text:span></text:span></text:p>
              <text:p text:style-name="P3"><text:span text:style-name="Source_20_Text"><text:span text:style-name="T5"><text:s text:c="8"/></text:span></text:span><text:span text:style-name="Source_20_Text"><text:span text:style-name="T3">if</text:span></text:span><text:span text:style-name="Source_20_Text"><text:span text:style-name="T4"> msg.</text:span></text:span><text:span text:style-name="Source_20_Text"><text:span text:style-name="T9">type</text:span></text:span><text:span text:style-name="Source_20_Text"><text:span text:style-name="T4"> == web.WSMsgType.TEXT:</text:span></text:span></text:p>
              <text:p text:style-name="P3"><text:span text:style-name="Source_20_Text"><text:span text:style-name="T5"><text:s text:c="12"/></text:span></text:span><text:span text:style-name="Source_20_Text"><text:span text:style-name="T4">print(</text:span></text:span><text:span text:style-name="Source_20_Text"><text:span text:style-name="T8">f"Received message: {msg.data}"</text:span></text:span><text:span text:style-name="Source_20_Text"><text:span text:style-name="T4">)</text:span></text:span></text:p>
              <text:p text:style-name="P3"><text:span text:style-name="Source_20_Text"><text:span text:style-name="T5"><text:s text:c="12"/></text:span></text:span><text:span text:style-name="Source_20_Text"><text:span text:style-name="T6"># Echo the text back to the client</text:span></text:span></text:p>
              <text:p text:style-name="P3"><text:span text:style-name="Source_20_Text"><text:span text:style-name="T5"><text:s text:c="12"/></text:span></text:span><text:span text:style-name="Source_20_Text"><text:span text:style-name="T3">await</text:span></text:span><text:span text:style-name="Source_20_Text"><text:span text:style-name="T4"> ws.send_str(</text:span></text:span><text:span text:style-name="Source_20_Text"><text:span text:style-name="T8">f"Server echoed: {msg.data}"</text:span></text:span><text:span text:style-name="Source_20_Text"><text:span text:style-name="T4">)</text:span></text:span></text:p>
              <text:p text:style-name="P3"><text:span text:style-name="Source_20_Text"><text:span text:style-name="T5"><text:s text:c="8"/></text:span></text:span><text:span text:style-name="Source_20_Text"><text:span text:style-name="T3">elif</text:span></text:span><text:span text:style-name="Source_20_Text"><text:span text:style-name="T4"> msg.</text:span></text:span><text:span text:style-name="Source_20_Text"><text:span text:style-name="T9">type</text:span></text:span><text:span text:style-name="Source_20_Text"><text:span text:style-name="T4"> == web.WSMsgType.ERROR:</text:span></text:span></text:p>
              <text:p text:style-name="P3"><text:span text:style-name="Source_20_Text"><text:span text:style-name="T5"><text:s text:c="12"/></text:span></text:span><text:span text:style-name="Source_20_Text"><text:span text:style-name="T4">print(</text:span></text:span><text:span text:style-name="Source_20_Text"><text:span text:style-name="T8">f"WebSocket connection closed with exception {ws.exception()}"</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4">print(</text:span></text:span><text:span text:style-name="Source_20_Text"><text:span text:style-name="T8">"WebSocket connection closed"</text:span></text:span><text:span text:style-name="Source_20_Text"><text:span text:style-name="T4">)</text:span></text:span></text:p>
              <text:p text:style-name="P3"><text:span text:style-name="Source_20_Text"><text:span text:style-name="T5"><text:s text:c="4"/></text:span></text:span><text:span text:style-name="Source_20_Text"><text:span text:style-name="T3">return</text:span></text:span><text:span text:style-name="Source_20_Text"><text:span text:style-name="T4"> ws</text:span></text:span></text:p>
              <text:p text:style-name="P4"/>
              <text:p text:style-name="P3"><text:span text:style-name="Source_20_Text"><text:span text:style-name="T6"># Create the application and add routes</text:span></text:span></text:p>
              <text:p text:style-name="P4"><text:span text:style-name="Source_20_Text"><text:span text:style-name="T4">app = web.Application()</text:span></text:span></text:p>
              <text:p text:style-name="P4"><text:span text:style-name="Source_20_Text"><text:span text:style-name="T4">app.add_routes([</text:span></text:span></text:p>
              <text:p text:style-name="P3"><text:span text:style-name="Source_20_Text"><text:span text:style-name="T5"><text:s text:c="4"/></text:span></text:span><text:span text:style-name="Source_20_Text"><text:span text:style-name="T4">web.get(</text:span></text:span><text:span text:style-name="Source_20_Text"><text:span text:style-name="T8">'/'</text:span></text:span><text:span text:style-name="Source_20_Text"><text:span text:style-name="T4">, handle),</text:span></text:span></text:p>
              <text:p text:style-name="P3"><text:span text:style-name="Source_20_Text"><text:span text:style-name="T5"><text:s text:c="4"/></text:span></text:span><text:span text:style-name="Source_20_Text"><text:span text:style-name="T4">web.get(</text:span></text:span><text:span text:style-name="Source_20_Text"><text:span text:style-name="T8">'/ws'</text:span></text:span><text:span text:style-name="Source_20_Text"><text:span text:style-name="T4">, websocket_handler), <text:s/></text:span></text:span><text:span text:style-name="Source_20_Text"><text:span text:style-name="T6"># WebSocket endpoint</text:span></text:span></text:p>
              <text:p text:style-name="P3"><text:span text:style-name="Source_20_Text"><text:span text:style-name="T5"><text:s text:c="4"/></text:span></text:span><text:span text:style-name="Source_20_Text"><text:span text:style-name="T4">web.get(</text:span></text:span><text:span text:style-name="Source_20_Text"><text:span text:style-name="T8">'/{name}'</text:span></text:span><text:span text:style-name="Source_20_Text"><text:span text:style-name="T4">, handle),</text:span></text:span></text:p>
              <text:p text:style-name="P4"><text:span text:style-name="Source_20_Text"><text:span text:style-name="T4">])</text:span></text:span></text:p>
              <text:p text:style-name="P4"/>
              <text:p text:style-name="P3"><text:span text:style-name="Source_20_Text"><text:span text:style-name="T6"># Run the server</text:span></text:span></text:p>
              <text:p text:style-name="P3"><text:span text:style-name="Source_20_Text"><text:span text:style-name="T3">if</text:span></text:span><text:span text:style-name="Source_20_Text"><text:span text:style-name="T4"> __name__ == </text:span></text:span><text:span text:style-name="Source_20_Text"><text:span text:style-name="T8">'__main__'</text:span></text:span><text:span text:style-name="Source_20_Text"><text:span text:style-name="T4">:</text:span></text:span></text:p>
              <text:p text:style-name="P3"><text:span text:style-name="Source_20_Text"><text:span text:style-name="T5"><text:s text:c="4"/></text:span></text:span><text:span text:style-name="Source_20_Text"><text:span text:style-name="T4">web.run_app(app, port=</text:span></text:span><text:span text:style-name="Source_20_Text"><text:span text:style-name="T12">8080</text:span></text:span><text:span text:style-name="Source_20_Text"><text:span text:style-name="T4">)</text:span></text:span></text:p>
              <text:h text:style-name="P1" text:outline-level="3"><text:soft-page-break/>What Changed?</text:h>
              <text:list text:style-name="L1">
                <text:list-item>
                  <text:p text:style-name="P12"><text:span text:style-name="Source_20_Text"><text:span text:style-name="T1">web.WebSocketResponse()</text:span></text:span><text:span text:style-name="T16">: This object manages the WebSocket handshake and communication.</text:span></text:p>
                </text:list-item>
                <text:list-item>
                  <text:p text:style-name="P12"><text:span text:style-name="Source_20_Text"><text:span text:style-name="T1">await ws.prepare(request)</text:span></text:span><text:span text:style-name="T16">: This kicks off the handshake protocol to upgrade the connection from HTTP to WS.</text:span></text:p>
                </text:list-item>
                <text:list-item>
                  <text:p text:style-name="P12"><text:span text:style-name="Source_20_Text"><text:span text:style-name="T1">async for msg in ws:</text:span></text:span><text:span text:style-name="T16">: This creates an asynchronous loop that waits for incoming messages from the client. It handles the lifecycle of the connection automatically; if the client disconnects, the loop exits cleanly.</text:span></text:p>
                </text:list-item>
                <text:list-item>
                  <text:p text:style-name="P12"><text:span text:style-name="Source_20_Text"><text:span text:style-name="T1">web.WSMsgType.TEXT</text:span></text:span><text:span text:style-name="T16">: Checks if the incoming data is text (you can also check for </text:span><text:span text:style-name="Source_20_Text"><text:span text:style-name="T1">web.WSMsgType.BINARY</text:span></text:span><text:span text:style-name="T16"> if you are sending raw bytes).</text:span></text:p>
                </text:list-item>
                <text:list-item>
                  <text:p text:style-name="P12"><text:span text:style-name="T17">Routing Order</text:span><text:span text:style-name="T16">: I placed the </text:span><text:span text:style-name="Source_20_Text"><text:span text:style-name="T1">/ws</text:span></text:span><text:span text:style-name="T16"> route </text:span><text:span text:style-name="T18">before</text:span><text:span text:style-name="T16"> the </text:span><text:span text:style-name="Source_20_Text"><text:span text:style-name="T1">/{name}</text:span></text:span><text:span text:style-name="T16"> route. Because </text:span><text:span text:style-name="Source_20_Text"><text:span text:style-name="T1">/{name}</text:span></text:span><text:span text:style-name="T16"> acts as a catch-all dynamic variable, placing </text:span><text:span text:style-name="Source_20_Text"><text:span text:style-name="T1">/ws</text:span></text:span><text:span text:style-name="T16"> below it would cause the server to treat "ws" as a </text:span><text:span text:style-name="Source_20_Text"><text:span text:style-name="T1">name</text:span></text:span><text:span text:style-name="T16"> variable instead of routing to your WebSocket handler.</text:span></text:p>
                </text:list-item>
              </text:list>
            </text:section>
            <text:p text:style-name="Table_20_Contents"/>
          </table:table-cell>
        </table:table-row>
      </table:table>
      <text:p text:style-name="Standard"/>
      <table:table table:name="Table3" table:style-name="Table3">
        <table:table-column table:style-name="Table3.A"/>
        <table:table-row>
          <table:table-cell table:style-name="Table3.A1" office:value-type="string">
            <text:p text:style-name="P9">Would this work as a client?</text:p>
          </table:table-cell>
        </table:table-row>
      </table:table>
      <text:p text:style-name="Standard"/>
      <table:table table:name="Table4" table:style-name="Table4">
        <table:table-column table:style-name="Table4.A"/>
        <table:table-row>
          <table:table-cell table:style-name="Table4.A1" office:value-type="string">
            <text:p text:style-name="P29">Yes, this will work perfectly as a client, but with <text:span text:style-name="T22">one critical tweak</text:span> required to match the backend server code we just created.</text:p>
            <text:section text:style-name="Sect1" text:name="model-response-message-contentr_76346717d89fe7ce">
              <text:p text:style-name="P29"><text:soft-page-break/>Right now, your JavaScript tries to connect here:</text:p>
              <text:p text:style-name="P26">JavaScript</text:p>
              <text:p text:style-name="P3"><text:span text:style-name="Source_20_Text"><text:span text:style-name="T3">const</text:span></text:span><text:span text:style-name="Source_20_Text"><text:span text:style-name="T4"> socket = </text:span></text:span><text:span text:style-name="Source_20_Text"><text:span text:style-name="T3">new</text:span></text:span><text:span text:style-name="Source_20_Text"><text:span text:style-name="T4"> WebSocket(</text:span></text:span><text:span text:style-name="Source_20_Text"><text:span text:style-name="T8">"ws://localhost:8765"</text:span></text:span><text:span text:style-name="Source_20_Text"><text:span text:style-name="T4">);</text:span></text:span></text:p>
              <text:p text:style-name="P11"><text:span text:style-name="T16">However, in our updated </text:span><text:span text:style-name="Source_20_Text"><text:span text:style-name="T1">serverA.py</text:span></text:span><text:span text:style-name="T16"> script:</text:span></text:p>
              <text:list text:style-name="L2">
                <text:list-item>
                  <text:p text:style-name="P13"><text:span text:style-name="T16">The port defaults to </text:span><text:span text:style-name="Source_20_Text"><text:span text:style-name="T1">8080</text:span></text:span><text:span text:style-name="T16"> (which is </text:span><text:span text:style-name="Source_20_Text"><text:span text:style-name="T1">aiohttp</text:span></text:span><text:span text:style-name="T16">'s default port, or what was explicitly set in </text:span><text:span text:style-name="Source_20_Text"><text:span text:style-name="T1">web.run_app(app, port=8080)</text:span></text:span><text:span text:style-name="T16">).</text:span></text:p>
                </text:list-item>
                <text:list-item>
                  <text:p text:style-name="P13"><text:span text:style-name="T16">The WebSocket handler is explicitly bound to the </text:span><text:span text:style-name="Source_20_Text"><text:span text:style-name="T1">/ws</text:span></text:span><text:span text:style-name="T16"> path.</text:span></text:p>
                </text:list-item>
              </text:list>
              <text:p text:style-name="P29">If you try to run it as-is, the client will fail to connect because it's knocking on the wrong door.</text:p>
              <text:h text:style-name="P1" text:outline-level="3">The Fix</text:h>
              <text:p text:style-name="P11"><text:span text:style-name="T16">Change line 23 in your </text:span><text:span text:style-name="Source_20_Text"><text:span text:style-name="T1">client.html</text:span></text:span><text:span text:style-name="T16"> from this:</text:span></text:p>
              <text:p text:style-name="P26">JavaScript</text:p>
              <text:p text:style-name="P3"><text:span text:style-name="Source_20_Text"><text:span text:style-name="T3">const</text:span></text:span><text:span text:style-name="Source_20_Text"><text:span text:style-name="T4"> socket = </text:span></text:span><text:span text:style-name="Source_20_Text"><text:span text:style-name="T3">new</text:span></text:span><text:span text:style-name="Source_20_Text"><text:span text:style-name="T4"> WebSocket(</text:span></text:span><text:span text:style-name="Source_20_Text"><text:span text:style-name="T8">"ws://localhost:8765"</text:span></text:span><text:span text:style-name="Source_20_Text"><text:span text:style-name="T4">);</text:span></text:span></text:p>
              <text:p text:style-name="P29">To this:</text:p>
              <text:p text:style-name="P26">JavaScript</text:p>
              <text:p text:style-name="P3"><text:span text:style-name="Source_20_Text"><text:span text:style-name="T3">const</text:span></text:span><text:span text:style-name="Source_20_Text"><text:span text:style-name="T4"> socket = </text:span></text:span><text:span text:style-name="Source_20_Text"><text:span text:style-name="T3">new</text:span></text:span><text:span text:style-name="Source_20_Text"><text:span text:style-name="T4"> WebSocket(</text:span></text:span><text:span text:style-name="Source_20_Text"><text:span text:style-name="T8">"ws://localhost:8080/ws"</text:span></text:span><text:span text:style-name="Source_20_Text"><text:span text:style-name="T4">);</text:span></text:span></text:p>
              <text:h text:style-name="P1" text:outline-level="3">Why the rest of your HTML/JS is great:</text:h>
              <text:list text:style-name="L3">
                <text:list-item>
                  <text:p text:style-name="P14"><text:span text:style-name="T17">UI State Management:</text:span><text:span text:style-name="T16"> Disabling the input and button (</text:span><text:span text:style-name="Source_20_Text"><text:span text:style-name="T1">disabled = true</text:span></text:span><text:span text:style-name="T16">) initially and on </text:span><text:span text:style-name="Source_20_Text"><text:span text:style-name="T1">onclose</text:span></text:span><text:span text:style-name="T16">, then enabling them on </text:span><text:span text:style-name="Source_20_Text"><text:span text:style-name="T1">onopen</text:span></text:span><text:span text:style-name="T16">, is excellent practice. It prevents users from trying to send messages when the connection isn't ready.</text:span></text:p>
                </text:list-item>
                <text:list-item>
                  <text:p text:style-name="P14"><text:span text:style-name="T17">Event Handling:</text:span><text:span text:style-name="T16"> You properly covered both the </text:span><text:span text:style-name="Source_20_Text"><text:span text:style-name="T1">click</text:span></text:span><text:span text:style-name="T16"> event and the </text:span><text:span text:style-name="Source_20_Text"><text:span text:style-name="T1">Enter</text:span></text:span><text:span text:style-name="T16"> keypress for an intuitive user experience.</text:span></text:p>
                </text:list-item>
                <text:list-item>
                  <text:p text:style-name="P30"><text:span text:style-name="T22">Clean Logging:</text:span> The color-coded tracking (green for sent, blue for received) perfectly matches the echo behavior of the backend.</text:p>
                </text:list-item>
              </text:list>
            </text:section>
            <text:p text:style-name="Table_20_Contents"/>
          </table:table-cell>
        </table:table-row>
      </table:table>
      <text:p text:style-name="Standard"/>
      <table:table table:name="Table5" table:style-name="Table5">
        <table:table-column table:style-name="Table5.A"/>
        <table:table-row>
          <table:table-cell table:style-name="Table5.A1" office:value-type="string">
            <text:p text:style-name="P10">I would like to add this to client.html</text:p>
          </table:table-cell>
        </table:table-row>
      </table:table>
      <text:p text:style-name="Standard"/>
      <table:table table:name="Table6" table:style-name="Table6">
        <table:table-column table:style-name="Table6.A"/>
        <table:table-row>
          <table:table-cell table:style-name="Table6.A1" office:value-type="string">
            <text:p text:style-name="P11"><text:span text:style-name="T16">To integrate your </text:span><text:span text:style-name="Source_20_Text"><text:span text:style-name="T1">touch.html</text:span></text:span><text:span text:style-name="T16"> touch/mouse tracker with the WebSocket </text:span><text:span text:style-name="Source_20_Text"><text:span text:style-name="T1">client.html</text:span></text:span><text:span text:style-name="T16">, you need to stream the tracked pointer and touch coordinates back to the python server in real-time, while still drawing the local UI.</text:span></text:p>
            <text:section text:style-name="Sect1" text:name="model-response-message-contentr_892a55ae60e4012b">
              <text:p text:style-name="P11"><text:soft-page-break/><text:span text:style-name="T16">Here is the fully merged </text:span><text:span text:style-name="Source_20_Text"><text:span text:style-name="T1">client.html</text:span></text:span><text:span text:style-name="T16">. It establishes the WebSocket connection and automatically triggers </text:span><text:span text:style-name="Source_20_Text"><text:span text:style-name="T1">socket.send()</text:span></text:span><text:span text:style-name="T16"> inside the existing </text:span><text:span text:style-name="Source_20_Text"><text:span text:style-name="T1">display()</text:span></text:span><text:span text:style-name="T16"> function whenever a mouse, pointer, or touch event occurs.</text:span></text:p>
              <text:h text:style-name="P2" text:outline-level="3"><text:span text:style-name="T20">Updated </text:span><text:span text:style-name="Source_20_Text"><text:span text:style-name="T1">client.html</text:span></text:span></text:h>
              <text:p text:style-name="P26">HTML</text:p>
              <text:p text:style-name="P3"><text:span text:style-name="Source_20_Text"><text:span text:style-name="T9">&lt;!DOCTYPE </text:span></text:span><text:span text:style-name="Source_20_Text"><text:span text:style-name="T10">html</text:span></text:span><text:span text:style-name="Source_20_Text"><text:span text:style-name="T9">&gt;</text:span></text:span></text:p>
              <text:p text:style-name="P3"><text:span text:style-name="Source_20_Text"><text:span text:style-name="T4">&lt;</text:span></text:span><text:span text:style-name="Source_20_Text"><text:span text:style-name="T13">html</text:span></text:span><text:span text:style-name="Source_20_Text"><text:span text:style-name="T4"> </text:span></text:span><text:span text:style-name="Source_20_Text"><text:span text:style-name="T12">lang</text:span></text:span><text:span text:style-name="Source_20_Text"><text:span text:style-name="T4">=</text:span></text:span><text:span text:style-name="Source_20_Text"><text:span text:style-name="T8">"en"</text:span></text:span><text:span text:style-name="Source_20_Text"><text:span text:style-name="T4">&gt;</text:span></text:span></text:p>
              <text:p text:style-name="P3"><text:span text:style-name="Source_20_Text"><text:span text:style-name="T4">&lt;</text:span></text:span><text:span text:style-name="Source_20_Text"><text:span text:style-name="T13">head</text:span></text:span><text:span text:style-name="Source_20_Text"><text:span text:style-name="T4">&gt;</text:span></text:span></text:p>
              <text:p text:style-name="P3"><text:span text:style-name="Source_20_Text"><text:span text:style-name="T5"><text:s text:c="4"/></text:span></text:span><text:span text:style-name="Source_20_Text"><text:span text:style-name="T4">&lt;</text:span></text:span><text:span text:style-name="Source_20_Text"><text:span text:style-name="T13">meta</text:span></text:span><text:span text:style-name="Source_20_Text"><text:span text:style-name="T4"> </text:span></text:span><text:span text:style-name="Source_20_Text"><text:span text:style-name="T12">charset</text:span></text:span><text:span text:style-name="Source_20_Text"><text:span text:style-name="T4">=</text:span></text:span><text:span text:style-name="Source_20_Text"><text:span text:style-name="T8">"UTF-8"</text:span></text:span><text:span text:style-name="Source_20_Text"><text:span text:style-name="T4">&gt;</text:span></text:span></text:p>
              <text:p text:style-name="P3"><text:span text:style-name="Source_20_Text"><text:span text:style-name="T5"><text:s text:c="4"/></text:span></text:span><text:span text:style-name="Source_20_Text"><text:span text:style-name="T4">&lt;</text:span></text:span><text:span text:style-name="Source_20_Text"><text:span text:style-name="T13">title</text:span></text:span><text:span text:style-name="Source_20_Text"><text:span text:style-name="T4">&gt;WebSocket Touch &amp; Mouse Demo&lt;/</text:span></text:span><text:span text:style-name="Source_20_Text"><text:span text:style-name="T13">title</text:span></text:span><text:span text:style-name="Source_20_Text"><text:span text:style-name="T4">&gt;</text:span></text:span></text:p>
              <text:p text:style-name="P3"><text:span text:style-name="Source_20_Text"><text:span text:style-name="T5"><text:s text:c="4"/></text:span></text:span><text:span text:style-name="Source_20_Text"><text:span text:style-name="T4">&lt;</text:span></text:span><text:span text:style-name="Source_20_Text"><text:span text:style-name="T13">style</text:span></text:span><text:span text:style-name="Source_20_Text"><text:span text:style-name="T4">&gt;</text:span></text:span></text:p>
              <text:p text:style-name="P3"><text:span text:style-name="Source_20_Text"><text:span text:style-name="T5"><text:s text:c="8"/></text:span></text:span><text:span text:style-name="Source_20_Text"><text:span text:style-name="T13">body</text:span></text:span><text:span text:style-name="Source_20_Text"><text:span text:style-name="T4"> { font-family: sans-serif; margin: </text:span></text:span><text:span text:style-name="Source_20_Text"><text:span text:style-name="T12">40px</text:span></text:span><text:span text:style-name="Source_20_Text"><text:span text:style-name="T4">; }</text:span></text:span></text:p>
              <text:p text:style-name="P3"><text:span text:style-name="Source_20_Text"><text:span text:style-name="T5"><text:s text:c="8"/></text:span></text:span><text:span text:style-name="Source_20_Text"><text:span text:style-name="T3">#log</text:span></text:span><text:span text:style-name="Source_20_Text"><text:span text:style-name="T4"> { </text:span></text:span></text:p>
              <text:p text:style-name="P3"><text:span text:style-name="Source_20_Text"><text:span text:style-name="T5"><text:s text:c="12"/></text:span></text:span><text:span text:style-name="Source_20_Text"><text:span text:style-name="T4">font-family: monospace;</text:span></text:span></text:p>
              <text:p text:style-name="P3"><text:span text:style-name="Source_20_Text"><text:span text:style-name="T5"><text:s text:c="12"/></text:span></text:span><text:span text:style-name="Source_20_Text"><text:span text:style-name="T4">white-space: pre;</text:span></text:span></text:p>
              <text:p text:style-name="P3"><text:span text:style-name="Source_20_Text"><text:span text:style-name="T5"><text:s text:c="12"/></text:span></text:span><text:span text:style-name="Source_20_Text"><text:span text:style-name="T4">width: </text:span></text:span><text:span text:style-name="Source_20_Text"><text:span text:style-name="T12">450px</text:span></text:span><text:span text:style-name="Source_20_Text"><text:span text:style-name="T4">; </text:span></text:span></text:p>
              <text:p text:style-name="P3"><text:span text:style-name="Source_20_Text"><text:span text:style-name="T5"><text:s text:c="12"/></text:span></text:span><text:span text:style-name="Source_20_Text"><text:span text:style-name="T4">height: </text:span></text:span><text:span text:style-name="Source_20_Text"><text:span text:style-name="T12">200px</text:span></text:span><text:span text:style-name="Source_20_Text"><text:span text:style-name="T4">; </text:span></text:span></text:p>
              <text:p text:style-name="P3"><text:span text:style-name="Source_20_Text"><text:span text:style-name="T5"><text:s text:c="12"/></text:span></text:span><text:span text:style-name="Source_20_Text"><text:span text:style-name="T4">border: </text:span></text:span><text:span text:style-name="Source_20_Text"><text:span text:style-name="T12">1px</text:span></text:span><text:span text:style-name="Source_20_Text"><text:span text:style-name="T4"> solid </text:span></text:span><text:span text:style-name="Source_20_Text"><text:span text:style-name="T12">#ccc</text:span></text:span><text:span text:style-name="Source_20_Text"><text:span text:style-name="T4">; </text:span></text:span></text:p>
              <text:p text:style-name="P3"><text:span text:style-name="Source_20_Text"><text:span text:style-name="T5"><text:s text:c="12"/></text:span></text:span><text:span text:style-name="Source_20_Text"><text:span text:style-name="T4">overflow-y: scroll; </text:span></text:span></text:p>
              <text:p text:style-name="P3"><text:span text:style-name="Source_20_Text"><text:span text:style-name="T5"><text:s text:c="12"/></text:span></text:span><text:span text:style-name="Source_20_Text"><text:span text:style-name="T4">padding: </text:span></text:span><text:span text:style-name="Source_20_Text"><text:span text:style-name="T12">10px</text:span></text:span><text:span text:style-name="Source_20_Text"><text:span text:style-name="T4">; </text:span></text:span></text:p>
              <text:p text:style-name="P3"><text:span text:style-name="Source_20_Text"><text:span text:style-name="T5"><text:s text:c="12"/></text:span></text:span><text:span text:style-name="Source_20_Text"><text:span text:style-name="T4">margin-top: </text:span></text:span><text:span text:style-name="Source_20_Text"><text:span text:style-name="T12">10px</text:span></text:span><text:span text:style-name="Source_20_Text"><text:span text:style-name="T4">; </text:span></text:span></text:p>
              <text:p text:style-name="P3"><text:span text:style-name="Source_20_Text"><text:span text:style-name="T5"><text:s text:c="12"/></text:span></text:span><text:span text:style-name="Source_20_Text"><text:span text:style-name="T4">background: </text:span></text:span><text:span text:style-name="Source_20_Text"><text:span text:style-name="T12">#f9f9f9</text:span></text:span><text:span text:style-name="Source_20_Text"><text:span text:style-name="T4">; </text:span></text:span></text:p>
              <text:p text:style-name="P3"><text:span text:style-name="Source_20_Text"><text:span text:style-name="T5"><text:s text:c="12"/></text:span></text:span><text:span text:style-name="Source_20_Text"><text:span text:style-name="T4">position: absolute;</text:span></text:span></text:p>
              <text:p text:style-name="P3"><text:span text:style-name="Source_20_Text"><text:span text:style-name="T5"><text:s text:c="12"/></text:span></text:span><text:span text:style-name="Source_20_Text"><text:span text:style-name="T4">bottom: </text:span></text:span><text:span text:style-name="Source_20_Text"><text:span text:style-name="T12">20px</text:span></text:span><text:span text:style-name="Source_20_Text"><text:span text:style-name="T4">;</text:span></text:span></text:p>
              <text:p text:style-name="P3"><text:span text:style-name="Source_20_Text"><text:span text:style-name="T5"><text:s text:c="12"/></text:span></text:span><text:span text:style-name="Source_20_Text"><text:span text:style-name="T4">left: </text:span></text:span><text:span text:style-name="Source_20_Text"><text:span text:style-name="T12">20px</text:span></text:span><text:span text:style-name="Source_20_Text"><text:span text:style-name="T4">;</text:span></text:span></text:p>
              <text:p text:style-name="P3"><text:span text:style-name="Source_20_Text"><text:span text:style-name="T5"><text:s text:c="12"/></text:span></text:span><text:span text:style-name="Source_20_Text"><text:span text:style-name="T4">z-index: </text:span></text:span><text:span text:style-name="Source_20_Text"><text:span text:style-name="T12">10</text:span></text:span><text:span text:style-name="Source_20_Text"><text:span text:style-name="T4">; </text:span></text:span><text:span text:style-name="Source_20_Text"><text:span text:style-name="T6">/* Keep it above the tracking area */</text:span></text:span></text:p>
              <text:p text:style-name="P4"><text:span text:style-name="Source_20_Text"><text:span text:style-name="T5"><text:s text:c="8"/></text:span></text:span><text:span text:style-name="Source_20_Text"><text:span text:style-name="T4">}</text:span></text:span></text:p>
              <text:p text:style-name="P3"><text:span text:style-name="Source_20_Text"><text:span text:style-name="T5"><text:s text:c="8"/></text:span></text:span><text:span text:style-name="Source_20_Text"><text:span text:style-name="T3">#ui</text:span></text:span><text:span text:style-name="Source_20_Text"><text:span text:style-name="T4"> {</text:span></text:span></text:p>
              <text:p text:style-name="P3"><text:span text:style-name="Source_20_Text"><text:span text:style-name="T5"><text:s text:c="12"/></text:span></text:span><text:span text:style-name="Source_20_Text"><text:span text:style-name="T4">position: absolute;</text:span></text:span></text:p>
              <text:p text:style-name="P3"><text:span text:style-name="Source_20_Text"><text:span text:style-name="T5"><text:s text:c="12"/></text:span></text:span><text:span text:style-name="Source_20_Text"><text:span text:style-name="T4">top: </text:span></text:span><text:span text:style-name="Source_20_Text"><text:span text:style-name="T12">20px</text:span></text:span><text:span text:style-name="Source_20_Text"><text:span text:style-name="T4">; bottom: </text:span></text:span><text:span text:style-name="Source_20_Text"><text:span text:style-name="T12">20px</text:span></text:span><text:span text:style-name="Source_20_Text"><text:span text:style-name="T4">;</text:span></text:span></text:p>
              <text:p text:style-name="P3"><text:span text:style-name="Source_20_Text"><text:span text:style-name="T5"><text:s text:c="12"/></text:span></text:span><text:span text:style-name="Source_20_Text"><text:span text:style-name="T4">left: </text:span></text:span><text:span text:style-name="Source_20_Text"><text:span text:style-name="T12">20px</text:span></text:span><text:span text:style-name="Source_20_Text"><text:span text:style-name="T4">; right: </text:span></text:span><text:span text:style-name="Source_20_Text"><text:span text:style-name="T12">20px</text:span></text:span><text:span text:style-name="Source_20_Text"><text:span text:style-name="T4">;</text:span></text:span></text:p>
              <text:p text:style-name="P3"><text:span text:style-name="Source_20_Text"><text:span text:style-name="T5"><text:s text:c="12"/></text:span></text:span><text:span text:style-name="Source_20_Text"><text:span text:style-name="T4">border: </text:span></text:span><text:span text:style-name="Source_20_Text"><text:span text:style-name="T12">2px</text:span></text:span><text:span text:style-name="Source_20_Text"><text:span text:style-name="T4"> dotted grey;</text:span></text:span></text:p>
              <text:p text:style-name="P3"><text:span text:style-name="Source_20_Text"><text:span text:style-name="T5"><text:s text:c="12"/></text:span></text:span><text:span text:style-name="Source_20_Text"><text:span text:style-name="T4">background: </text:span></text:span><text:span text:style-name="Source_20_Text"><text:span text:style-name="T12">#fff</text:span></text:span><text:span text:style-name="Source_20_Text"><text:span text:style-name="T4">;</text:span></text:span></text:p>
              <text:p text:style-name="P4"><text:span text:style-name="Source_20_Text"><text:span text:style-name="T5"><text:s text:c="8"/></text:span></text:span><text:span text:style-name="Source_20_Text"><text:span text:style-name="T4">}</text:span></text:span></text:p>
              <text:p text:style-name="P3"><text:span text:style-name="Source_20_Text"><text:span text:style-name="T5"><text:s text:c="8"/></text:span></text:span><text:span text:style-name="Source_20_Text"><text:span text:style-name="T3">.point</text:span></text:span><text:span text:style-name="Source_20_Text"><text:span text:style-name="T4"> {</text:span></text:span></text:p>
              <text:p text:style-name="P3"><text:span text:style-name="Source_20_Text"><text:span text:style-name="T5"><text:s text:c="12"/></text:span></text:span><text:span text:style-name="Source_20_Text"><text:span text:style-name="T4">position: absolute;</text:span></text:span></text:p>
              <text:p text:style-name="P3"><text:span text:style-name="Source_20_Text"><text:span text:style-name="T5"><text:s text:c="12"/></text:span></text:span><text:span text:style-name="Source_20_Text"><text:span text:style-name="T4">font-size: </text:span></text:span><text:span text:style-name="Source_20_Text"><text:span text:style-name="T12">200%</text:span></text:span><text:span text:style-name="Source_20_Text"><text:span text:style-name="T4">;</text:span></text:span></text:p>
              <text:p text:style-name="P3"><text:span text:style-name="Source_20_Text"><text:span text:style-name="T5"><text:s text:c="12"/></text:span></text:span><text:span text:style-name="Source_20_Text"><text:span text:style-name="T4">pointer-events: none; </text:span></text:span><text:span text:style-name="Source_20_Text"><text:span text:style-name="T6">/* Prevents element from blocking mouse moves */</text:span></text:span></text:p>
              <text:p text:style-name="P4"><text:span text:style-name="Source_20_Text"><text:span text:style-name="T5"><text:s text:c="8"/></text:span></text:span><text:span text:style-name="Source_20_Text"><text:span text:style-name="T4">}</text:span></text:span></text:p>
              <text:p text:style-name="P3"><text:span text:style-name="Source_20_Text"><text:span text:style-name="T5"><text:s text:c="8"/></text:span></text:span><text:span text:style-name="Source_20_Text"><text:span text:style-name="T3">.point.fade</text:span></text:span><text:span text:style-name="Source_20_Text"><text:span text:style-name="T4"> {</text:span></text:span></text:p>
              <text:p text:style-name="P3"><text:soft-page-break/><text:span text:style-name="Source_20_Text"><text:span text:style-name="T5"><text:s text:c="12"/></text:span></text:span><text:span text:style-name="Source_20_Text"><text:span text:style-name="T4">opacity: </text:span></text:span><text:span text:style-name="Source_20_Text"><text:span text:style-name="T12">0.25</text:span></text:span><text:span text:style-name="Source_20_Text"><text:span text:style-name="T4">;</text:span></text:span></text:p>
              <text:p text:style-name="P4"><text:span text:style-name="Source_20_Text"><text:span text:style-name="T5"><text:s text:c="8"/></text:span></text:span><text:span text:style-name="Source_20_Text"><text:span text:style-name="T4">}</text:span></text:span></text:p>
              <text:p text:style-name="P3"><text:span text:style-name="Source_20_Text"><text:span text:style-name="T5"><text:s text:c="8"/></text:span></text:span><text:span text:style-name="Source_20_Text"><text:span text:style-name="T3">#connection-status</text:span></text:span><text:span text:style-name="Source_20_Text"><text:span text:style-name="T4"> {</text:span></text:span></text:p>
              <text:p text:style-name="P3"><text:span text:style-name="Source_20_Text"><text:span text:style-name="T5"><text:s text:c="12"/></text:span></text:span><text:span text:style-name="Source_20_Text"><text:span text:style-name="T4">position: absolute;</text:span></text:span></text:p>
              <text:p text:style-name="P3"><text:span text:style-name="Source_20_Text"><text:span text:style-name="T5"><text:s text:c="12"/></text:span></text:span><text:span text:style-name="Source_20_Text"><text:span text:style-name="T4">top: </text:span></text:span><text:span text:style-name="Source_20_Text"><text:span text:style-name="T12">30px</text:span></text:span><text:span text:style-name="Source_20_Text"><text:span text:style-name="T4">;</text:span></text:span></text:p>
              <text:p text:style-name="P3"><text:span text:style-name="Source_20_Text"><text:span text:style-name="T5"><text:s text:c="12"/></text:span></text:span><text:span text:style-name="Source_20_Text"><text:span text:style-name="T4">left: </text:span></text:span><text:span text:style-name="Source_20_Text"><text:span text:style-name="T12">40px</text:span></text:span><text:span text:style-name="Source_20_Text"><text:span text:style-name="T4">;</text:span></text:span></text:p>
              <text:p text:style-name="P3"><text:span text:style-name="Source_20_Text"><text:span text:style-name="T5"><text:s text:c="12"/></text:span></text:span><text:span text:style-name="Source_20_Text"><text:span text:style-name="T4">z-index: </text:span></text:span><text:span text:style-name="Source_20_Text"><text:span text:style-name="T12">10</text:span></text:span><text:span text:style-name="Source_20_Text"><text:span text:style-name="T4">;</text:span></text:span></text:p>
              <text:p text:style-name="P4"><text:span text:style-name="Source_20_Text"><text:span text:style-name="T5"><text:s text:c="8"/></text:span></text:span><text:span text:style-name="Source_20_Text"><text:span text:style-name="T4">}</text:span></text:span></text:p>
              <text:p text:style-name="P3"><text:span text:style-name="Source_20_Text"><text:span text:style-name="T5"><text:s text:c="4"/></text:span></text:span><text:span text:style-name="Source_20_Text"><text:span text:style-name="T4">&lt;/</text:span></text:span><text:span text:style-name="Source_20_Text"><text:span text:style-name="T13">style</text:span></text:span><text:span text:style-name="Source_20_Text"><text:span text:style-name="T4">&gt;</text:span></text:span></text:p>
              <text:p text:style-name="P3"><text:span text:style-name="Source_20_Text"><text:span text:style-name="T4">&lt;/</text:span></text:span><text:span text:style-name="Source_20_Text"><text:span text:style-name="T13">head</text:span></text:span><text:span text:style-name="Source_20_Text"><text:span text:style-name="T4">&gt;</text:span></text:span></text:p>
              <text:p text:style-name="P3"><text:span text:style-name="Source_20_Text"><text:span text:style-name="T4">&lt;</text:span></text:span><text:span text:style-name="Source_20_Text"><text:span text:style-name="T13">body</text:span></text:span><text:span text:style-name="Source_20_Text"><text:span text:style-name="T4">&gt;</text:span></text:span></text:p>
              <text:p text:style-name="P4"/>
              <text:p text:style-name="P3"><text:span text:style-name="Source_20_Text"><text:span text:style-name="T5"><text:s text:c="4"/></text:span></text:span><text:span text:style-name="Source_20_Text"><text:span text:style-name="T4">&lt;</text:span></text:span><text:span text:style-name="Source_20_Text"><text:span text:style-name="T13">div</text:span></text:span><text:span text:style-name="Source_20_Text"><text:span text:style-name="T4"> </text:span></text:span><text:span text:style-name="Source_20_Text"><text:span text:style-name="T12">id</text:span></text:span><text:span text:style-name="Source_20_Text"><text:span text:style-name="T4">=</text:span></text:span><text:span text:style-name="Source_20_Text"><text:span text:style-name="T8">"connection-status"</text:span></text:span><text:span text:style-name="Source_20_Text"><text:span text:style-name="T4">&gt;</text:span></text:span></text:p>
              <text:p text:style-name="P3"><text:span text:style-name="Source_20_Text"><text:span text:style-name="T5"><text:s text:c="8"/></text:span></text:span><text:span text:style-name="Source_20_Text"><text:span text:style-name="T4">&lt;</text:span></text:span><text:span text:style-name="Source_20_Text"><text:span text:style-name="T13">h2</text:span></text:span><text:span text:style-name="Source_20_Text"><text:span text:style-name="T4">&gt;WebSocket Touch/Mouse Client&lt;/</text:span></text:span><text:span text:style-name="Source_20_Text"><text:span text:style-name="T13">h2</text:span></text:span><text:span text:style-name="Source_20_Text"><text:span text:style-name="T4">&gt;</text:span></text:span></text:p>
              <text:p text:style-name="P3"><text:span text:style-name="Source_20_Text"><text:span text:style-name="T5"><text:s text:c="8"/></text:span></text:span><text:span text:style-name="Source_20_Text"><text:span text:style-name="T4">&lt;</text:span></text:span><text:span text:style-name="Source_20_Text"><text:span text:style-name="T13">div</text:span></text:span><text:span text:style-name="Source_20_Text"><text:span text:style-name="T4"> </text:span></text:span><text:span text:style-name="Source_20_Text"><text:span text:style-name="T12">id</text:span></text:span><text:span text:style-name="Source_20_Text"><text:span text:style-name="T4">=</text:span></text:span><text:span text:style-name="Source_20_Text"><text:span text:style-name="T8">"statusText"</text:span></text:span><text:span text:style-name="Source_20_Text"><text:span text:style-name="T4">&gt;&lt;</text:span></text:span><text:span text:style-name="Source_20_Text"><text:span text:style-name="T13">b</text:span></text:span><text:span text:style-name="Source_20_Text"><text:span text:style-name="T4"> </text:span></text:span><text:span text:style-name="Source_20_Text"><text:span text:style-name="T12">style</text:span></text:span><text:span text:style-name="Source_20_Text"><text:span text:style-name="T4">=</text:span></text:span><text:span text:style-name="Source_20_Text"><text:span text:style-name="T8">'color: orange;'</text:span></text:span><text:span text:style-name="Source_20_Text"><text:span text:style-name="T4">&gt;Connecting...&lt;/</text:span></text:span><text:span text:style-name="Source_20_Text"><text:span text:style-name="T13">b</text:span></text:span><text:span text:style-name="Source_20_Text"><text:span text:style-name="T4">&gt;&lt;/</text:span></text:span><text:span text:style-name="Source_20_Text"><text:span text:style-name="T13">div</text:span></text:span><text:span text:style-name="Source_20_Text"><text:span text:style-name="T4">&gt;</text:span></text:span></text:p>
              <text:p text:style-name="P3"><text:span text:style-name="Source_20_Text"><text:span text:style-name="T5"><text:s text:c="4"/></text:span></text:span><text:span text:style-name="Source_20_Text"><text:span text:style-name="T4">&lt;/</text:span></text:span><text:span text:style-name="Source_20_Text"><text:span text:style-name="T13">div</text:span></text:span><text:span text:style-name="Source_20_Text"><text:span text:style-name="T4">&gt;</text:span></text:span></text:p>
              <text:p text:style-name="P4"><text:span text:style-name="Source_20_Text"><text:span text:style-name="T5"><text:s text:c="4"/></text:span></text:span></text:p>
              <text:p text:style-name="P3"><text:span text:style-name="Source_20_Text"><text:span text:style-name="T5"><text:s text:c="4"/></text:span></text:span><text:span text:style-name="Source_20_Text"><text:span text:style-name="T4">&lt;</text:span></text:span><text:span text:style-name="Source_20_Text"><text:span text:style-name="T13">div</text:span></text:span><text:span text:style-name="Source_20_Text"><text:span text:style-name="T4"> </text:span></text:span><text:span text:style-name="Source_20_Text"><text:span text:style-name="T12">id</text:span></text:span><text:span text:style-name="Source_20_Text"><text:span text:style-name="T4">=</text:span></text:span><text:span text:style-name="Source_20_Text"><text:span text:style-name="T8">"log"</text:span></text:span><text:span text:style-name="Source_20_Text"><text:span text:style-name="T4">&gt;&lt;/</text:span></text:span><text:span text:style-name="Source_20_Text"><text:span text:style-name="T13">div</text:span></text:span><text:span text:style-name="Source_20_Text"><text:span text:style-name="T4">&gt;</text:span></text:span></text:p>
              <text:p text:style-name="P3"><text:span text:style-name="Source_20_Text"><text:span text:style-name="T5"><text:s text:c="4"/></text:span></text:span><text:span text:style-name="Source_20_Text"><text:span text:style-name="T4">&lt;</text:span></text:span><text:span text:style-name="Source_20_Text"><text:span text:style-name="T13">div</text:span></text:span><text:span text:style-name="Source_20_Text"><text:span text:style-name="T4"> </text:span></text:span><text:span text:style-name="Source_20_Text"><text:span text:style-name="T12">id</text:span></text:span><text:span text:style-name="Source_20_Text"><text:span text:style-name="T4">=</text:span></text:span><text:span text:style-name="Source_20_Text"><text:span text:style-name="T8">"ui"</text:span></text:span><text:span text:style-name="Source_20_Text"><text:span text:style-name="T4">&gt;&lt;/</text:span></text:span><text:span text:style-name="Source_20_Text"><text:span text:style-name="T13">div</text:span></text:span><text:span text:style-name="Source_20_Text"><text:span text:style-name="T4">&gt;</text:span></text:span></text:p>
              <text:p text:style-name="P4"/>
              <text:p text:style-name="P3"><text:span text:style-name="Source_20_Text"><text:span text:style-name="T5"><text:s text:c="4"/></text:span></text:span><text:span text:style-name="Source_20_Text"><text:span text:style-name="T4">&lt;</text:span></text:span><text:span text:style-name="Source_20_Text"><text:span text:style-name="T13">script</text:span></text:span><text:span text:style-name="Source_20_Text"><text:span text:style-name="T4">&gt;</text:span></text:span></text:p>
              <text:p text:style-name="P3"><text:span text:style-name="Source_20_Text"><text:span text:style-name="T5"><text:s text:c="8"/></text:span></text:span><text:span text:style-name="Source_20_Text"><text:span text:style-name="T6">// 1. Establish WebSocket Connection</text:span></text:span></text:p>
              <text:p text:style-name="P3"><text:span text:style-name="Source_20_Text"><text:span text:style-name="T5"><text:s text:c="8"/></text:span></text:span><text:span text:style-name="Source_20_Text"><text:span text:style-name="T3">const</text:span></text:span><text:span text:style-name="Source_20_Text"><text:span text:style-name="T4"> socket = </text:span></text:span><text:span text:style-name="Source_20_Text"><text:span text:style-name="T3">new</text:span></text:span><text:span text:style-name="Source_20_Text"><text:span text:style-name="T4"> WebSocket(</text:span></text:span><text:span text:style-name="Source_20_Text"><text:span text:style-name="T8">"ws://localhost:8080/ws"</text:span></text:span><text:span text:style-name="Source_20_Text"><text:span text:style-name="T4">);</text:span></text:span></text:p>
              <text:p text:style-name="P3"><text:span text:style-name="Source_20_Text"><text:span text:style-name="T5"><text:s text:c="8"/></text:span></text:span><text:span text:style-name="Source_20_Text"><text:span text:style-name="T3">const</text:span></text:span><text:span text:style-name="Source_20_Text"><text:span text:style-name="T4"> logDiv = </text:span></text:span><text:span text:style-name="Source_20_Text"><text:span text:style-name="T9">document</text:span></text:span><text:span text:style-name="Source_20_Text"><text:span text:style-name="T4">.getElementById(</text:span></text:span><text:span text:style-name="Source_20_Text"><text:span text:style-name="T8">"log"</text:span></text:span><text:span text:style-name="Source_20_Text"><text:span text:style-name="T4">);</text:span></text:span></text:p>
              <text:p text:style-name="P3"><text:span text:style-name="Source_20_Text"><text:span text:style-name="T5"><text:s text:c="8"/></text:span></text:span><text:span text:style-name="Source_20_Text"><text:span text:style-name="T3">const</text:span></text:span><text:span text:style-name="Source_20_Text"><text:span text:style-name="T4"> statusText = </text:span></text:span><text:span text:style-name="Source_20_Text"><text:span text:style-name="T9">document</text:span></text:span><text:span text:style-name="Source_20_Text"><text:span text:style-name="T4">.getElementById(</text:span></text:span><text:span text:style-name="Source_20_Text"><text:span text:style-name="T8">"statusText"</text:span></text:span><text:span text:style-name="Source_20_Text"><text:span text:style-name="T4">);</text:span></text:span></text:p>
              <text:p text:style-name="P3"><text:span text:style-name="Source_20_Text"><text:span text:style-name="T5"><text:s text:c="8"/></text:span></text:span><text:span text:style-name="Source_20_Text"><text:span text:style-name="T3">const</text:span></text:span><text:span text:style-name="Source_20_Text"><text:span text:style-name="T4"> ui = </text:span></text:span><text:span text:style-name="Source_20_Text"><text:span text:style-name="T9">document</text:span></text:span><text:span text:style-name="Source_20_Text"><text:span text:style-name="T4">.getElementById(</text:span></text:span><text:span text:style-name="Source_20_Text"><text:span text:style-name="T8">'ui'</text:span></text:span><text:span text:style-name="Source_20_Text"><text:span text:style-name="T4">);</text:span></text:span></text:p>
              <text:p text:style-name="P4"/>
              <text:p text:style-name="P3"><text:span text:style-name="Source_20_Text"><text:span text:style-name="T5"><text:s text:c="8"/></text:span></text:span><text:span text:style-name="Source_20_Text"><text:span text:style-name="T3">let</text:span></text:span><text:span text:style-name="Source_20_Text"><text:span text:style-name="T4"> isConnected = </text:span></text:span><text:span text:style-name="Source_20_Text"><text:span text:style-name="T12">false</text:span></text:span><text:span text:style-name="Source_20_Text"><text:span text:style-name="T4">;</text:span></text:span></text:p>
              <text:p text:style-name="P4"/>
              <text:p text:style-name="P3"><text:span text:style-name="Source_20_Text"><text:span text:style-name="T5"><text:s text:c="8"/></text:span></text:span><text:span text:style-name="Source_20_Text"><text:span text:style-name="T4">socket.onopen = (event) =&gt; {</text:span></text:span></text:p>
              <text:p text:style-name="P3"><text:span text:style-name="Source_20_Text"><text:span text:style-name="T5"><text:s text:c="12"/></text:span></text:span><text:span text:style-name="Source_20_Text"><text:span text:style-name="T4">statusText.innerHTML = </text:span></text:span><text:span text:style-name="Source_20_Text"><text:span text:style-name="T8">"&lt;b style='color: green;'&gt;Connected to server! Streaming interaction data...&lt;/b&gt;"</text:span></text:span><text:span text:style-name="Source_20_Text"><text:span text:style-name="T4">;</text:span></text:span></text:p>
              <text:p text:style-name="P3"><text:span text:style-name="Source_20_Text"><text:span text:style-name="T5"><text:s text:c="12"/></text:span></text:span><text:span text:style-name="Source_20_Text"><text:span text:style-name="T4">isConnected = </text:span></text:span><text:span text:style-name="Source_20_Text"><text:span text:style-name="T12">true</text:span></text:span><text:span text:style-name="Source_20_Text"><text:span text:style-name="T4">;</text:span></text:span></text:p>
              <text:p text:style-name="P4"><text:span text:style-name="Source_20_Text"><text:span text:style-name="T5"><text:s text:c="8"/></text:span></text:span><text:span text:style-name="Source_20_Text"><text:span text:style-name="T4">};</text:span></text:span></text:p>
              <text:p text:style-name="P4"/>
              <text:p text:style-name="P3"><text:span text:style-name="Source_20_Text"><text:span text:style-name="T5"><text:s text:c="8"/></text:span></text:span><text:span text:style-name="Source_20_Text"><text:span text:style-name="T4">socket.onmessage = (event) =&gt; {</text:span></text:span></text:p>
              <text:p text:style-name="P3"><text:span text:style-name="Source_20_Text"><text:span text:style-name="T5"><text:s text:c="12"/></text:span></text:span><text:span text:style-name="Source_20_Text"><text:span text:style-name="T6">// Optional: Handle response echoes from the server if needed</text:span></text:span></text:p>
              <text:p text:style-name="P3"><text:span text:style-name="Source_20_Text"><text:span text:style-name="T5"><text:s text:c="12"/></text:span></text:span><text:span text:style-name="Source_20_Text"><text:span text:style-name="T6">// Currently ignoring echoes to avoid log clutter during high-frequency moves</text:span></text:span></text:p>
              <text:p text:style-name="P4"><text:span text:style-name="Source_20_Text"><text:span text:style-name="T5"><text:s text:c="8"/></text:span></text:span><text:span text:style-name="Source_20_Text"><text:span text:style-name="T4">};</text:span></text:span></text:p>
              <text:p text:style-name="P4"/>
              <text:p text:style-name="P3"><text:span text:style-name="Source_20_Text"><text:span text:style-name="T5"><text:s text:c="8"/></text:span></text:span><text:span text:style-name="Source_20_Text"><text:span text:style-name="T4">socket.onclose = (event) =&gt; {</text:span></text:span></text:p>
              <text:p text:style-name="P3"><text:span text:style-name="Source_20_Text"><text:span text:style-name="T5"><text:s text:c="12"/></text:span></text:span><text:span text:style-name="Source_20_Text"><text:span text:style-name="T4">statusText.innerHTML = </text:span></text:span><text:span text:style-name="Source_20_Text"><text:span text:style-name="T8">"&lt;b style='color: red;'&gt;Disconnected from server.&lt;/b&gt;"</text:span></text:span><text:span text:style-name="Source_20_Text"><text:span text:style-name="T4">;</text:span></text:span></text:p>
              <text:p text:style-name="P3"><text:span text:style-name="Source_20_Text"><text:span text:style-name="T5"><text:s text:c="12"/></text:span></text:span><text:span text:style-name="Source_20_Text"><text:span text:style-name="T4">isConnected = </text:span></text:span><text:span text:style-name="Source_20_Text"><text:span text:style-name="T12">false</text:span></text:span><text:span text:style-name="Source_20_Text"><text:span text:style-name="T4">;</text:span></text:span></text:p>
              <text:p text:style-name="P4"><text:soft-page-break/><text:span text:style-name="Source_20_Text"><text:span text:style-name="T5"><text:s text:c="8"/></text:span></text:span><text:span text:style-name="Source_20_Text"><text:span text:style-name="T4">};</text:span></text:span></text:p>
              <text:p text:style-name="P4"/>
              <text:p text:style-name="P3"><text:span text:style-name="Source_20_Text"><text:span text:style-name="T5"><text:s text:c="8"/></text:span></text:span><text:span text:style-name="Source_20_Text"><text:span text:style-name="T6">// 2. Touch/Mouse Tracker Logic</text:span></text:span></text:p>
              <text:p text:style-name="P3"><text:span text:style-name="Source_20_Text"><text:span text:style-name="T5"><text:s text:c="8"/></text:span></text:span><text:span text:style-name="Source_20_Text"><text:span text:style-name="T3">var</text:span></text:span><text:span text:style-name="Source_20_Text"><text:span text:style-name="T4"> displayTimeout = </text:span></text:span><text:span text:style-name="Source_20_Text"><text:span text:style-name="T12">null</text:span></text:span><text:span text:style-name="Source_20_Text"><text:span text:style-name="T4">;</text:span></text:span></text:p>
              <text:p text:style-name="P3"><text:span text:style-name="Source_20_Text"><text:span text:style-name="T5"><text:s text:c="8"/></text:span></text:span><text:span text:style-name="Source_20_Text"><text:span text:style-name="T3">function</text:span></text:span><text:span text:style-name="Source_20_Text"><text:span text:style-name="T4"> </text:span></text:span><text:span text:style-name="Source_20_Text"><text:span text:style-name="T7">display</text:span></text:span><text:span text:style-name="Source_20_Text"><text:span text:style-name="T4">(e, p) {</text:span></text:span></text:p>
              <text:p text:style-name="P3"><text:span text:style-name="Source_20_Text"><text:span text:style-name="T5"><text:s text:c="12"/></text:span></text:span><text:span text:style-name="Source_20_Text"><text:span text:style-name="T3">var</text:span></text:span><text:span text:style-name="Source_20_Text"><text:span text:style-name="T4"> msg = e.type + </text:span></text:span><text:span text:style-name="Source_20_Text"><text:span text:style-name="T8">" @ "</text:span></text:span><text:span text:style-name="Source_20_Text"><text:span text:style-name="T4"> + p.clientX + </text:span></text:span><text:span text:style-name="Source_20_Text"><text:span text:style-name="T8">", "</text:span></text:span><text:span text:style-name="Source_20_Text"><text:span text:style-name="T4"> + p.clientY;</text:span></text:span></text:p>
              <text:p text:style-name="P3"><text:span text:style-name="Source_20_Text"><text:span text:style-name="T5"><text:s text:c="12"/></text:span></text:span><text:span text:style-name="Source_20_Text"><text:span text:style-name="T4">logDiv.textContent += msg + </text:span></text:span><text:span text:style-name="Source_20_Text"><text:span text:style-name="T8">'\n'</text:span></text:span><text:span text:style-name="Source_20_Text"><text:span text:style-name="T4">;</text:span></text:span></text:p>
              <text:p text:style-name="P4"><text:span text:style-name="Source_20_Text"><text:span text:style-name="T5"><text:s text:c="12"/></text:span></text:span><text:span text:style-name="Source_20_Text"><text:span text:style-name="T4">logDiv.scrollTop = logDiv.scrollHeight;</text:span></text:span></text:p>
              <text:p text:style-name="P3"><text:span text:style-name="Source_20_Text"><text:span text:style-name="T5"><text:s text:c="12"/></text:span></text:span><text:span text:style-name="Source_20_Text"><text:span text:style-name="T4">e.preventDefault(); <text:s text:c="4"/></text:span></text:span><text:span text:style-name="Source_20_Text"><text:span text:style-name="T6">// Prevent default scrolling/gestures</text:span></text:span></text:p>
              <text:p text:style-name="P4"><text:span text:style-name="Source_20_Text"><text:span text:style-name="T5"><text:s text:c="12"/></text:span></text:span></text:p>
              <text:p text:style-name="P3"><text:span text:style-name="Source_20_Text"><text:span text:style-name="T5"><text:s text:c="12"/></text:span></text:span><text:span text:style-name="Source_20_Text"><text:span text:style-name="T6">// --- STREAM TO WEBSOCKET ---</text:span></text:span></text:p>
              <text:p text:style-name="P3"><text:span text:style-name="Source_20_Text"><text:span text:style-name="T5"><text:s text:c="12"/></text:span></text:span><text:span text:style-name="Source_20_Text"><text:span text:style-name="T3">if</text:span></text:span><text:span text:style-name="Source_20_Text"><text:span text:style-name="T4"> (isConnected) {</text:span></text:span></text:p>
              <text:p text:style-name="P3"><text:span text:style-name="Source_20_Text"><text:span text:style-name="T5"><text:s text:c="16"/></text:span></text:span><text:span text:style-name="Source_20_Text"><text:span text:style-name="T4">socket.send(</text:span></text:span><text:span text:style-name="Source_20_Text"><text:span text:style-name="T9">JSON</text:span></text:span><text:span text:style-name="Source_20_Text"><text:span text:style-name="T4">.stringify({</text:span></text:span></text:p>
              <text:p text:style-name="P3"><text:span text:style-name="Source_20_Text"><text:span text:style-name="T5"><text:s text:c="20"/></text:span></text:span><text:span text:style-name="Source_20_Text"><text:span text:style-name="T12">event</text:span></text:span><text:span text:style-name="Source_20_Text"><text:span text:style-name="T4">: e.type,</text:span></text:span></text:p>
              <text:p text:style-name="P3"><text:span text:style-name="Source_20_Text"><text:span text:style-name="T5"><text:s text:c="20"/></text:span></text:span><text:span text:style-name="Source_20_Text"><text:span text:style-name="T12">x</text:span></text:span><text:span text:style-name="Source_20_Text"><text:span text:style-name="T4">: p.clientX,</text:span></text:span></text:p>
              <text:p text:style-name="P3"><text:span text:style-name="Source_20_Text"><text:span text:style-name="T5"><text:s text:c="20"/></text:span></text:span><text:span text:style-name="Source_20_Text"><text:span text:style-name="T12">y</text:span></text:span><text:span text:style-name="Source_20_Text"><text:span text:style-name="T4">: p.clientY</text:span></text:span></text:p>
              <text:p text:style-name="P4"><text:span text:style-name="Source_20_Text"><text:span text:style-name="T5"><text:s text:c="16"/></text:span></text:span><text:span text:style-name="Source_20_Text"><text:span text:style-name="T4">}));</text:span></text:span></text:p>
              <text:p text:style-name="P4"><text:span text:style-name="Source_20_Text"><text:span text:style-name="T5"><text:s text:c="12"/></text:span></text:span><text:span text:style-name="Source_20_Text"><text:span text:style-name="T4">}</text:span></text:span></text:p>
              <text:p text:style-name="P3"><text:span text:style-name="Source_20_Text"><text:span text:style-name="T5"><text:s text:c="12"/></text:span></text:span><text:span text:style-name="Source_20_Text"><text:span text:style-name="T6">// ---------------------------</text:span></text:span></text:p>
              <text:p text:style-name="P4"><text:span text:style-name="Source_20_Text"><text:span text:style-name="T5"><text:s text:c="12"/></text:span></text:span></text:p>
              <text:p text:style-name="P3"><text:span text:style-name="Source_20_Text"><text:span text:style-name="T5"><text:s text:c="12"/></text:span></text:span><text:span text:style-name="Source_20_Text"><text:span text:style-name="T9">clearTimeout</text:span></text:span><text:span text:style-name="Source_20_Text"><text:span text:style-name="T4">(displayTimeout);</text:span></text:span></text:p>
              <text:p text:style-name="P3"><text:span text:style-name="Source_20_Text"><text:span text:style-name="T5"><text:s text:c="12"/></text:span></text:span><text:span text:style-name="Source_20_Text"><text:span text:style-name="T4">displayTimeout = </text:span></text:span><text:span text:style-name="Source_20_Text"><text:span text:style-name="T9">setTimeout</text:span></text:span><text:span text:style-name="Source_20_Text"><text:span text:style-name="T4">(</text:span></text:span><text:span text:style-name="Source_20_Text"><text:span text:style-name="T3">function</text:span></text:span><text:span text:style-name="Source_20_Text"><text:span text:style-name="T4"> () { <text:s text:c="2"/></text:span></text:span><text:span text:style-name="Source_20_Text"><text:span text:style-name="T6">// log a newline during pauses</text:span></text:span></text:p>
              <text:p text:style-name="P3"><text:span text:style-name="Source_20_Text"><text:span text:style-name="T5"><text:s text:c="16"/></text:span></text:span><text:span text:style-name="Source_20_Text"><text:span text:style-name="T4">logDiv.textContent += </text:span></text:span><text:span text:style-name="Source_20_Text"><text:span text:style-name="T8">'\n'</text:span></text:span><text:span text:style-name="Source_20_Text"><text:span text:style-name="T4">;</text:span></text:span></text:p>
              <text:p text:style-name="P3"><text:span text:style-name="Source_20_Text"><text:span text:style-name="T5"><text:s text:c="12"/></text:span></text:span><text:span text:style-name="Source_20_Text"><text:span text:style-name="T4">}, </text:span></text:span><text:span text:style-name="Source_20_Text"><text:span text:style-name="T12">500</text:span></text:span><text:span text:style-name="Source_20_Text"><text:span text:style-name="T4">);</text:span></text:span></text:p>
              <text:p text:style-name="P4"><text:span text:style-name="Source_20_Text"><text:span text:style-name="T5"><text:s text:c="8"/></text:span></text:span><text:span text:style-name="Source_20_Text"><text:span text:style-name="T4">}</text:span></text:span></text:p>
              <text:p text:style-name="P4"><text:span text:style-name="Source_20_Text"><text:span text:style-name="T5"><text:s text:c="8"/></text:span></text:span></text:p>
              <text:p text:style-name="P3"><text:span text:style-name="Source_20_Text"><text:span text:style-name="T5"><text:s text:c="8"/></text:span></text:span><text:span text:style-name="Source_20_Text"><text:span text:style-name="T3">var</text:span></text:span><text:span text:style-name="Source_20_Text"><text:span text:style-name="T4"> pointerEls = </text:span></text:span><text:span text:style-name="Source_20_Text"><text:span text:style-name="T9">Object</text:span></text:span><text:span text:style-name="Source_20_Text"><text:span text:style-name="T4">.create(</text:span></text:span><text:span text:style-name="Source_20_Text"><text:span text:style-name="T12">null</text:span></text:span><text:span text:style-name="Source_20_Text"><text:span text:style-name="T4">);</text:span></text:span></text:p>
              <text:p text:style-name="P3"><text:span text:style-name="Source_20_Text"><text:span text:style-name="T5"><text:s text:c="8"/></text:span></text:span><text:span text:style-name="Source_20_Text"><text:span text:style-name="T3">function</text:span></text:span><text:span text:style-name="Source_20_Text"><text:span text:style-name="T4"> </text:span></text:span><text:span text:style-name="Source_20_Text"><text:span text:style-name="T7">pointer</text:span></text:span><text:span text:style-name="Source_20_Text"><text:span text:style-name="T4">(id, p) {</text:span></text:span></text:p>
              <text:p text:style-name="P3"><text:span text:style-name="Source_20_Text"><text:span text:style-name="T5"><text:s text:c="12"/></text:span></text:span><text:span text:style-name="Source_20_Text"><text:span text:style-name="T3">var</text:span></text:span><text:span text:style-name="Source_20_Text"><text:span text:style-name="T4"> el = pointerEls[id];</text:span></text:span></text:p>
              <text:p text:style-name="P3"><text:span text:style-name="Source_20_Text"><text:span text:style-name="T5"><text:s text:c="12"/></text:span></text:span><text:span text:style-name="Source_20_Text"><text:span text:style-name="T3">if</text:span></text:span><text:span text:style-name="Source_20_Text"><text:span text:style-name="T4"> (p &amp;&amp; !el) {</text:span></text:span></text:p>
              <text:p text:style-name="P3"><text:span text:style-name="Source_20_Text"><text:span text:style-name="T5"><text:s text:c="16"/></text:span></text:span><text:span text:style-name="Source_20_Text"><text:span text:style-name="T4">el = </text:span></text:span><text:span text:style-name="Source_20_Text"><text:span text:style-name="T9">document</text:span></text:span><text:span text:style-name="Source_20_Text"><text:span text:style-name="T4">.createElement(</text:span></text:span><text:span text:style-name="Source_20_Text"><text:span text:style-name="T8">'div'</text:span></text:span><text:span text:style-name="Source_20_Text"><text:span text:style-name="T4">);</text:span></text:span></text:p>
              <text:p text:style-name="P3"><text:span text:style-name="Source_20_Text"><text:span text:style-name="T5"><text:s text:c="16"/></text:span></text:span><text:span text:style-name="Source_20_Text"><text:span text:style-name="T4">el.className = </text:span></text:span><text:span text:style-name="Source_20_Text"><text:span text:style-name="T8">'point'</text:span></text:span><text:span text:style-name="Source_20_Text"><text:span text:style-name="T4">;</text:span></text:span></text:p>
              <text:p text:style-name="P4"><text:span text:style-name="Source_20_Text"><text:span text:style-name="T5"><text:s text:c="16"/></text:span></text:span><text:span text:style-name="Source_20_Text"><text:span text:style-name="T4">el.textContent = id;</text:span></text:span></text:p>
              <text:p text:style-name="P4"><text:span text:style-name="Source_20_Text"><text:span text:style-name="T5"><text:s text:c="16"/></text:span></text:span><text:span text:style-name="Source_20_Text"><text:span text:style-name="T4">ui.appendChild(el);</text:span></text:span></text:p>
              <text:p text:style-name="P4"><text:span text:style-name="Source_20_Text"><text:span text:style-name="T5"><text:s text:c="16"/></text:span></text:span><text:span text:style-name="Source_20_Text"><text:span text:style-name="T4">pointerEls[id] = el;</text:span></text:span></text:p>
              <text:p text:style-name="P3"><text:span text:style-name="Source_20_Text"><text:span text:style-name="T5"><text:s text:c="12"/></text:span></text:span><text:span text:style-name="Source_20_Text"><text:span text:style-name="T4">} </text:span></text:span><text:span text:style-name="Source_20_Text"><text:span text:style-name="T3">else</text:span></text:span><text:span text:style-name="Source_20_Text"><text:span text:style-name="T4"> </text:span></text:span><text:span text:style-name="Source_20_Text"><text:span text:style-name="T3">if</text:span></text:span><text:span text:style-name="Source_20_Text"><text:span text:style-name="T4"> (!p &amp;&amp; el) {</text:span></text:span></text:p>
              <text:p text:style-name="P3"><text:span text:style-name="Source_20_Text"><text:span text:style-name="T5"><text:s text:c="16"/></text:span></text:span><text:span text:style-name="Source_20_Text"><text:span text:style-name="T3">delete</text:span></text:span><text:span text:style-name="Source_20_Text"><text:span text:style-name="T4"> pointerEls[id];</text:span></text:span></text:p>
              <text:p text:style-name="P3"><text:span text:style-name="Source_20_Text"><text:span text:style-name="T5"><text:s text:c="16"/></text:span></text:span><text:span text:style-name="Source_20_Text"><text:span text:style-name="T4">el.className += </text:span></text:span><text:span text:style-name="Source_20_Text"><text:span text:style-name="T8">' fade'</text:span></text:span><text:span text:style-name="Source_20_Text"><text:span text:style-name="T4">;</text:span></text:span></text:p>
              <text:p text:style-name="P3"><text:span text:style-name="Source_20_Text"><text:span text:style-name="T5"><text:s text:c="16"/></text:span></text:span><text:span text:style-name="Source_20_Text"><text:span text:style-name="T9">setTimeout</text:span></text:span><text:span text:style-name="Source_20_Text"><text:span text:style-name="T4">(</text:span></text:span><text:span text:style-name="Source_20_Text"><text:span text:style-name="T3">function</text:span></text:span><text:span text:style-name="Source_20_Text"><text:span text:style-name="T4"> () {</text:span></text:span></text:p>
              <text:p text:style-name="P3"><text:span text:style-name="Source_20_Text"><text:span text:style-name="T5"><text:s text:c="20"/></text:span></text:span><text:span text:style-name="Source_20_Text"><text:span text:style-name="T3">if</text:span></text:span><text:span text:style-name="Source_20_Text"><text:span text:style-name="T4"> (el.parentNode) el.parentNode.removeChild(el);</text:span></text:span></text:p>
              <text:p text:style-name="P3"><text:span text:style-name="Source_20_Text"><text:span text:style-name="T5"><text:s text:c="16"/></text:span></text:span><text:span text:style-name="Source_20_Text"><text:span text:style-name="T4">}, </text:span></text:span><text:span text:style-name="Source_20_Text"><text:span text:style-name="T12">500</text:span></text:span><text:span text:style-name="Source_20_Text"><text:span text:style-name="T4">);</text:span></text:span></text:p>
              <text:p text:style-name="P3"><text:span text:style-name="Source_20_Text"><text:span text:style-name="T5"><text:s text:c="16"/></text:span></text:span><text:span text:style-name="Source_20_Text"><text:span text:style-name="T3">return</text:span></text:span><text:span text:style-name="Source_20_Text"><text:span text:style-name="T4">;</text:span></text:span></text:p>
              <text:p text:style-name="P4"><text:soft-page-break/><text:span text:style-name="Source_20_Text"><text:span text:style-name="T5"><text:s text:c="12"/></text:span></text:span><text:span text:style-name="Source_20_Text"><text:span text:style-name="T4">}</text:span></text:span></text:p>
              <text:p text:style-name="P3"><text:span text:style-name="Source_20_Text"><text:span text:style-name="T5"><text:s text:c="12"/></text:span></text:span><text:span text:style-name="Source_20_Text"><text:span text:style-name="T3">if</text:span></text:span><text:span text:style-name="Source_20_Text"><text:span text:style-name="T4"> (el &amp;&amp; p) {</text:span></text:span></text:p>
              <text:p text:style-name="P3"><text:span text:style-name="Source_20_Text"><text:span text:style-name="T5"><text:s text:c="16"/></text:span></text:span><text:span text:style-name="Source_20_Text"><text:span text:style-name="T4">el.style.top = (p.clientY - el.clientHeight/</text:span></text:span><text:span text:style-name="Source_20_Text"><text:span text:style-name="T12">2</text:span></text:span><text:span text:style-name="Source_20_Text"><text:span text:style-name="T4">) + </text:span></text:span><text:span text:style-name="Source_20_Text"><text:span text:style-name="T8">'px'</text:span></text:span><text:span text:style-name="Source_20_Text"><text:span text:style-name="T4">;</text:span></text:span></text:p>
              <text:p text:style-name="P3"><text:span text:style-name="Source_20_Text"><text:span text:style-name="T5"><text:s text:c="16"/></text:span></text:span><text:span text:style-name="Source_20_Text"><text:span text:style-name="T4">el.style.left = (p.clientX - el.clientWidth/</text:span></text:span><text:span text:style-name="Source_20_Text"><text:span text:style-name="T12">2</text:span></text:span><text:span text:style-name="Source_20_Text"><text:span text:style-name="T4">) + </text:span></text:span><text:span text:style-name="Source_20_Text"><text:span text:style-name="T8">'px'</text:span></text:span><text:span text:style-name="Source_20_Text"><text:span text:style-name="T4">;</text:span></text:span></text:p>
              <text:p text:style-name="P4"><text:span text:style-name="Source_20_Text"><text:span text:style-name="T5"><text:s text:c="12"/></text:span></text:span><text:span text:style-name="Source_20_Text"><text:span text:style-name="T4">}</text:span></text:span></text:p>
              <text:p text:style-name="P4"><text:span text:style-name="Source_20_Text"><text:span text:style-name="T5"><text:s text:c="8"/></text:span></text:span><text:span text:style-name="Source_20_Text"><text:span text:style-name="T4">}</text:span></text:span></text:p>
              <text:p text:style-name="P4"><text:span text:style-name="Source_20_Text"><text:span text:style-name="T5"><text:s text:c="8"/></text:span></text:span></text:p>
              <text:p text:style-name="P3"><text:span text:style-name="Source_20_Text"><text:span text:style-name="T5"><text:s text:c="8"/></text:span></text:span><text:span text:style-name="Source_20_Text"><text:span text:style-name="T6">// Mouse Listeners</text:span></text:span></text:p>
              <text:p text:style-name="P3"><text:span text:style-name="Source_20_Text"><text:span text:style-name="T5"><text:s text:c="8"/></text:span></text:span><text:span text:style-name="Source_20_Text"><text:span text:style-name="T3">var</text:span></text:span><text:span text:style-name="Source_20_Text"><text:span text:style-name="T4"> displayMouse =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4">ui.addEventListener(</text:span></text:span><text:span text:style-name="Source_20_Text"><text:span text:style-name="T8">'mousedown'</text:span></text:span><text:span text:style-name="Source_20_Text"><text:span text:style-name="T4">, </text:span></text:span><text:span text:style-name="Source_20_Text"><text:span text:style-name="T3">function</text:span></text:span><text:span text:style-name="Source_20_Text"><text:span text:style-name="T4"> (e) {</text:span></text:span></text:p>
              <text:p text:style-name="P4"><text:span text:style-name="Source_20_Text"><text:span text:style-name="T5"><text:s text:c="12"/></text:span></text:span><text:span text:style-name="Source_20_Text"><text:span text:style-name="T4">display(e,e);</text:span></text:span></text:p>
              <text:p text:style-name="P3"><text:span text:style-name="Source_20_Text"><text:span text:style-name="T5"><text:s text:c="12"/></text:span></text:span><text:span text:style-name="Source_20_Text"><text:span text:style-name="T4">pointer(</text:span></text:span><text:span text:style-name="Source_20_Text"><text:span text:style-name="T8">'m'</text:span></text:span><text:span text:style-name="Source_20_Text"><text:span text:style-name="T4">, e);</text:span></text:span></text:p>
              <text:p text:style-name="P3"><text:span text:style-name="Source_20_Text"><text:span text:style-name="T5"><text:s text:c="12"/></text:span></text:span><text:span text:style-name="Source_20_Text"><text:span text:style-name="T4">displayMouse = </text:span></text:span><text:span text:style-name="Source_20_Text"><text:span text:style-name="T12">true</text:span></text:span><text:span text:style-name="Source_20_Text"><text:span text:style-name="T4">;</text:span></text:span></text:p>
              <text:p text:style-name="P3"><text:span text:style-name="Source_20_Text"><text:span text:style-name="T5"><text:s text:c="8"/></text:span></text:span><text:span text:style-name="Source_20_Text"><text:span text:style-name="T4">},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9">window</text:span></text:span><text:span text:style-name="Source_20_Text"><text:span text:style-name="T4">.addEventListener(</text:span></text:span><text:span text:style-name="Source_20_Text"><text:span text:style-name="T8">'mousemove'</text:span></text:span><text:span text:style-name="Source_20_Text"><text:span text:style-name="T4">, </text:span></text:span><text:span text:style-name="Source_20_Text"><text:span text:style-name="T3">function</text:span></text:span><text:span text:style-name="Source_20_Text"><text:span text:style-name="T4"> (e) {</text:span></text:span></text:p>
              <text:p text:style-name="P3"><text:span text:style-name="Source_20_Text"><text:span text:style-name="T5"><text:s text:c="12"/></text:span></text:span><text:span text:style-name="Source_20_Text"><text:span text:style-name="T3">if</text:span></text:span><text:span text:style-name="Source_20_Text"><text:span text:style-name="T4"> (!displayMouse) </text:span></text:span><text:span text:style-name="Source_20_Text"><text:span text:style-name="T3">return</text:span></text:span><text:span text:style-name="Source_20_Text"><text:span text:style-name="T4">;</text:span></text:span></text:p>
              <text:p text:style-name="P4"><text:span text:style-name="Source_20_Text"><text:span text:style-name="T5"><text:s text:c="12"/></text:span></text:span><text:span text:style-name="Source_20_Text"><text:span text:style-name="T4">display(e,e);</text:span></text:span></text:p>
              <text:p text:style-name="P3"><text:span text:style-name="Source_20_Text"><text:span text:style-name="T5"><text:s text:c="12"/></text:span></text:span><text:span text:style-name="Source_20_Text"><text:span text:style-name="T4">pointer(</text:span></text:span><text:span text:style-name="Source_20_Text"><text:span text:style-name="T8">'m'</text:span></text:span><text:span text:style-name="Source_20_Text"><text:span text:style-name="T4">, e);</text:span></text:span></text:p>
              <text:p text:style-name="P3"><text:span text:style-name="Source_20_Text"><text:span text:style-name="T5"><text:s text:c="8"/></text:span></text:span><text:span text:style-name="Source_20_Text"><text:span text:style-name="T4">},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9">window</text:span></text:span><text:span text:style-name="Source_20_Text"><text:span text:style-name="T4">.addEventListener(</text:span></text:span><text:span text:style-name="Source_20_Text"><text:span text:style-name="T8">'mouseup'</text:span></text:span><text:span text:style-name="Source_20_Text"><text:span text:style-name="T4">, </text:span></text:span><text:span text:style-name="Source_20_Text"><text:span text:style-name="T3">function</text:span></text:span><text:span text:style-name="Source_20_Text"><text:span text:style-name="T4"> (e) {</text:span></text:span></text:p>
              <text:p text:style-name="P3"><text:span text:style-name="Source_20_Text"><text:span text:style-name="T5"><text:s text:c="12"/></text:span></text:span><text:span text:style-name="Source_20_Text"><text:span text:style-name="T3">if</text:span></text:span><text:span text:style-name="Source_20_Text"><text:span text:style-name="T4"> (!displayMouse) </text:span></text:span><text:span text:style-name="Source_20_Text"><text:span text:style-name="T3">return</text:span></text:span><text:span text:style-name="Source_20_Text"><text:span text:style-name="T4">;</text:span></text:span></text:p>
              <text:p text:style-name="P4"><text:span text:style-name="Source_20_Text"><text:span text:style-name="T5"><text:s text:c="12"/></text:span></text:span><text:span text:style-name="Source_20_Text"><text:span text:style-name="T4">display(e,e);</text:span></text:span></text:p>
              <text:p text:style-name="P3"><text:span text:style-name="Source_20_Text"><text:span text:style-name="T5"><text:s text:c="12"/></text:span></text:span><text:span text:style-name="Source_20_Text"><text:span text:style-name="T4">pointer(</text:span></text:span><text:span text:style-name="Source_20_Text"><text:span text:style-name="T8">'m'</text:span></text:span><text:span text:style-name="Source_20_Text"><text:span text:style-name="T4">, </text:span></text:span><text:span text:style-name="Source_20_Text"><text:span text:style-name="T12">null</text:span></text:span><text:span text:style-name="Source_20_Text"><text:span text:style-name="T4">);</text:span></text:span></text:p>
              <text:p text:style-name="P3"><text:span text:style-name="Source_20_Text"><text:span text:style-name="T5"><text:s text:c="12"/></text:span></text:span><text:span text:style-name="Source_20_Text"><text:span text:style-name="T4">displayMouse =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4">}, </text:span></text:span><text:span text:style-name="Source_20_Text"><text:span text:style-name="T12">false</text:span></text:span><text:span text:style-name="Source_20_Text"><text:span text:style-name="T4">);</text:span></text:span></text:p>
              <text:p text:style-name="P4"><text:span text:style-name="Source_20_Text"><text:span text:style-name="T5"><text:s text:c="8"/></text:span></text:span></text:p>
              <text:p text:style-name="P3"><text:span text:style-name="Source_20_Text"><text:span text:style-name="T5"><text:s text:c="8"/></text:span></text:span><text:span text:style-name="Source_20_Text"><text:span text:style-name="T6">// Legacy Pointer Listeners (IE/Edge)</text:span></text:span></text:p>
              <text:p text:style-name="P3"><text:span text:style-name="Source_20_Text"><text:span text:style-name="T5"><text:s text:c="8"/></text:span></text:span><text:span text:style-name="Source_20_Text"><text:span text:style-name="T3">var</text:span></text:span><text:span text:style-name="Source_20_Text"><text:span text:style-name="T4"> displayPointer =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4">ui.addEventListener(</text:span></text:span><text:span text:style-name="Source_20_Text"><text:span text:style-name="T8">'MSPointerDown'</text:span></text:span><text:span text:style-name="Source_20_Text"><text:span text:style-name="T4">, </text:span></text:span><text:span text:style-name="Source_20_Text"><text:span text:style-name="T3">function</text:span></text:span><text:span text:style-name="Source_20_Text"><text:span text:style-name="T4"> (e) {</text:span></text:span></text:p>
              <text:p text:style-name="P4"><text:span text:style-name="Source_20_Text"><text:span text:style-name="T5"><text:s text:c="12"/></text:span></text:span><text:span text:style-name="Source_20_Text"><text:span text:style-name="T4">display(e,e);</text:span></text:span></text:p>
              <text:p text:style-name="P4"><text:span text:style-name="Source_20_Text"><text:span text:style-name="T5"><text:s text:c="12"/></text:span></text:span><text:span text:style-name="Source_20_Text"><text:span text:style-name="T4">pointer(e.pointerId, e);</text:span></text:span></text:p>
              <text:p text:style-name="P3"><text:span text:style-name="Source_20_Text"><text:span text:style-name="T5"><text:s text:c="12"/></text:span></text:span><text:span text:style-name="Source_20_Text"><text:span text:style-name="T4">displayPointer = </text:span></text:span><text:span text:style-name="Source_20_Text"><text:span text:style-name="T12">true</text:span></text:span><text:span text:style-name="Source_20_Text"><text:span text:style-name="T4">;</text:span></text:span></text:p>
              <text:p text:style-name="P3"><text:span text:style-name="Source_20_Text"><text:span text:style-name="T5"><text:s text:c="8"/></text:span></text:span><text:span text:style-name="Source_20_Text"><text:span text:style-name="T4">},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9">window</text:span></text:span><text:span text:style-name="Source_20_Text"><text:span text:style-name="T4">.addEventListener(</text:span></text:span><text:span text:style-name="Source_20_Text"><text:span text:style-name="T8">'MSPointerMove'</text:span></text:span><text:span text:style-name="Source_20_Text"><text:span text:style-name="T4">, </text:span></text:span><text:span text:style-name="Source_20_Text"><text:span text:style-name="T3">function</text:span></text:span><text:span text:style-name="Source_20_Text"><text:span text:style-name="T4"> (e) {</text:span></text:span></text:p>
              <text:p text:style-name="P3"><text:span text:style-name="Source_20_Text"><text:span text:style-name="T5"><text:s text:c="12"/></text:span></text:span><text:span text:style-name="Source_20_Text"><text:span text:style-name="T3">if</text:span></text:span><text:span text:style-name="Source_20_Text"><text:span text:style-name="T4"> (!displayPointer) </text:span></text:span><text:span text:style-name="Source_20_Text"><text:span text:style-name="T3">return</text:span></text:span><text:span text:style-name="Source_20_Text"><text:span text:style-name="T4">;</text:span></text:span></text:p>
              <text:p text:style-name="P4"><text:span text:style-name="Source_20_Text"><text:span text:style-name="T5"><text:s text:c="12"/></text:span></text:span><text:span text:style-name="Source_20_Text"><text:span text:style-name="T4">display(e,e);</text:span></text:span></text:p>
              <text:p text:style-name="P4"><text:span text:style-name="Source_20_Text"><text:span text:style-name="T5"><text:s text:c="12"/></text:span></text:span><text:span text:style-name="Source_20_Text"><text:span text:style-name="T4">pointer(e.pointerId, e);</text:span></text:span></text:p>
              <text:p text:style-name="P3"><text:span text:style-name="Source_20_Text"><text:span text:style-name="T5"><text:s text:c="8"/></text:span></text:span><text:span text:style-name="Source_20_Text"><text:span text:style-name="T4">},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3">function</text:span></text:span><text:span text:style-name="Source_20_Text"><text:span text:style-name="T4"> </text:span></text:span><text:span text:style-name="Source_20_Text"><text:span text:style-name="T7">pointerdone</text:span></text:span><text:span text:style-name="Source_20_Text"><text:span text:style-name="T4">(e) {</text:span></text:span></text:p>
              <text:p text:style-name="P3"><text:span text:style-name="Source_20_Text"><text:span text:style-name="T5"><text:s text:c="12"/></text:span></text:span><text:span text:style-name="Source_20_Text"><text:span text:style-name="T3">if</text:span></text:span><text:span text:style-name="Source_20_Text"><text:span text:style-name="T4"> (!displayPointer) </text:span></text:span><text:span text:style-name="Source_20_Text"><text:span text:style-name="T3">return</text:span></text:span><text:span text:style-name="Source_20_Text"><text:span text:style-name="T4">;</text:span></text:span></text:p>
              <text:p text:style-name="P4"><text:span text:style-name="Source_20_Text"><text:span text:style-name="T5"><text:s text:c="12"/></text:span></text:span><text:span text:style-name="Source_20_Text"><text:span text:style-name="T4">display(e,e);</text:span></text:span></text:p>
              <text:p text:style-name="P3"><text:span text:style-name="Source_20_Text"><text:span text:style-name="T5"><text:s text:c="12"/></text:span></text:span><text:span text:style-name="Source_20_Text"><text:span text:style-name="T4">pointer(e.pointerId, </text:span></text:span><text:span text:style-name="Source_20_Text"><text:span text:style-name="T12">null</text:span></text:span><text:span text:style-name="Source_20_Text"><text:span text:style-name="T4">);</text:span></text:span></text:p>
              <text:p text:style-name="P3"><text:soft-page-break/><text:span text:style-name="Source_20_Text"><text:span text:style-name="T5"><text:s text:c="12"/></text:span></text:span><text:span text:style-name="Source_20_Text"><text:span text:style-name="T4">displayPointer = </text:span></text:span><text:span text:style-name="Source_20_Text"><text:span text:style-name="T12">false</text:span></text:span><text:span text:style-name="Source_20_Text"><text:span text:style-name="T4">;</text:span></text:span></text:p>
              <text:p text:style-name="P4"><text:span text:style-name="Source_20_Text"><text:span text:style-name="T5"><text:s text:c="8"/></text:span></text:span><text:span text:style-name="Source_20_Text"><text:span text:style-name="T4">}</text:span></text:span></text:p>
              <text:p text:style-name="P3"><text:span text:style-name="Source_20_Text"><text:span text:style-name="T5"><text:s text:c="8"/></text:span></text:span><text:span text:style-name="Source_20_Text"><text:span text:style-name="T9">window</text:span></text:span><text:span text:style-name="Source_20_Text"><text:span text:style-name="T4">.addEventListener(</text:span></text:span><text:span text:style-name="Source_20_Text"><text:span text:style-name="T8">'MSPointerCancel'</text:span></text:span><text:span text:style-name="Source_20_Text"><text:span text:style-name="T4">, pointerdone,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9">window</text:span></text:span><text:span text:style-name="Source_20_Text"><text:span text:style-name="T4">.addEventListener(</text:span></text:span><text:span text:style-name="Source_20_Text"><text:span text:style-name="T8">'MSPointerUp'</text:span></text:span><text:span text:style-name="Source_20_Text"><text:span text:style-name="T4">, pointerdone, </text:span></text:span><text:span text:style-name="Source_20_Text"><text:span text:style-name="T12">false</text:span></text:span><text:span text:style-name="Source_20_Text"><text:span text:style-name="T4">);</text:span></text:span></text:p>
              <text:p text:style-name="P4"><text:span text:style-name="Source_20_Text"><text:span text:style-name="T5"><text:s text:c="8"/></text:span></text:span></text:p>
              <text:p text:style-name="P3"><text:span text:style-name="Source_20_Text"><text:span text:style-name="T5"><text:s text:c="8"/></text:span></text:span><text:span text:style-name="Source_20_Text"><text:span text:style-name="T6">// Touch Listeners (Mobile/Tablets)</text:span></text:span></text:p>
              <text:p text:style-name="P3"><text:span text:style-name="Source_20_Text"><text:span text:style-name="T5"><text:s text:c="8"/></text:span></text:span><text:span text:style-name="Source_20_Text"><text:span text:style-name="T4">ui.addEventListener(</text:span></text:span><text:span text:style-name="Source_20_Text"><text:span text:style-name="T8">'touchstart'</text:span></text:span><text:span text:style-name="Source_20_Text"><text:span text:style-name="T4">, </text:span></text:span><text:span text:style-name="Source_20_Text"><text:span text:style-name="T3">function</text:span></text:span><text:span text:style-name="Source_20_Text"><text:span text:style-name="T4"> (e) {</text:span></text:span></text:p>
              <text:p text:style-name="P3"><text:span text:style-name="Source_20_Text"><text:span text:style-name="T5"><text:s text:c="12"/></text:span></text:span><text:span text:style-name="Source_20_Text"><text:span text:style-name="T4">[].forEach.call(e.changedTouches, </text:span></text:span><text:span text:style-name="Source_20_Text"><text:span text:style-name="T3">function</text:span></text:span><text:span text:style-name="Source_20_Text"><text:span text:style-name="T4"> (p) {</text:span></text:span></text:p>
              <text:p text:style-name="P4"><text:span text:style-name="Source_20_Text"><text:span text:style-name="T5"><text:s text:c="16"/></text:span></text:span><text:span text:style-name="Source_20_Text"><text:span text:style-name="T4">display(e,p);</text:span></text:span></text:p>
              <text:p text:style-name="P4"><text:span text:style-name="Source_20_Text"><text:span text:style-name="T5"><text:s text:c="16"/></text:span></text:span><text:span text:style-name="Source_20_Text"><text:span text:style-name="T4">pointer(p.identifier, p);</text:span></text:span></text:p>
              <text:p text:style-name="P4"><text:span text:style-name="Source_20_Text"><text:span text:style-name="T5"><text:s text:c="16"/></text:span></text:span></text:p>
              <text:p text:style-name="P3"><text:span text:style-name="Source_20_Text"><text:span text:style-name="T5"><text:s text:c="16"/></text:span></text:span><text:span text:style-name="Source_20_Text"><text:span text:style-name="T3">var</text:span></text:span><text:span text:style-name="Source_20_Text"><text:span text:style-name="T4"> pid = p.identifier,</text:span></text:span></text:p>
              <text:p text:style-name="P4"><text:span text:style-name="Source_20_Text"><text:span text:style-name="T5"><text:s text:c="20"/></text:span></text:span><text:span text:style-name="Source_20_Text"><text:span text:style-name="T4">tgt = e.target;</text:span></text:span></text:p>
              <text:p text:style-name="P3"><text:span text:style-name="Source_20_Text"><text:span text:style-name="T5"><text:s text:c="16"/></text:span></text:span><text:span text:style-name="Source_20_Text"><text:span text:style-name="T4">tgt.addEventListener(</text:span></text:span><text:span text:style-name="Source_20_Text"><text:span text:style-name="T8">'touchmove'</text:span></text:span><text:span text:style-name="Source_20_Text"><text:span text:style-name="T4">, touchmove, </text:span></text:span><text:span text:style-name="Source_20_Text"><text:span text:style-name="T12">false</text:span></text:span><text:span text:style-name="Source_20_Text"><text:span text:style-name="T4">);</text:span></text:span></text:p>
              <text:p text:style-name="P3"><text:span text:style-name="Source_20_Text"><text:span text:style-name="T5"><text:s text:c="16"/></text:span></text:span><text:span text:style-name="Source_20_Text"><text:span text:style-name="T4">tgt.addEventListener(</text:span></text:span><text:span text:style-name="Source_20_Text"><text:span text:style-name="T8">'touchcancel'</text:span></text:span><text:span text:style-name="Source_20_Text"><text:span text:style-name="T4">, touchdone, </text:span></text:span><text:span text:style-name="Source_20_Text"><text:span text:style-name="T12">false</text:span></text:span><text:span text:style-name="Source_20_Text"><text:span text:style-name="T4">);</text:span></text:span></text:p>
              <text:p text:style-name="P3"><text:span text:style-name="Source_20_Text"><text:span text:style-name="T5"><text:s text:c="16"/></text:span></text:span><text:span text:style-name="Source_20_Text"><text:span text:style-name="T4">tgt.addEventListener(</text:span></text:span><text:span text:style-name="Source_20_Text"><text:span text:style-name="T8">'touchend'</text:span></text:span><text:span text:style-name="Source_20_Text"><text:span text:style-name="T4">, touchdone, </text:span></text:span><text:span text:style-name="Source_20_Text"><text:span text:style-name="T12">false</text:span></text:span><text:span text:style-name="Source_20_Text"><text:span text:style-name="T4">);</text:span></text:span></text:p>
              <text:p text:style-name="P3"><text:span text:style-name="Source_20_Text"><text:span text:style-name="T5"><text:s text:c="16"/></text:span></text:span><text:span text:style-name="Source_20_Text"><text:span text:style-name="T3">function</text:span></text:span><text:span text:style-name="Source_20_Text"><text:span text:style-name="T4"> </text:span></text:span><text:span text:style-name="Source_20_Text"><text:span text:style-name="T7">touchmove</text:span></text:span><text:span text:style-name="Source_20_Text"><text:span text:style-name="T4">(e) {</text:span></text:span></text:p>
              <text:p text:style-name="P3"><text:span text:style-name="Source_20_Text"><text:span text:style-name="T5"><text:s text:c="20"/></text:span></text:span><text:span text:style-name="Source_20_Text"><text:span text:style-name="T3">var</text:span></text:span><text:span text:style-name="Source_20_Text"><text:span text:style-name="T4"> p = [].filter.call(e.changedTouches, </text:span></text:span><text:span text:style-name="Source_20_Text"><text:span text:style-name="T3">function</text:span></text:span><text:span text:style-name="Source_20_Text"><text:span text:style-name="T4"> (p) { </text:span></text:span><text:span text:style-name="Source_20_Text"><text:span text:style-name="T3">return</text:span></text:span><text:span text:style-name="Source_20_Text"><text:span text:style-name="T4"> p.identifier === pid; })[</text:span></text:span><text:span text:style-name="Source_20_Text"><text:span text:style-name="T12">0</text:span></text:span><text:span text:style-name="Source_20_Text"><text:span text:style-name="T4">];</text:span></text:span></text:p>
              <text:p text:style-name="P3"><text:span text:style-name="Source_20_Text"><text:span text:style-name="T5"><text:s text:c="20"/></text:span></text:span><text:span text:style-name="Source_20_Text"><text:span text:style-name="T3">if</text:span></text:span><text:span text:style-name="Source_20_Text"><text:span text:style-name="T4"> (!p) </text:span></text:span><text:span text:style-name="Source_20_Text"><text:span text:style-name="T3">return</text:span></text:span><text:span text:style-name="Source_20_Text"><text:span text:style-name="T4">;</text:span></text:span></text:p>
              <text:p text:style-name="P4"><text:span text:style-name="Source_20_Text"><text:span text:style-name="T5"><text:s text:c="20"/></text:span></text:span><text:span text:style-name="Source_20_Text"><text:span text:style-name="T4">display(e,p);</text:span></text:span></text:p>
              <text:p text:style-name="P4"><text:span text:style-name="Source_20_Text"><text:span text:style-name="T5"><text:s text:c="20"/></text:span></text:span><text:span text:style-name="Source_20_Text"><text:span text:style-name="T4">pointer(pid,p);</text:span></text:span></text:p>
              <text:p text:style-name="P4"><text:span text:style-name="Source_20_Text"><text:span text:style-name="T5"><text:s text:c="16"/></text:span></text:span><text:span text:style-name="Source_20_Text"><text:span text:style-name="T4">}</text:span></text:span></text:p>
              <text:p text:style-name="P3"><text:span text:style-name="Source_20_Text"><text:span text:style-name="T5"><text:s text:c="16"/></text:span></text:span><text:span text:style-name="Source_20_Text"><text:span text:style-name="T3">function</text:span></text:span><text:span text:style-name="Source_20_Text"><text:span text:style-name="T4"> </text:span></text:span><text:span text:style-name="Source_20_Text"><text:span text:style-name="T7">touchdone</text:span></text:span><text:span text:style-name="Source_20_Text"><text:span text:style-name="T4">(e) {</text:span></text:span></text:p>
              <text:p text:style-name="P3"><text:span text:style-name="Source_20_Text"><text:span text:style-name="T5"><text:s text:c="20"/></text:span></text:span><text:span text:style-name="Source_20_Text"><text:span text:style-name="T3">var</text:span></text:span><text:span text:style-name="Source_20_Text"><text:span text:style-name="T4"> p = [].filter.call(e.changedTouches, </text:span></text:span><text:span text:style-name="Source_20_Text"><text:span text:style-name="T3">function</text:span></text:span><text:span text:style-name="Source_20_Text"><text:span text:style-name="T4"> (p) { </text:span></text:span><text:span text:style-name="Source_20_Text"><text:span text:style-name="T3">return</text:span></text:span><text:span text:style-name="Source_20_Text"><text:span text:style-name="T4"> p.identifier === pid; })[</text:span></text:span><text:span text:style-name="Source_20_Text"><text:span text:style-name="T12">0</text:span></text:span><text:span text:style-name="Source_20_Text"><text:span text:style-name="T4">];</text:span></text:span></text:p>
              <text:p text:style-name="P3"><text:span text:style-name="Source_20_Text"><text:span text:style-name="T5"><text:s text:c="20"/></text:span></text:span><text:span text:style-name="Source_20_Text"><text:span text:style-name="T3">if</text:span></text:span><text:span text:style-name="Source_20_Text"><text:span text:style-name="T4"> (!p) </text:span></text:span><text:span text:style-name="Source_20_Text"><text:span text:style-name="T3">return</text:span></text:span><text:span text:style-name="Source_20_Text"><text:span text:style-name="T4">;</text:span></text:span></text:p>
              <text:p text:style-name="P4"><text:span text:style-name="Source_20_Text"><text:span text:style-name="T5"><text:s text:c="20"/></text:span></text:span><text:span text:style-name="Source_20_Text"><text:span text:style-name="T4">display(e,p);</text:span></text:span></text:p>
              <text:p text:style-name="P3"><text:span text:style-name="Source_20_Text"><text:span text:style-name="T5"><text:s text:c="20"/></text:span></text:span><text:span text:style-name="Source_20_Text"><text:span text:style-name="T4">pointer(pid,</text:span></text:span><text:span text:style-name="Source_20_Text"><text:span text:style-name="T12">null</text:span></text:span><text:span text:style-name="Source_20_Text"><text:span text:style-name="T4">);</text:span></text:span></text:p>
              <text:p text:style-name="P3"><text:span text:style-name="Source_20_Text"><text:span text:style-name="T5"><text:s text:c="20"/></text:span></text:span><text:span text:style-name="Source_20_Text"><text:span text:style-name="T4">tgt.removeEventListener(</text:span></text:span><text:span text:style-name="Source_20_Text"><text:span text:style-name="T8">'touchmove'</text:span></text:span><text:span text:style-name="Source_20_Text"><text:span text:style-name="T4">, touchmove, </text:span></text:span><text:span text:style-name="Source_20_Text"><text:span text:style-name="T12">false</text:span></text:span><text:span text:style-name="Source_20_Text"><text:span text:style-name="T4">);</text:span></text:span></text:p>
              <text:p text:style-name="P3"><text:span text:style-name="Source_20_Text"><text:span text:style-name="T5"><text:s text:c="20"/></text:span></text:span><text:span text:style-name="Source_20_Text"><text:span text:style-name="T4">tgt.removeEventListener(</text:span></text:span><text:span text:style-name="Source_20_Text"><text:span text:style-name="T8">'touchcancel'</text:span></text:span><text:span text:style-name="Source_20_Text"><text:span text:style-name="T4">, touchdone, </text:span></text:span><text:span text:style-name="Source_20_Text"><text:span text:style-name="T12">false</text:span></text:span><text:span text:style-name="Source_20_Text"><text:span text:style-name="T4">);</text:span></text:span></text:p>
              <text:p text:style-name="P3"><text:span text:style-name="Source_20_Text"><text:span text:style-name="T5"><text:s text:c="20"/></text:span></text:span><text:span text:style-name="Source_20_Text"><text:span text:style-name="T4">tgt.removeEventListener(</text:span></text:span><text:span text:style-name="Source_20_Text"><text:span text:style-name="T8">'touchend'</text:span></text:span><text:span text:style-name="Source_20_Text"><text:span text:style-name="T4">, touchdone, </text:span></text:span><text:span text:style-name="Source_20_Text"><text:span text:style-name="T12">false</text:span></text:span><text:span text:style-name="Source_20_Text"><text:span text:style-name="T4">);</text:span></text:span></text:p>
              <text:p text:style-name="P4"><text:span text:style-name="Source_20_Text"><text:span text:style-name="T5"><text:s text:c="16"/></text:span></text:span><text:span text:style-name="Source_20_Text"><text:span text:style-name="T4">}</text:span></text:span></text:p>
              <text:p text:style-name="P4"><text:span text:style-name="Source_20_Text"><text:span text:style-name="T5"><text:s text:c="12"/></text:span></text:span><text:span text:style-name="Source_20_Text"><text:span text:style-name="T4">});</text:span></text:span></text:p>
              <text:p text:style-name="P3"><text:span text:style-name="Source_20_Text"><text:span text:style-name="T5"><text:s text:c="8"/></text:span></text:span><text:span text:style-name="Source_20_Text"><text:span text:style-name="T4">}, </text:span></text:span><text:span text:style-name="Source_20_Text"><text:span text:style-name="T12">false</text:span></text:span><text:span text:style-name="Source_20_Text"><text:span text:style-name="T4">);</text:span></text:span></text:p>
              <text:p text:style-name="P4"><text:span text:style-name="Source_20_Text"><text:span text:style-name="T5"><text:s text:c="8"/></text:span></text:span></text:p>
              <text:p text:style-name="P3"><text:span text:style-name="Source_20_Text"><text:span text:style-name="T5"><text:s text:c="8"/></text:span></text:span><text:span text:style-name="Source_20_Text"><text:span text:style-name="T3">function</text:span></text:span><text:span text:style-name="Source_20_Text"><text:span text:style-name="T4"> </text:span></text:span><text:span text:style-name="Source_20_Text"><text:span text:style-name="T7">justDisplay</text:span></text:span><text:span text:style-name="Source_20_Text"><text:span text:style-name="T4">(e) { display(e,e); }</text:span></text:span></text:p>
              <text:p text:style-name="P3"><text:span text:style-name="Source_20_Text"><text:span text:style-name="T5"><text:s text:c="8"/></text:span></text:span><text:span text:style-name="Source_20_Text"><text:span text:style-name="T4">ui.addEventListener(</text:span></text:span><text:span text:style-name="Source_20_Text"><text:span text:style-name="T8">'gesturestart'</text:span></text:span><text:span text:style-name="Source_20_Text"><text:span text:style-name="T4">, justDisplay,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4">ui.addEventListener(</text:span></text:span><text:span text:style-name="Source_20_Text"><text:span text:style-name="T8">'gestureend'</text:span></text:span><text:span text:style-name="Source_20_Text"><text:span text:style-name="T4">, justDisplay,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4">ui.addEventListener(</text:span></text:span><text:span text:style-name="Source_20_Text"><text:span text:style-name="T8">'MSPointerOver'</text:span></text:span><text:span text:style-name="Source_20_Text"><text:span text:style-name="T4">, justDisplay,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4">ui.addEventListener(</text:span></text:span><text:span text:style-name="Source_20_Text"><text:span text:style-name="T8">'MSPointerOut'</text:span></text:span><text:span text:style-name="Source_20_Text"><text:span text:style-name="T4">, justDisplay, </text:span></text:span><text:span text:style-name="Source_20_Text"><text:span text:style-name="T12">false</text:span></text:span><text:span text:style-name="Source_20_Text"><text:span text:style-name="T4">);</text:span></text:span></text:p>
              <text:p text:style-name="P3"><text:span text:style-name="Source_20_Text"><text:span text:style-name="T5"><text:s text:c="8"/></text:span></text:span><text:span text:style-name="Source_20_Text"><text:span text:style-name="T4">ui.addEventListener(</text:span></text:span><text:span text:style-name="Source_20_Text"><text:span text:style-name="T8">'click'</text:span></text:span><text:span text:style-name="Source_20_Text"><text:span text:style-name="T4">, justDisplay, </text:span></text:span><text:span text:style-name="Source_20_Text"><text:span text:style-name="T12">false</text:span></text:span><text:span text:style-name="Source_20_Text"><text:span text:style-name="T4">);</text:span></text:span></text:p>
              <text:p text:style-name="P3"><text:soft-page-break/><text:span text:style-name="Source_20_Text"><text:span text:style-name="T5"><text:s text:c="4"/></text:span></text:span><text:span text:style-name="Source_20_Text"><text:span text:style-name="T4">&lt;/</text:span></text:span><text:span text:style-name="Source_20_Text"><text:span text:style-name="T13">script</text:span></text:span><text:span text:style-name="Source_20_Text"><text:span text:style-name="T4">&gt;</text:span></text:span></text:p>
              <text:p text:style-name="P3"><text:span text:style-name="Source_20_Text"><text:span text:style-name="T4">&lt;/</text:span></text:span><text:span text:style-name="Source_20_Text"><text:span text:style-name="T13">body</text:span></text:span><text:span text:style-name="Source_20_Text"><text:span text:style-name="T4">&gt;</text:span></text:span></text:p>
              <text:p text:style-name="P3"><text:span text:style-name="Source_20_Text"><text:span text:style-name="T4">&lt;/</text:span></text:span><text:span text:style-name="Source_20_Text"><text:span text:style-name="T13">html</text:span></text:span><text:span text:style-name="Source_20_Text"><text:span text:style-name="T4">&gt;</text:span></text:span></text:p>
              <text:h text:style-name="P1" text:outline-level="3">Key Integration Improvements</text:h>
              <text:list text:style-name="L4">
                <text:list-item>
                  <text:p text:style-name="P15"><text:span text:style-name="T17">Structured Data (</text:span><text:span text:style-name="Source_20_Text"><text:span text:style-name="T1">JSON.stringify</text:span></text:span><text:span text:style-name="T17">)</text:span><text:span text:style-name="T16">: Instead of sending a raw string, coordinates are packed as a JSON object: </text:span><text:span text:style-name="Source_20_Text"><text:span text:style-name="T1">{"event":"mousemove","x":324,"y":198}</text:span></text:span><text:span text:style-name="T16">. This makes it trivial for your Python server to parse and process the data.</text:span></text:p>
                </text:list-item>
                <text:list-item>
                  <text:p text:style-name="P15"><text:span text:style-name="Source_20_Text"><text:span text:style-name="T1">isConnected</text:span></text:span><text:span text:style-name="T17"> Gate</text:span><text:span text:style-name="T16">: Added a safety check (</text:span><text:span text:style-name="Source_20_Text"><text:span text:style-name="T1">if (isConnected)</text:span></text:span><text:span text:style-name="T16">) before attempting </text:span><text:span text:style-name="Source_20_Text"><text:span text:style-name="T1">socket.send()</text:span></text:span><text:span text:style-name="T16">. If a user interacts with the UI before the WebSocket connects, it won't crash the script with an error.</text:span></text:p>
                </text:list-item>
                <text:list-item>
                  <text:p text:style-name="P15"><text:span text:style-name="T17">CSS </text:span><text:span text:style-name="Source_20_Text"><text:span text:style-name="T1">pointer-events: none</text:span></text:span><text:span text:style-name="T17"> Added</text:span><text:span text:style-name="T16">: Added this rule to </text:span><text:span text:style-name="Source_20_Text"><text:span text:style-name="T1">.point</text:span></text:span><text:span text:style-name="T16">. Without it, when moving the mouse quickly, the dynamic visual pointer element (</text:span><text:span text:style-name="Source_20_Text"><text:span text:style-name="T1">m</text:span></text:span><text:span text:style-name="T16"> or touch ID) could spawn directly under your mouse cursor, steal the interaction target, and stutter the tracking loop.</text:span></text:p>
                </text:list-item>
                <text:list-item>
                  <text:p text:style-name="P15"><text:span text:style-name="T17">Layout Merging</text:span><text:span text:style-name="T16">: Moved the tracking </text:span><text:span text:style-name="Source_20_Text"><text:span text:style-name="T1">#ui</text:span></text:span><text:span text:style-name="T16"> div into a absolute overlay layout and positioned the log nicely over it so it functions seamlessly.</text:span></text:p>
                </text:list-item>
              </text:list>
            </text:section>
            <text:p text:style-name="Table_20_Contents"/>
          </table:table-cell>
        </table:table-row>
      </table:table>
      <text:p text:style-name="Standard"/>
      <table:table table:name="Table7" table:style-name="Table7">
        <table:table-column table:style-name="Table7.A"/>
        <table:table-row>
          <table:table-cell table:style-name="Table7.A1" office:value-type="string">
            <text:p text:style-name="Table_20_Contents">server returns Hello, clientA.html. Browser not showing touch events. Server not showing touch events.</text:p>
          </table:table-cell>
        </table:table-row>
      </table:table>
      <text:p text:style-name="Standard"/>
      <table:table table:name="Table8" table:style-name="Table8">
        <table:table-column table:style-name="Table8.A"/>
        <table:table-row>
          <table:table-cell table:style-name="Table8.A1" office:value-type="string">
            <text:p text:style-name="P11"><text:span text:style-name="T16">The issue is happening because </text:span><text:span text:style-name="Source_20_Text"><text:span text:style-name="T1">serverA.py</text:span></text:span><text:span text:style-name="T17"> is serving the old HTML content</text:span><text:span text:style-name="T16"> instead of your new </text:span><text:span text:style-name="Source_20_Text"><text:span text:style-name="T1">client.html</text:span></text:span><text:span text:style-name="T16"> file when you load the page.</text:span></text:p>
            <text:section text:style-name="Sect1" text:name="model-response-message-contentr_54d0dfca7d2fd8ee">
              <text:p text:style-name="P11"><text:soft-page-break/><text:span text:style-name="T16">When you navigate to </text:span><text:span text:style-name="Source_20_Text"><text:span text:style-name="T1">http://localhost:8080/</text:span></text:span><text:span text:style-name="T16">, the server runs this code:</text:span></text:p>
              <text:p text:style-name="P26">Python</text:p>
              <text:p text:style-name="P3"><text:span text:style-name="Source_20_Text"><text:span text:style-name="T4">name = request.match_info.get(</text:span></text:span><text:span text:style-name="Source_20_Text"><text:span text:style-name="T8">'name'</text:span></text:span><text:span text:style-name="Source_20_Text"><text:span text:style-name="T4">, </text:span></text:span><text:span text:style-name="Source_20_Text"><text:span text:style-name="T8">"Anonymous"</text:span></text:span><text:span text:style-name="Source_20_Text"><text:span text:style-name="T4">)</text:span></text:span></text:p>
              <text:p text:style-name="P3"><text:span text:style-name="Source_20_Text"><text:span text:style-name="T4">text = </text:span></text:span><text:span text:style-name="Source_20_Text"><text:span text:style-name="T8">f"Hello, {name}"</text:span></text:span></text:p>
              <text:p text:style-name="P3"><text:span text:style-name="Source_20_Text"><text:span text:style-name="T3">return</text:span></text:span><text:span text:style-name="Source_20_Text"><text:span text:style-name="T4"> web.Response(text=text)</text:span></text:span></text:p>
              <text:p text:style-name="P11"><text:span text:style-name="T16">If you type </text:span><text:span text:style-name="Source_20_Text"><text:span text:style-name="T1">http://localhost:8080/client.html</text:span></text:span><text:span text:style-name="T16">, the server matches </text:span><text:span text:style-name="Source_20_Text"><text:span text:style-name="T1">{name}</text:span></text:span><text:span text:style-name="T16"> to </text:span><text:span text:style-name="Source_20_Text"><text:span text:style-name="T1">"client.html"</text:span></text:span><text:span text:style-name="T16"> and literally responds with the plain text: </text:span><text:span text:style-name="T17">"Hello, client.html"</text:span><text:span text:style-name="T16">. The browser never actually runs your HTML, CSS, or JavaScript tracking code, which is why neither the browser nor the server is showing any touch events.</text:span></text:p>
              <text:p text:style-name="P11"><text:span text:style-name="T16">To fix this, we need to update </text:span><text:span text:style-name="Source_20_Text"><text:span text:style-name="T1">serverA.py</text:span></text:span><text:span text:style-name="T16"> so that it reads your </text:span><text:span text:style-name="Source_20_Text"><text:span text:style-name="T1">client.html</text:span></text:span><text:span text:style-name="T16"> file from your disk and serves it properly to the browser.</text:span></text:p>
              <text:h text:style-name="P2" text:outline-level="3"><text:span text:style-name="T20">Step 1: Update </text:span><text:span text:style-name="Source_20_Text"><text:span text:style-name="T1">serverA.py</text:span></text:span></text:h>
              <text:p text:style-name="P11"><text:span text:style-name="T16">Replace your Python server code with the following snippet. It uses </text:span><text:span text:style-name="Source_20_Text"><text:span text:style-name="T1">web.FileResponse</text:span></text:span><text:span text:style-name="T16"> to send the actual HTML file to your browser, and uses </text:span><text:span text:style-name="Source_20_Text"><text:span text:style-name="T1">json.loads</text:span></text:span><text:span text:style-name="T16"> to print out the streamed coordinates from your touch tracker.</text:span></text:p>
              <text:p text:style-name="P26">Python</text:p>
              <text:p text:style-name="P3"><text:span text:style-name="Source_20_Text"><text:span text:style-name="T3">import</text:span></text:span><text:span text:style-name="Source_20_Text"><text:span text:style-name="T4"> json</text:span></text:span></text:p>
              <text:p text:style-name="P3"><text:span text:style-name="Source_20_Text"><text:span text:style-name="T3">import</text:span></text:span><text:span text:style-name="Source_20_Text"><text:span text:style-name="T4"> os</text:span></text:span></text:p>
              <text:p text:style-name="P3"><text:span text:style-name="Source_20_Text"><text:span text:style-name="T3">from</text:span></text:span><text:span text:style-name="Source_20_Text"><text:span text:style-name="T4"> aiohttp </text:span></text:span><text:span text:style-name="Source_20_Text"><text:span text:style-name="T3">import</text:span></text:span><text:span text:style-name="Source_20_Text"><text:span text:style-name="T4"> web</text:span></text:span></text:p>
              <text:p text:style-name="P4"/>
              <text:p text:style-name="P3"><text:span text:style-name="Source_20_Text"><text:span text:style-name="T6"># Serve the client.html file</text:span></text:span></text:p>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handle_index</text:span></text:span><text:span text:style-name="Source_20_Text"><text:span text:style-name="T4">(request):</text:span></text:span></text:p>
              <text:p text:style-name="P3"><text:span text:style-name="Source_20_Text"><text:span text:style-name="T5"><text:s text:c="4"/></text:span></text:span><text:span text:style-name="Source_20_Text"><text:span text:style-name="T6"># Assumes client.html is in the same folder as this script</text:span></text:span></text:p>
              <text:p text:style-name="P3"><text:span text:style-name="Source_20_Text"><text:span text:style-name="T5"><text:s text:c="4"/></text:span></text:span><text:span text:style-name="Source_20_Text"><text:span text:style-name="T3">if</text:span></text:span><text:span text:style-name="Source_20_Text"><text:span text:style-name="T4"> os.path.exists(</text:span></text:span><text:span text:style-name="Source_20_Text"><text:span text:style-name="T8">'client.html'</text:span></text:span><text:span text:style-name="Source_20_Text"><text:span text:style-name="T4">):</text:span></text:span></text:p>
              <text:p text:style-name="P3"><text:span text:style-name="Source_20_Text"><text:span text:style-name="T5"><text:s text:c="8"/></text:span></text:span><text:span text:style-name="Source_20_Text"><text:span text:style-name="T3">return</text:span></text:span><text:span text:style-name="Source_20_Text"><text:span text:style-name="T4"> web.FileResponse(</text:span></text:span><text:span text:style-name="Source_20_Text"><text:span text:style-name="T8">'client.html'</text:span></text:span><text:span text:style-name="Source_20_Text"><text:span text:style-name="T4">)</text:span></text:span></text:p>
              <text:p text:style-name="P3"><text:span text:style-name="Source_20_Text"><text:span text:style-name="T5"><text:s text:c="4"/></text:span></text:span><text:span text:style-name="Source_20_Text"><text:span text:style-name="T3">else</text:span></text:span><text:span text:style-name="Source_20_Text"><text:span text:style-name="T4">:</text:span></text:span></text:p>
              <text:p text:style-name="P3"><text:span text:style-name="Source_20_Text"><text:span text:style-name="T5"><text:s text:c="8"/></text:span></text:span><text:span text:style-name="Source_20_Text"><text:span text:style-name="T3">return</text:span></text:span><text:span text:style-name="Source_20_Text"><text:span text:style-name="T4"> web.Response(text=</text:span></text:span><text:span text:style-name="Source_20_Text"><text:span text:style-name="T8">"Error: client.html not found in this directory."</text:span></text:span><text:span text:style-name="Source_20_Text"><text:span text:style-name="T4">, status=</text:span></text:span><text:span text:style-name="Source_20_Text"><text:span text:style-name="T12">404</text:span></text:span><text:span text:style-name="Source_20_Text"><text:span text:style-name="T4">)</text:span></text:span></text:p>
              <text:p text:style-name="P4"/>
              <text:p text:style-name="P3"><text:span text:style-name="Source_20_Text"><text:span text:style-name="T6"># WebSocket handler to receive touch/mouse coordinates</text:span></text:span></text:p>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websocket_handler</text:span></text:span><text:span text:style-name="Source_20_Text"><text:span text:style-name="T4">(request):</text:span></text:span></text:p>
              <text:p text:style-name="P4"><text:span text:style-name="Source_20_Text"><text:span text:style-name="T5"><text:s text:c="4"/></text:span></text:span><text:span text:style-name="Source_20_Text"><text:span text:style-name="T4">ws = web.WebSocketResponse()</text:span></text:span></text:p>
              <text:p text:style-name="P3"><text:span text:style-name="Source_20_Text"><text:span text:style-name="T5"><text:s text:c="4"/></text:span></text:span><text:span text:style-name="Source_20_Text"><text:span text:style-name="T3">await</text:span></text:span><text:span text:style-name="Source_20_Text"><text:span text:style-name="T4"> ws.prepare(request)</text:span></text:span></text:p>
              <text:p text:style-name="P4"/>
              <text:p text:style-name="P3"><text:span text:style-name="Source_20_Text"><text:span text:style-name="T5"><text:s text:c="4"/></text:span></text:span><text:span text:style-name="Source_20_Text"><text:span text:style-name="T4">print(</text:span></text:span><text:span text:style-name="Source_20_Text"><text:span text:style-name="T8">"\n⚡ WebSocket connection established! Streaming incoming events...\n"</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3">async</text:span></text:span><text:span text:style-name="Source_20_Text"><text:span text:style-name="T4"> </text:span></text:span><text:span text:style-name="Source_20_Text"><text:span text:style-name="T3">for</text:span></text:span><text:span text:style-name="Source_20_Text"><text:span text:style-name="T4"> msg </text:span></text:span><text:span text:style-name="Source_20_Text"><text:span text:style-name="T3">in</text:span></text:span><text:span text:style-name="Source_20_Text"><text:span text:style-name="T4"> ws:</text:span></text:span></text:p>
              <text:p text:style-name="P3"><text:span text:style-name="Source_20_Text"><text:span text:style-name="T5"><text:s text:c="8"/></text:span></text:span><text:span text:style-name="Source_20_Text"><text:span text:style-name="T3">if</text:span></text:span><text:span text:style-name="Source_20_Text"><text:span text:style-name="T4"> msg.</text:span></text:span><text:span text:style-name="Source_20_Text"><text:span text:style-name="T9">type</text:span></text:span><text:span text:style-name="Source_20_Text"><text:span text:style-name="T4"> == web.WSMsgType.TEXT:</text:span></text:span></text:p>
              <text:p text:style-name="P3"><text:span text:style-name="Source_20_Text"><text:span text:style-name="T5"><text:s text:c="12"/></text:span></text:span><text:span text:style-name="Source_20_Text"><text:span text:style-name="T3">try</text:span></text:span><text:span text:style-name="Source_20_Text"><text:span text:style-name="T4">:</text:span></text:span></text:p>
              <text:p text:style-name="P3"><text:span text:style-name="Source_20_Text"><text:span text:style-name="T5"><text:s text:c="16"/></text:span></text:span><text:span text:style-name="Source_20_Text"><text:span text:style-name="T6"># Parse the incoming JSON coordinate data</text:span></text:span></text:p>
              <text:p text:style-name="P4"><text:span text:style-name="Source_20_Text"><text:span text:style-name="T5"><text:s text:c="16"/></text:span></text:span><text:span text:style-name="Source_20_Text"><text:span text:style-name="T4">data = json.loads(msg.data)</text:span></text:span></text:p>
              <text:p text:style-name="P3"><text:soft-page-break/><text:span text:style-name="Source_20_Text"><text:span text:style-name="T5"><text:s text:c="16"/></text:span></text:span><text:span text:style-name="Source_20_Text"><text:span text:style-name="T4">event_type = data.get(</text:span></text:span><text:span text:style-name="Source_20_Text"><text:span text:style-name="T8">'event'</text:span></text:span><text:span text:style-name="Source_20_Text"><text:span text:style-name="T4">)</text:span></text:span></text:p>
              <text:p text:style-name="P3"><text:span text:style-name="Source_20_Text"><text:span text:style-name="T5"><text:s text:c="16"/></text:span></text:span><text:span text:style-name="Source_20_Text"><text:span text:style-name="T4">x = data.get(</text:span></text:span><text:span text:style-name="Source_20_Text"><text:span text:style-name="T8">'x'</text:span></text:span><text:span text:style-name="Source_20_Text"><text:span text:style-name="T4">)</text:span></text:span></text:p>
              <text:p text:style-name="P3"><text:span text:style-name="Source_20_Text"><text:span text:style-name="T5"><text:s text:c="16"/></text:span></text:span><text:span text:style-name="Source_20_Text"><text:span text:style-name="T4">y = data.get(</text:span></text:span><text:span text:style-name="Source_20_Text"><text:span text:style-name="T8">'y'</text:span></text:span><text:span text:style-name="Source_20_Text"><text:span text:style-name="T4">)</text:span></text:span></text:p>
              <text:p text:style-name="P4"><text:span text:style-name="Source_20_Text"><text:span text:style-name="T5"><text:s text:c="16"/></text:span></text:span></text:p>
              <text:p text:style-name="P3"><text:span text:style-name="Source_20_Text"><text:span text:style-name="T5"><text:s text:c="16"/></text:span></text:span><text:span text:style-name="Source_20_Text"><text:span text:style-name="T6"># Print the coordinates cleanly in the server terminal</text:span></text:span></text:p>
              <text:p text:style-name="P3"><text:span text:style-name="Source_20_Text"><text:span text:style-name="T5"><text:s text:c="16"/></text:span></text:span><text:span text:style-name="Source_20_Text"><text:span text:style-name="T4">print(</text:span></text:span><text:span text:style-name="Source_20_Text"><text:span text:style-name="T8">f"[{event_type}] Target Position -&gt; X: {x}, Y: {y}"</text:span></text:span><text:span text:style-name="Source_20_Text"><text:span text:style-name="T4">)</text:span></text:span></text:p>
              <text:p text:style-name="P4"><text:span text:style-name="Source_20_Text"><text:span text:style-name="T5"><text:s text:c="16"/></text:span></text:span></text:p>
              <text:p text:style-name="P3"><text:span text:style-name="Source_20_Text"><text:span text:style-name="T5"><text:s text:c="12"/></text:span></text:span><text:span text:style-name="Source_20_Text"><text:span text:style-name="T3">except</text:span></text:span><text:span text:style-name="Source_20_Text"><text:span text:style-name="T4"> json.JSONDecodeError:</text:span></text:span></text:p>
              <text:p text:style-name="P3"><text:span text:style-name="Source_20_Text"><text:span text:style-name="T5"><text:s text:c="16"/></text:span></text:span><text:span text:style-name="Source_20_Text"><text:span text:style-name="T4">print(</text:span></text:span><text:span text:style-name="Source_20_Text"><text:span text:style-name="T8">f"Received raw text: {msg.data}"</text:span></text:span><text:span text:style-name="Source_20_Text"><text:span text:style-name="T4">)</text:span></text:span></text:p>
              <text:p text:style-name="P4"><text:span text:style-name="Source_20_Text"><text:span text:style-name="T5"><text:s text:c="16"/></text:span></text:span></text:p>
              <text:p text:style-name="P3"><text:span text:style-name="Source_20_Text"><text:span text:style-name="T5"><text:s text:c="8"/></text:span></text:span><text:span text:style-name="Source_20_Text"><text:span text:style-name="T3">elif</text:span></text:span><text:span text:style-name="Source_20_Text"><text:span text:style-name="T4"> msg.</text:span></text:span><text:span text:style-name="Source_20_Text"><text:span text:style-name="T9">type</text:span></text:span><text:span text:style-name="Source_20_Text"><text:span text:style-name="T4"> == web.WSMsgType.ERROR:</text:span></text:span></text:p>
              <text:p text:style-name="P3"><text:span text:style-name="Source_20_Text"><text:span text:style-name="T5"><text:s text:c="12"/></text:span></text:span><text:span text:style-name="Source_20_Text"><text:span text:style-name="T4">print(</text:span></text:span><text:span text:style-name="Source_20_Text"><text:span text:style-name="T8">f"WebSocket connection closed with exception {ws.exception()}"</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4">print(</text:span></text:span><text:span text:style-name="Source_20_Text"><text:span text:style-name="T8">"\n❌ WebSocket connection closed.\n"</text:span></text:span><text:span text:style-name="Source_20_Text"><text:span text:style-name="T4">)</text:span></text:span></text:p>
              <text:p text:style-name="P3"><text:span text:style-name="Source_20_Text"><text:span text:style-name="T5"><text:s text:c="4"/></text:span></text:span><text:span text:style-name="Source_20_Text"><text:span text:style-name="T3">return</text:span></text:span><text:span text:style-name="Source_20_Text"><text:span text:style-name="T4"> ws</text:span></text:span></text:p>
              <text:p text:style-name="P4"/>
              <text:p text:style-name="P3"><text:span text:style-name="Source_20_Text"><text:span text:style-name="T6"># Create the application and add routes</text:span></text:span></text:p>
              <text:p text:style-name="P4"><text:span text:style-name="Source_20_Text"><text:span text:style-name="T4">app = web.Application()</text:span></text:span></text:p>
              <text:p text:style-name="P4"><text:span text:style-name="Source_20_Text"><text:span text:style-name="T4">app.add_routes([</text:span></text:span></text:p>
              <text:p text:style-name="P3"><text:span text:style-name="Source_20_Text"><text:span text:style-name="T5"><text:s text:c="4"/></text:span></text:span><text:span text:style-name="Source_20_Text"><text:span text:style-name="T4">web.get(</text:span></text:span><text:span text:style-name="Source_20_Text"><text:span text:style-name="T8">'/'</text:span></text:span><text:span text:style-name="Source_20_Text"><text:span text:style-name="T4">, handle_index), <text:s text:c="8"/></text:span></text:span><text:span text:style-name="Source_20_Text"><text:span text:style-name="T6"># Main landing page serves client.html</text:span></text:span></text:p>
              <text:p text:style-name="P3"><text:span text:style-name="Source_20_Text"><text:span text:style-name="T5"><text:s text:c="4"/></text:span></text:span><text:span text:style-name="Source_20_Text"><text:span text:style-name="T4">web.get(</text:span></text:span><text:span text:style-name="Source_20_Text"><text:span text:style-name="T8">'/ws'</text:span></text:span><text:span text:style-name="Source_20_Text"><text:span text:style-name="T4">, websocket_handler), <text:s/></text:span></text:span><text:span text:style-name="Source_20_Text"><text:span text:style-name="T6"># WebSocket route</text:span></text:span></text:p>
              <text:p text:style-name="P4"><text:span text:style-name="Source_20_Text"><text:span text:style-name="T4">])</text:span></text:span></text:p>
              <text:p text:style-name="P4"/>
              <text:p text:style-name="P3"><text:span text:style-name="Source_20_Text"><text:span text:style-name="T3">if</text:span></text:span><text:span text:style-name="Source_20_Text"><text:span text:style-name="T4"> __name__ == </text:span></text:span><text:span text:style-name="Source_20_Text"><text:span text:style-name="T8">'__main__'</text:span></text:span><text:span text:style-name="Source_20_Text"><text:span text:style-name="T4">:</text:span></text:span></text:p>
              <text:p text:style-name="P3"><text:span text:style-name="Source_20_Text"><text:span text:style-name="T5"><text:s text:c="4"/></text:span></text:span><text:span text:style-name="Source_20_Text"><text:span text:style-name="T4">print(</text:span></text:span><text:span text:style-name="Source_20_Text"><text:span text:style-name="T8">"Starting server on http://localhost:8080"</text:span></text:span><text:span text:style-name="Source_20_Text"><text:span text:style-name="T4">)</text:span></text:span></text:p>
              <text:p text:style-name="P3"><text:span text:style-name="Source_20_Text"><text:span text:style-name="T5"><text:s text:c="4"/></text:span></text:span><text:span text:style-name="Source_20_Text"><text:span text:style-name="T4">web.run_app(app, port=</text:span></text:span><text:span text:style-name="Source_20_Text"><text:span text:style-name="T12">8080</text:span></text:span><text:span text:style-name="Source_20_Text"><text:span text:style-name="T4">)</text:span></text:span></text:p>
              <text:h text:style-name="P1" text:outline-level="3">Step 2: Ensure files are in the same folder</text:h>
              <text:p text:style-name="P29">Make sure both files are named correctly and sitting in the exact same directory:</text:p>
              <text:p text:style-name="P26">Plaintext</text:p>
              <text:p text:style-name="P3"><text:span text:style-name="Source_20_Text"><text:span text:style-name="T5">📂 </text:span></text:span><text:span text:style-name="Source_20_Text"><text:span text:style-name="T4">Your_Project_Folder/</text:span></text:span></text:p>
              <text:p text:style-name="P4"><text:span text:style-name="Source_20_Text"><text:span text:style-name="T5">├── </text:span></text:span><text:span text:style-name="Source_20_Text"><text:span text:style-name="T4">serverA.py</text:span></text:span></text:p>
              <text:p text:style-name="P4"><text:span text:style-name="Source_20_Text"><text:span text:style-name="T5">└── </text:span></text:span><text:span text:style-name="Source_20_Text"><text:span text:style-name="T4">client.html <text:s text:c="2"/>&lt;-- (The integrated touch/websocket HTML file from earlier)</text:span></text:span></text:p>
              <text:h text:style-name="P1" text:outline-level="3">Step 3: Run and Test</text:h>
              <text:list text:style-name="L5">
                <text:list-item>
                  <text:p text:style-name="P31">Run your Python server:</text:p>
                  <text:p text:style-name="P27">Bash</text:p>
                  <text:p text:style-name="P5"><text:span text:style-name="Source_20_Text"><text:span text:style-name="T4">python serverA.py</text:span></text:span></text:p>
                </text:list-item>
                <text:list-item>
                  <text:p text:style-name="P16"><text:span text:style-name="T16">Open your web browser and go to exactly: </text:span><text:span text:style-name="Source_20_Text"><text:span text:style-name="T1">http://localhost:8080</text:span></text:span></text:p>
                </text:list-item>
                <text:list-item>
                  <text:p text:style-name="P31">You will see the visual dotted tracking area. Click, drag, or touch inside it.</text:p>
                  <text:list>
                    <text:list-item>
                      <text:p text:style-name="P31"><text:span text:style-name="T22">In the browser:</text:span> You will see the local log fill up and numbers trailing your cursor.</text:p>
                    </text:list-item>
                    <text:list-item>
                      <text:p text:style-name="P31"><text:span text:style-name="T22">In the terminal:</text:span> Your Python console will instantly begin streaming text that looks like this:</text:p>
                      <text:p text:style-name="P27"><text:soft-page-break/>Plaintext</text:p>
                      <text:p text:style-name="P5"><text:span text:style-name="Source_20_Text"><text:span text:style-name="T4">[mousedown] Target Position -&gt; X: 245, Y: 180</text:span></text:span></text:p>
                      <text:p text:style-name="P6"><text:span text:style-name="Source_20_Text"><text:span text:style-name="T4">[mousemove] Target Position -&gt; X: 248, Y: 185</text:span></text:span></text:p>
                      <text:p text:style-name="P6"><text:span text:style-name="Source_20_Text"><text:span text:style-name="T4">[mousemove] Target Position -&gt; X: 254, Y: 190</text:span></text:span></text:p>
                    </text:list-item>
                  </text:list>
                </text:list-item>
              </text:list>
            </text:section>
            <text:p text:style-name="Table_20_Contents"/>
          </table:table-cell>
        </table:table-row>
      </table:table>
      <text:p text:style-name="Standard"/>
      <table:table table:name="Table9" table:style-name="Table9" table:template-name="Default Style">
        <table:table-column table:style-name="Table9.A"/>
        <table:table-row>
          <table:table-cell table:style-name="Table9.A1" office:value-type="string">
            <text:p text:style-name="P8">404: Not Found</text:p>
          </table:table-cell>
        </table:table-row>
      </table:table>
      <text:p text:style-name="Standard"/>
      <table:table table:name="Table10" table:style-name="Table10" table:template-name="Default Style">
        <table:table-column table:style-name="Table10.A"/>
        <table:table-row>
          <table:table-cell table:style-name="Table10.A1" office:value-type="string">
            <text:p text:style-name="P36">A <text:span text:style-name="T22">404: Not Found</text:span> error means the browser sent a request to the server, but the server couldn't find a matching route for that specific URL.</text:p>
            <text:section text:style-name="Sect1" text:name="model-response-message-contentr_2791e88b45ba4d9c">
              <text:p text:style-name="P11"><text:soft-page-break/><text:span text:style-name="T16">Since we just cleaned up the routes in </text:span><text:span text:style-name="Source_20_Text"><text:span text:style-name="T1">serverA.py</text:span></text:span><text:span text:style-name="T16">, this usually happens for one of two reasons:</text:span></text:p>
              <text:h text:style-name="P1" text:outline-level="3">1. You are typing the wrong URL in the browser</text:h>
              <text:p text:style-name="P11"><text:span text:style-name="T16">If you are typing </text:span><text:span text:style-name="Source_20_Text"><text:span text:style-name="T1">http://localhost:8080/client.html</text:span></text:span><text:span text:style-name="T16"> into your browser address bar, you will get a </text:span><text:span text:style-name="T17">404 Not Found</text:span><text:span text:style-name="T16">.</text:span></text:p>
              <text:p text:style-name="P29">Because of how our new routing table is configured, you must go exactly to the root URL:</text:p>
              <text:p text:style-name="P11"><text:span text:style-name="T15">👉 </text:span><text:span text:style-name="Source_20_Text"><text:span text:style-name="T1">http://localhost:8080/</text:span></text:span><text:span text:style-name="T16"> (or just </text:span><text:span text:style-name="Source_20_Text"><text:span text:style-name="T1">http://localhost:8080</text:span></text:span><text:span text:style-name="T16">)</text:span></text:p>
              <text:p text:style-name="P11"><text:span text:style-name="T16">The server is set up to automatically find and serve </text:span><text:span text:style-name="Source_20_Text"><text:span text:style-name="T1">client.html</text:span></text:span><text:span text:style-name="T16"> for you when you visit that root address.</text:span></text:p>
              <text:h text:style-name="P1" text:outline-level="3">2. The script isn't running the updated code</text:h>
              <text:p text:style-name="P11"><text:span text:style-name="T16">If you visited </text:span><text:span text:style-name="Source_20_Text"><text:span text:style-name="T1">http://localhost:8080/</text:span></text:span><text:span text:style-name="T16"> and still got a 404, the old server process might still be running stubbornly in the background of your terminal.</text:span></text:p>
              <text:p text:style-name="P29">Try completely restarting it:</text:p>
              <text:list text:style-name="L6">
                <text:list-item>
                  <text:p text:style-name="P32">Go to your terminal/command prompt.</text:p>
                </text:list-item>
                <text:list-item>
                  <text:p text:style-name="P17"><text:span text:style-name="T16">Press </text:span><text:span text:style-name="Source_20_Text"><text:span text:style-name="T1">Ctrl + C</text:span></text:span><text:span text:style-name="T16"> to kill the current server.</text:span></text:p>
                </text:list-item>
                <text:list-item>
                  <text:p text:style-name="P32">(Optional but recommended) Close the terminal window entirely and open a fresh one.</text:p>
                </text:list-item>
                <text:list-item>
                  <text:p text:style-name="P32">Navigate back to your folder and run it again:</text:p>
                  <text:p text:style-name="P28">Bash</text:p>
                  <text:p text:style-name="P7"><text:span text:style-name="Source_20_Text"><text:span text:style-name="T4">python serverA.py</text:span></text:span></text:p>
                </text:list-item>
                <text:list-item>
                  <text:p text:style-name="P17"><text:span text:style-name="T16">Refresh your browser at </text:span><text:span text:style-name="Source_20_Text"><text:span text:style-name="T1">http://localhost:8080/</text:span></text:span><text:span text:style-name="T16">.</text:span></text:p>
                </text:list-item>
              </text:list>
              <text:h text:style-name="P1" text:outline-level="3">Double-Check the Server Routes</text:h>
              <text:p text:style-name="P11"><text:span text:style-name="T16">Make sure the bottom of your </text:span><text:span text:style-name="Source_20_Text"><text:span text:style-name="T1">serverA.py</text:span></text:span><text:span text:style-name="T16"> file looks exactly like this. If there are any stray lines left over from the original version (like </text:span><text:span text:style-name="Source_20_Text"><text:span text:style-name="T1">web.get('/{name}', handle)</text:span></text:span><text:span text:style-name="T16">), they can interfere with the new routes:</text:span></text:p>
              <text:p text:style-name="P26">Python</text:p>
              <text:p text:style-name="P3"><text:span text:style-name="Source_20_Text"><text:span text:style-name="T6"># Create the application and add routes</text:span></text:span></text:p>
              <text:p text:style-name="P4"><text:span text:style-name="Source_20_Text"><text:span text:style-name="T4">app = web.Application()</text:span></text:span></text:p>
              <text:p text:style-name="P4"><text:span text:style-name="Source_20_Text"><text:span text:style-name="T4">app.add_routes([</text:span></text:span></text:p>
              <text:p text:style-name="P3"><text:span text:style-name="Source_20_Text"><text:span text:style-name="T5"><text:s text:c="4"/></text:span></text:span><text:span text:style-name="Source_20_Text"><text:span text:style-name="T4">web.get(</text:span></text:span><text:span text:style-name="Source_20_Text"><text:span text:style-name="T8">'/'</text:span></text:span><text:span text:style-name="Source_20_Text"><text:span text:style-name="T4">, handle_index), <text:s text:c="8"/></text:span></text:span><text:span text:style-name="Source_20_Text"><text:span text:style-name="T6"># This handles http://localhost:8080/</text:span></text:span></text:p>
              <text:p text:style-name="P3"><text:span text:style-name="Source_20_Text"><text:span text:style-name="T5"><text:s text:c="4"/></text:span></text:span><text:span text:style-name="Source_20_Text"><text:span text:style-name="T4">web.get(</text:span></text:span><text:span text:style-name="Source_20_Text"><text:span text:style-name="T8">'/ws'</text:span></text:span><text:span text:style-name="Source_20_Text"><text:span text:style-name="T4">, websocket_handler), <text:s/></text:span></text:span><text:span text:style-name="Source_20_Text"><text:span text:style-name="T6"># This handles ws://localhost:8080/ws</text:span></text:span></text:p>
              <text:p text:style-name="P4"><text:span text:style-name="Source_20_Text"><text:span text:style-name="T4">])</text:span></text:span></text:p>
              <text:p text:style-name="P4"/>
              <text:p text:style-name="P3"><text:span text:style-name="Source_20_Text"><text:span text:style-name="T3">if</text:span></text:span><text:span text:style-name="Source_20_Text"><text:span text:style-name="T4"> __name__ == </text:span></text:span><text:span text:style-name="Source_20_Text"><text:span text:style-name="T8">'__main__'</text:span></text:span><text:span text:style-name="Source_20_Text"><text:span text:style-name="T4">:</text:span></text:span></text:p>
              <text:p text:style-name="P3"><text:span text:style-name="Source_20_Text"><text:span text:style-name="T5"><text:s text:c="4"/></text:span></text:span><text:span text:style-name="Source_20_Text"><text:span text:style-name="T4">web.run_app(app, port=</text:span></text:span><text:span text:style-name="Source_20_Text"><text:span text:style-name="T12">8080</text:span></text:span><text:span text:style-name="Source_20_Text"><text:span text:style-name="T4">)</text:span></text:span></text:p>
            </text:section>
            <text:p text:style-name="P8"/>
          </table:table-cell>
        </table:table-row>
      </table:table>
      <text:p text:style-name="Standard"/>
      <table:table table:name="Table11" table:style-name="Table11" table:template-name="Default Style">
        <table:table-column table:style-name="Table11.A"/>
        <text:soft-page-break/>
        <table:table-row>
          <table:table-cell table:style-name="Table11.A1" office:value-type="string">
            <text:p text:style-name="P8">I want to use ip address instead of localhost</text:p>
          </table:table-cell>
        </table:table-row>
      </table:table>
      <text:p text:style-name="Standard"/>
      <table:table table:name="Table12" table:style-name="Table12" table:template-name="Default Style">
        <table:table-column table:style-name="Table12.A"/>
        <table:table-row>
          <table:table-cell table:style-name="Table12.A1" office:value-type="string">
            <text:p text:style-name="P37"><text:span text:style-name="T16">To use an IP address instead of </text:span><text:span text:style-name="Source_20_Text"><text:span text:style-name="T2">localhost</text:span></text:span><text:span text:style-name="T16">, you need to make changes in </text:span><text:span text:style-name="T17">both</text:span><text:span text:style-name="T16"> your Python server script and your HTML client script.</text:span></text:p>
            <text:section text:style-name="Sect1" text:name="model-response-message-contentr_d2342827c2366982">
              <text:p text:style-name="P11"><text:soft-page-break/><text:span text:style-name="T16">By default, when you run </text:span><text:span text:style-name="Source_20_Text"><text:span text:style-name="T1">aiohttp</text:span></text:span><text:span text:style-name="T16">, it often binds only to </text:span><text:span text:style-name="Source_20_Text"><text:span text:style-name="T1">localhost</text:span></text:span><text:span text:style-name="T16"> (</text:span><text:span text:style-name="Source_20_Text"><text:span text:style-name="T1">127.0.0.1</text:span></text:span><text:span text:style-name="T16">), which means it refuses connections coming from outside your local computer. We need to tell it to listen on all available network interfaces.</text:span></text:p>
              <text:p text:style-name="P29">Here is how to update both files:</text:p>
              <text:h text:style-name="P2" text:outline-level="3"><text:span text:style-name="T20">Step 1: Update </text:span><text:span text:style-name="Source_20_Text"><text:span text:style-name="T1">serverA.py</text:span></text:span></text:h>
              <text:p text:style-name="P11"><text:span text:style-name="T16">In your Python script, look at the very bottom line where you call </text:span><text:span text:style-name="Source_20_Text"><text:span text:style-name="T1">web.run_app()</text:span></text:span><text:span text:style-name="T16">. You need to change the </text:span><text:span text:style-name="Source_20_Text"><text:span text:style-name="T1">host</text:span></text:span><text:span text:style-name="T16"> parameter to </text:span><text:span text:style-name="Source_20_Text"><text:span text:style-name="T1">'0.0.0.0'</text:span></text:span><text:span text:style-name="T16">.</text:span></text:p>
              <text:p text:style-name="P11"><text:span text:style-name="T16">Setting the host to </text:span><text:span text:style-name="Source_20_Text"><text:span text:style-name="T1">0.0.0.0</text:span></text:span><text:span text:style-name="T16"> tells the server to listen on </text:span><text:span text:style-name="T17">every</text:span><text:span text:style-name="T16"> network interface your computer has (both your local machine loopback and your actual Wi-Fi/Ethernet IP address).</text:span></text:p>
              <text:p text:style-name="P29">Change the bottom of your code to this:</text:p>
              <text:p text:style-name="P26">Python</text:p>
              <text:p text:style-name="P3"><text:span text:style-name="Source_20_Text"><text:span text:style-name="T3">if</text:span></text:span><text:span text:style-name="Source_20_Text"><text:span text:style-name="T4"> __name__ == </text:span></text:span><text:span text:style-name="Source_20_Text"><text:span text:style-name="T8">'__main__'</text:span></text:span><text:span text:style-name="Source_20_Text"><text:span text:style-name="T4">:</text:span></text:span></text:p>
              <text:p text:style-name="P3"><text:span text:style-name="Source_20_Text"><text:span text:style-name="T5"><text:s text:c="4"/></text:span></text:span><text:span text:style-name="Source_20_Text"><text:span text:style-name="T4">print(</text:span></text:span><text:span text:style-name="Source_20_Text"><text:span text:style-name="T8">"Starting server on http://0.0.0.0:8080"</text:span></text:span><text:span text:style-name="Source_20_Text"><text:span text:style-name="T4">)</text:span></text:span></text:p>
              <text:p text:style-name="P3"><text:span text:style-name="Source_20_Text"><text:span text:style-name="T5"><text:s text:c="4"/></text:span></text:span><text:span text:style-name="Source_20_Text"><text:span text:style-name="T6"># Setting host to '0.0.0.0' opens the server to your local network</text:span></text:span></text:p>
              <text:p text:style-name="P3"><text:span text:style-name="Source_20_Text"><text:span text:style-name="T5"><text:s text:c="4"/></text:span></text:span><text:span text:style-name="Source_20_Text"><text:span text:style-name="T4">web.run_app(app, host=</text:span></text:span><text:span text:style-name="Source_20_Text"><text:span text:style-name="T8">'0.0.0.0'</text:span></text:span><text:span text:style-name="Source_20_Text"><text:span text:style-name="T4">, port=</text:span></text:span><text:span text:style-name="Source_20_Text"><text:span text:style-name="T12">8080</text:span></text:span><text:span text:style-name="Source_20_Text"><text:span text:style-name="T4">)</text:span></text:span></text:p>
              <text:h text:style-name="P1" text:outline-level="3">Step 2: Find Your Local IP Address</text:h>
              <text:p text:style-name="P11"><text:span text:style-name="T16">To connect from another device (like your phone or another laptop on the same Wi-Fi), you need your computer's actual local IP address (usually starts with </text:span><text:span text:style-name="Source_20_Text"><text:span text:style-name="T1">192.168.x.x</text:span></text:span><text:span text:style-name="T16"> or </text:span><text:span text:style-name="Source_20_Text"><text:span text:style-name="T1">10.x.x.x</text:span></text:span><text:span text:style-name="T16">).</text:span></text:p>
              <text:list text:style-name="L7">
                <text:list-item>
                  <text:p text:style-name="P18"><text:span text:style-name="T17">On Windows (Command Prompt):</text:span><text:span text:style-name="T16"> Type </text:span><text:span text:style-name="Source_20_Text"><text:span text:style-name="T1">ipconfig</text:span></text:span><text:span text:style-name="T16"> and look for </text:span><text:span text:style-name="T17">IPv4 Address</text:span><text:span text:style-name="T16">.</text:span></text:p>
                </text:list-item>
                <text:list-item>
                  <text:p text:style-name="P18"><text:span text:style-name="T17">On macOS / Linux (Terminal):</text:span><text:span text:style-name="T16"> Type </text:span><text:span text:style-name="Source_20_Text"><text:span text:style-name="T1">ifconfig</text:span></text:span><text:span text:style-name="T16"> or </text:span><text:span text:style-name="Source_20_Text"><text:span text:style-name="T1">ip a</text:span></text:span><text:span text:style-name="T16"> and look for </text:span><text:span text:style-name="Source_20_Text"><text:span text:style-name="T1">inet</text:span></text:span><text:span text:style-name="T16"> under your active Wi-Fi/Ethernet adapter.</text:span></text:p>
                </text:list-item>
              </text:list>
              <text:p text:style-name="P11"><text:span text:style-name="T18">(Let's pretend your IP address is </text:span><text:span text:style-name="Source_20_Text"><text:span text:style-name="T1">192.168.1.45</text:span></text:span><text:span text:style-name="T18"> for the next step).</text:span></text:p>
              <text:h text:style-name="P2" text:outline-level="3"><text:span text:style-name="T20">Step 3: Update </text:span><text:span text:style-name="Source_20_Text"><text:span text:style-name="T1">client.html</text:span></text:span></text:h>
              <text:p text:style-name="P11"><text:span text:style-name="T16">Open your </text:span><text:span text:style-name="Source_20_Text"><text:span text:style-name="T1">client.html</text:span></text:span><text:span text:style-name="T16"> file and update the WebSocket connection string. Replace </text:span><text:span text:style-name="Source_20_Text"><text:span text:style-name="T1">localhost</text:span></text:span><text:span text:style-name="T16"> with your computer's actual IP address.</text:span></text:p>
              <text:p text:style-name="P29">Change line 34 (or where your WebSocket is initialized) to:</text:p>
              <text:p text:style-name="P26">JavaScript</text:p>
              <text:p text:style-name="P3"><text:span text:style-name="Source_20_Text"><text:span text:style-name="T6">// Replace 192.168.1.45 with YOUR actual computer IP address</text:span></text:span></text:p>
              <text:p text:style-name="P3"><text:span text:style-name="Source_20_Text"><text:span text:style-name="T3">const</text:span></text:span><text:span text:style-name="Source_20_Text"><text:span text:style-name="T4"> socket = </text:span></text:span><text:span text:style-name="Source_20_Text"><text:span text:style-name="T3">new</text:span></text:span><text:span text:style-name="Source_20_Text"><text:span text:style-name="T4"> WebSocket(</text:span></text:span><text:span text:style-name="Source_20_Text"><text:span text:style-name="T8">"ws://192.168.1.45:8080/ws"</text:span></text:span><text:span text:style-name="Source_20_Text"><text:span text:style-name="T4">);</text:span></text:span></text:p>
              <text:h text:style-name="P1" text:outline-level="3">Step 4: Run and Test</text:h>
              <text:list text:style-name="L8">
                <text:list-item>
                  <text:p text:style-name="P19"><text:span text:style-name="T16">Restart your Python server (</text:span><text:span text:style-name="Source_20_Text"><text:span text:style-name="T1">python serverA.py</text:span></text:span><text:span text:style-name="T16">).</text:span></text:p>
                </text:list-item>
                <text:list-item>
                  <text:p text:style-name="P33">Now, any device connected to the <text:span text:style-name="T22">same Wi-Fi network</text:span> can access your app.</text:p>
                </text:list-item>
                <text:list-item>
                  <text:p text:style-name="P33">On your phone or other device, open the browser and type your IP address into the URL bar:</text:p>
                  <text:p text:style-name="P19"><text:soft-page-break/><text:span text:style-name="T15">👉 </text:span><text:span text:style-name="Source_20_Text"><text:span text:style-name="T1">http://192.168.1.45:8080</text:span></text:span></text:p>
                </text:list-item>
              </text:list>
              <text:p text:style-name="P29">The touch tracker will load on your mobile browser, and you will instantly see your mobile touch events streaming directly into the Python terminal on your computer!</text:p>
            </text:section>
            <text:p text:style-name="P8"/>
          </table:table-cell>
        </table:table-row>
      </table:table>
      <text:p text:style-name="Standard"/>
      <table:table table:name="Table13" table:style-name="Table13" table:template-name="Default Style">
        <table:table-column table:style-name="Table13.A"/>
        <table:table-row>
          <table:table-cell table:style-name="Table13.A1" office:value-type="string">
            <text:p text:style-name="P8">works on the local machine. does not work on a networked machine.</text:p>
          </table:table-cell>
        </table:table-row>
      </table:table>
      <text:p text:style-name="Standard"/>
      <table:table table:name="Table14" table:style-name="Table14" table:template-name="Default Style">
        <table:table-column table:style-name="Table14.A"/>
        <table:table-row>
          <table:table-cell table:style-name="Table14.A1" office:value-type="string">
            <text:p text:style-name="P36">If it works locally but fails on a networked machine, your server is running fine, but something in the network environment is blocking the traffic.</text:p>
            <text:section text:style-name="Sect1" text:name="model-response-message-contentr_63bc4e13c0fd3600">
              <text:p text:style-name="P29"><text:soft-page-break/>Here is a quick checklist to troubleshoot and fix the issue:</text:p>
              <text:h text:style-name="P1" text:outline-level="3">1. Check Your Windows / macOS Firewall (Most Common)</text:h>
              <text:p text:style-name="P11"><text:span text:style-name="T16">Your computer's built-in firewall will often block incoming traffic on unknown ports (like </text:span><text:span text:style-name="Source_20_Text"><text:span text:style-name="T1">8080</text:span></text:span><text:span text:style-name="T16">) from other devices on the network.</text:span></text:p>
              <text:list text:style-name="L9">
                <text:list-item>
                  <text:p text:style-name="P35">On Windows:</text:p>
                  <text:list>
                    <text:list-item>
                      <text:p text:style-name="P34">Open the Start menu, type <text:span text:style-name="T22">Windows Defender Firewall</text:span>, and open it.</text:p>
                    </text:list-item>
                    <text:list-item>
                      <text:p text:style-name="P34">Click <text:span text:style-name="T22">Allow an app or feature through Windows Defender Firewall</text:span> on the left.</text:p>
                    </text:list-item>
                    <text:list-item>
                      <text:p text:style-name="P20"><text:span text:style-name="T16">Look for </text:span><text:span text:style-name="Source_20_Text"><text:span text:style-name="T1">python</text:span></text:span><text:span text:style-name="T16"> or </text:span><text:span text:style-name="Source_20_Text"><text:span text:style-name="T1">Python logo</text:span></text:span><text:span text:style-name="T16"> in the list.</text:span></text:p>
                    </text:list-item>
                    <text:list-item>
                      <text:p text:style-name="P34">Make sure both <text:span text:style-name="T22">Private</text:span> and <text:span text:style-name="T22">Public</text:span> checkboxes are ticked.</text:p>
                    </text:list-item>
                    <text:list-item>
                      <text:p text:style-name="P20"><text:span text:style-name="T18">Alternative quick test:</text:span><text:span text:style-name="T16"> Temporarily disable your firewall completely to see if the network machine can connect. If it works, you know you just need to add an inbound rule for port </text:span><text:span text:style-name="Source_20_Text"><text:span text:style-name="T1">8080</text:span></text:span><text:span text:style-name="T16">.</text:span></text:p>
                    </text:list-item>
                  </text:list>
                </text:list-item>
                <text:list-item>
                  <text:p text:style-name="P35">On macOS:</text:p>
                  <text:list>
                    <text:list-item text:start-value="1">
                      <text:p text:style-name="P34">Go to <text:span text:style-name="T22">System Settings &gt; Network &gt; Firewall</text:span>.</text:p>
                    </text:list-item>
                    <text:list-item>
                      <text:p text:style-name="P34">Ensure it is either turned off for testing, or that your terminal/Python binary is allowed to accept incoming connections.</text:p>
                    </text:list-item>
                  </text:list>
                </text:list-item>
              </text:list>
              <text:h text:style-name="P1" text:outline-level="3">2. Verify Both Devices Are on the <text:span text:style-name="T14">Exact</text:span> Same Network</text:h>
              <text:p text:style-name="P29">The network machine and your server machine must be on the same local subnet.</text:p>
              <text:list text:style-name="L10">
                <text:list-item>
                  <text:p text:style-name="P21"><text:span text:style-name="T16">Check your Wi-Fi names. If your router has a </text:span><text:span text:style-name="Source_20_Text"><text:span text:style-name="T1">MyNetwork</text:span></text:span><text:span text:style-name="T16"> and a </text:span><text:span text:style-name="Source_20_Text"><text:span text:style-name="T1">MyNetwork_5G</text:span></text:span><text:span text:style-name="T16">, or a </text:span><text:span text:style-name="T17">Guest Network</text:span><text:span text:style-name="T16">, devices on different ones often cannot talk to each other due to "Access Point (AP) Isolation."</text:span></text:p>
                </text:list-item>
                <text:list-item>
                  <text:p text:style-name="P21"><text:span text:style-name="T16">Make sure both devices have IP addresses that look similar (e.g., Server is </text:span><text:span text:style-name="Source_20_Text"><text:span text:style-name="T1">192.168.1.45</text:span></text:span><text:span text:style-name="T16"> and the networked machine is </text:span><text:span text:style-name="Source_20_Text"><text:span text:style-name="T1">192.168.1.X</text:span></text:span><text:span text:style-name="T16">).</text:span></text:p>
                </text:list-item>
              </text:list>
              <text:h text:style-name="P2" text:outline-level="3"><text:span text:style-name="T20">3. Did You Hardcode the IP in </text:span><text:span text:style-name="Source_20_Text"><text:span text:style-name="T1">client.html</text:span></text:span><text:span text:style-name="T20">?</text:span></text:h>
              <text:p text:style-name="P11"><text:span text:style-name="T16">Because </text:span><text:span text:style-name="Source_20_Text"><text:span text:style-name="T1">client.html</text:span></text:span><text:span text:style-name="T16"> is being served </text:span><text:span text:style-name="T18">by</text:span><text:span text:style-name="T16"> the server, the networked machine downloads it and runs the JavaScript locally. If your JavaScript still says </text:span><text:span text:style-name="Source_20_Text"><text:span text:style-name="T1">localhost</text:span></text:span><text:span text:style-name="T16">, the networked machine will try to look for a WebSocket server on </text:span><text:span text:style-name="T18">itself</text:span><text:span text:style-name="T16">, not your server.</text:span></text:p>
              <text:p text:style-name="P11"><text:span text:style-name="T16">Ensure your </text:span><text:span text:style-name="Source_20_Text"><text:span text:style-name="T1">client.html</text:span></text:span><text:span text:style-name="T16"> WebSocket line uses the server's actual IP, </text:span><text:span text:style-name="T17">not</text:span><text:span text:style-name="T16"> localhost:</text:span></text:p>
              <text:p text:style-name="P26">JavaScript</text:p>
              <text:p text:style-name="P3"><text:span text:style-name="Source_20_Text"><text:span text:style-name="T6">// This MUST be the IP of the computer running serverA.py</text:span></text:span></text:p>
              <text:p text:style-name="P3"><text:span text:style-name="Source_20_Text"><text:span text:style-name="T3">const</text:span></text:span><text:span text:style-name="Source_20_Text"><text:span text:style-name="T4"> socket = </text:span></text:span><text:span text:style-name="Source_20_Text"><text:span text:style-name="T3">new</text:span></text:span><text:span text:style-name="Source_20_Text"><text:span text:style-name="T4"> WebSocket(</text:span></text:span><text:span text:style-name="Source_20_Text"><text:span text:style-name="T8">"ws://192.168.1.45:8080/ws"</text:span></text:span><text:span text:style-name="Source_20_Text"><text:span text:style-name="T4">); </text:span></text:span></text:p>
              <text:h text:style-name="P1" text:outline-level="3">4. Making it Dynamic (The Ultimate Fix)</text:h>
              <text:p text:style-name="P11"><text:span text:style-name="T16">Instead of hardcoding your IP address into </text:span><text:span text:style-name="Source_20_Text"><text:span text:style-name="T1">client.html</text:span></text:span><text:span text:style-name="T16"> (which breaks every time your router assigns you a new IP), you can tell JavaScript to automatically use whatever IP address was used to load the webpage.</text:span></text:p>
              <text:p text:style-name="P11"><text:soft-page-break/><text:span text:style-name="T16">Update the WebSocket initialization in your </text:span><text:span text:style-name="Source_20_Text"><text:span text:style-name="T1">client.html</text:span></text:span><text:span text:style-name="T16"> to this dynamic snippet:</text:span></text:p>
              <text:p text:style-name="P26">JavaScript</text:p>
              <text:p text:style-name="P3"><text:span text:style-name="Source_20_Text"><text:span text:style-name="T6">// Automatically detects the server's IP and uses it for the WebSocket connection</text:span></text:span></text:p>
              <text:p text:style-name="P3"><text:span text:style-name="Source_20_Text"><text:span text:style-name="T3">const</text:span></text:span><text:span text:style-name="Source_20_Text"><text:span text:style-name="T4"> targetIP = </text:span></text:span><text:span text:style-name="Source_20_Text"><text:span text:style-name="T9">window</text:span></text:span><text:span text:style-name="Source_20_Text"><text:span text:style-name="T4">.location.hostname;</text:span></text:span></text:p>
              <text:p text:style-name="P3"><text:span text:style-name="Source_20_Text"><text:span text:style-name="T3">const</text:span></text:span><text:span text:style-name="Source_20_Text"><text:span text:style-name="T4"> socket = </text:span></text:span><text:span text:style-name="Source_20_Text"><text:span text:style-name="T3">new</text:span></text:span><text:span text:style-name="Source_20_Text"><text:span text:style-name="T4"> WebSocket(</text:span></text:span><text:span text:style-name="Source_20_Text"><text:span text:style-name="T8">`ws://${targetIP}:8080/ws`</text:span></text:span><text:span text:style-name="Source_20_Text"><text:span text:style-name="T4">);</text:span></text:span></text:p>
              <text:p text:style-name="P11"><text:span text:style-name="T16">With this tweak, whether you access it via </text:span><text:span text:style-name="Source_20_Text"><text:span text:style-name="T1">localhost:8080</text:span></text:span><text:span text:style-name="T16"> or </text:span><text:span text:style-name="Source_20_Text"><text:span text:style-name="T1">192.168.1.45:8080</text:span></text:span><text:span text:style-name="T16">, the WebSocket will automatically target the correct machine. Try restarting your Python server after making this adjustment!</text:span></text:p>
            </text:section>
            <text:p text:style-name="P8"/>
          </table:table-cell>
        </table:table-row>
      </table:table>
      <text:p text:style-name="Standard"/>
      <table:table table:name="Table15" table:style-name="Table15" table:template-name="Default Style">
        <table:table-column table:style-name="Table15.A"/>
        <table:table-row>
          <table:table-cell table:style-name="Table15.A1" office:value-type="string">
            <text:p text:style-name="P8">If it works locally but fails on a networked machine, your server is running fine, but something in the network environment is blocking the traffic.</text:p>
            <text:p text:style-name="P8"/>
            <text:p text:style-name="P8">Here is a quick checklist to troubleshoot and fix the issue:</text:p>
            <text:p text:style-name="P8"/>
            <text:p text:style-name="P8">### 1. Check Your Windows / macOS Firewall (Most Common)</text:p>
            <text:p text:style-name="P8"/>
            <text:p text:style-name="P8">Your computer's built-in firewall will often block incoming traffic on unknown ports (like `8080`) from other devices on the network.</text:p>
            <text:p text:style-name="P8"/>
            <text:p text:style-name="P8">* **On Windows:**</text:p>
            <text:p text:style-name="P8">1. Open the Start menu, type **Windows Defender Firewall**, and open it.</text:p>
            <text:p text:style-name="P8">2. Click **Allow an app or feature through Windows Defender Firewall** on the left.</text:p>
            <text:p text:style-name="P8">3. Look for `python` or `Python logo` in the list.</text:p>
            <text:p text:style-name="P8">4. Make sure both **Private** and **Public** checkboxes are ticked.</text:p>
            <text:p text:style-name="P8"/>
            <text:p text:style-name="P8"/>
            <text:p text:style-name="P8">* *Alternative quick test:* Temporarily disable your firewall completely to see if the network machine can connect. If it works, you know you just need to add an inbound rule for port `8080`.</text:p>
            <text:p text:style-name="P8"/>
            <text:p text:style-name="P8"/>
            <text:p text:style-name="P8">* **On macOS:**</text:p>
            <text:p text:style-name="P8">1. Go to **System Settings &gt; Network &gt; Firewall**.</text:p>
            <text:p text:style-name="P8">2. Ensure it is either turned off for testing, or that your terminal/Python binary is allowed to accept incoming connections.</text:p>
            <text:p text:style-name="P8"/>
            <text:p text:style-name="P8"/>
            <text:p text:style-name="P8"/>
            <text:p text:style-name="P8">---</text:p>
            <text:p text:style-name="P8"/>
            <text:p text:style-name="P8">### 2. Verify Both Devices Are on the *Exact* Same Network</text:p>
            <text:p text:style-name="P8"/>
            <text:p text:style-name="P8">The network machine and your server machine must be on the same local subnet.</text:p>
            <text:p text:style-name="P8"/>
            <text:p text:style-name="P8">* Check your Wi-Fi names. If your router has a `MyNetwork` and a `MyNetwork_5G`, or a **Guest Network**, devices on different ones often cannot talk to each other due to "Access Point (AP) Isolation."</text:p>
            <text:p text:style-name="P8"><text:soft-page-break/>* Make sure both devices have IP addresses that look similar (e.g., Server is `192.168.1.45` and the networked machine is `192.168.1.X`).</text:p>
            <text:p text:style-name="P8"/>
            <text:p text:style-name="P8">---</text:p>
            <text:p text:style-name="P8"/>
            <text:p text:style-name="P8">### 3. Did You Hardcode the IP in `client.html`?</text:p>
            <text:p text:style-name="P8"/>
            <text:p text:style-name="P8">Because `client.html` is being served *by* the server, the networked machine downloads it and runs the JavaScript locally. If your JavaScript still says `localhost`, the networked machine will try to look for a WebSocket server on *itself*, not your server.</text:p>
            <text:p text:style-name="P8"/>
            <text:p text:style-name="P8">Ensure your `client.html` WebSocket line uses the server's actual IP, **not** localhost:</text:p>
            <text:p text:style-name="P8"/>
            <text:p text:style-name="P8">```javascript</text:p>
            <text:p text:style-name="P8">// This MUST be the IP of the computer running serverA.py</text:p>
            <text:p text:style-name="P8">const socket = new WebSocket("ws://192.168.1.45:8080/ws"); </text:p>
            <text:p text:style-name="P8"/>
            <text:p text:style-name="P8">```</text:p>
            <text:p text:style-name="P8"/>
            <text:p text:style-name="P8">---</text:p>
            <text:p text:style-name="P8"/>
            <text:p text:style-name="P8">### 4. Making it Dynamic (The Ultimate Fix)</text:p>
            <text:p text:style-name="P8"/>
            <text:p text:style-name="P8">Instead of hardcoding your IP address into `client.html` (which breaks every time your router assigns you a new IP), you can tell JavaScript to automatically use whatever IP address was used to load the webpage.</text:p>
            <text:p text:style-name="P8"/>
            <text:p text:style-name="P8">Update the WebSocket initialization in your `client.html` to this dynamic snippet:</text:p>
            <text:p text:style-name="P8"/>
            <text:p text:style-name="P8">```javascript</text:p>
            <text:p text:style-name="P8">// Automatically detects the server's IP and uses it for the WebSocket connection</text:p>
            <text:p text:style-name="P8">const targetIP = window.location.hostname;</text:p>
            <text:p text:style-name="P8">const socket = new WebSocket(`ws://${targetIP}:8080/ws`);</text:p>
            <text:p text:style-name="P8"/>
            <text:p text:style-name="P8">```</text:p>
            <text:p text:style-name="P8"/>
            <text:p text:style-name="P8">With this tweak, whether you access it via `localhost:8080` or `192.168.1.45:8080`, the WebSocket will automatically target the correct machine. Try restarting your Python server after making this adjustment!</text:p>
          </table:table-cell>
        </table:table-row>
      </table:table>
      <text:p text:style-name="Standard"/>
      <table:table table:name="Table16" table:style-name="Table16" table:template-name="Default Style">
        <table:table-column table:style-name="Table16.A"/>
        <table:table-row>
          <table:table-cell table:style-name="Table16.A1" office:value-type="string">
            <text:p text:style-name="P37"><text:span text:style-name="T16">If you are still hitting a </text:span><text:span text:style-name="T17">404: Not Found</text:span><text:span text:style-name="T16"> error after updating your HTML file, it means the Python server (</text:span><text:span text:style-name="Source_20_Text"><text:span text:style-name="T2">serverA.py</text:span></text:span><text:span text:style-name="T16">) is running, but it cannot find the file or the route you are requesting.</text:span></text:p>
            <text:section text:style-name="Sect1" text:name="model-response-message-contentr_49e433c77c0379b4">
              <text:p text:style-name="P11"><text:soft-page-break/><text:span text:style-name="T16">Let's double-check how your </text:span><text:span text:style-name="Source_20_Text"><text:span text:style-name="T1">serverA.py</text:span></text:span><text:span text:style-name="T16"> file is handling things. The server looks for a file explicitly named </text:span><text:span text:style-name="Source_20_Text"><text:span text:style-name="T1">client.html</text:span></text:span><text:span text:style-name="T16"> in your code, but you just uploaded it as </text:span><text:span text:style-name="Source_20_Text"><text:span text:style-name="T1">clientA.html</text:span></text:span><text:span text:style-name="T16">.</text:span></text:p>
              <text:p text:style-name="P11"><text:span text:style-name="T16">If the filename on your computer is </text:span><text:span text:style-name="Source_20_Text"><text:span text:style-name="T1">clientA.html</text:span></text:span><text:span text:style-name="T16">, the Python script won't find it and might throw a 404 (or a 500/404 depending on how your operating system handles missing file responses).</text:span></text:p>
              <text:p text:style-name="P29">Here is the exact setup to get you past this error:</text:p>
              <text:h text:style-name="P2" text:outline-level="3"><text:span text:style-name="T20">1. Match the Filename in </text:span><text:span text:style-name="Source_20_Text"><text:span text:style-name="T1">serverA.py</text:span></text:span></text:h>
              <text:p text:style-name="P11"><text:span text:style-name="T16">Open your </text:span><text:span text:style-name="Source_20_Text"><text:span text:style-name="T1">serverA.py</text:span></text:span><text:span text:style-name="T16"> file and look at the </text:span><text:span text:style-name="Source_20_Text"><text:span text:style-name="T1">handle_index</text:span></text:span><text:span text:style-name="T16"> function. Update it so it explicitly looks for </text:span><text:span text:style-name="Source_20_Text"><text:span text:style-name="T1">clientA.html</text:span></text:span><text:span text:style-name="T16"> to match your exact file:</text:span></text:p>
              <text:p text:style-name="P26">Python</text:p>
              <text:p text:style-name="P3"><text:span text:style-name="Source_20_Text"><text:span text:style-name="T3">import</text:span></text:span><text:span text:style-name="Source_20_Text"><text:span text:style-name="T4"> os</text:span></text:span></text:p>
              <text:p text:style-name="P3"><text:span text:style-name="Source_20_Text"><text:span text:style-name="T3">from</text:span></text:span><text:span text:style-name="Source_20_Text"><text:span text:style-name="T4"> aiohttp </text:span></text:span><text:span text:style-name="Source_20_Text"><text:span text:style-name="T3">import</text:span></text:span><text:span text:style-name="Source_20_Text"><text:span text:style-name="T4"> web</text:span></text:span></text:p>
              <text:p text:style-name="P4"/>
              <text:p text:style-name="P3"><text:span text:style-name="Source_20_Text"><text:span text:style-name="T6"># Serve the clientA.html file</text:span></text:span></text:p>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handle_index</text:span></text:span><text:span text:style-name="Source_20_Text"><text:span text:style-name="T4">(request):</text:span></text:span></text:p>
              <text:p text:style-name="P3"><text:span text:style-name="Source_20_Text"><text:span text:style-name="T5"><text:s text:c="4"/></text:span></text:span><text:span text:style-name="Source_20_Text"><text:span text:style-name="T6"># Change 'client.html' to 'clientA.html' to match your actual file</text:span></text:span></text:p>
              <text:p text:style-name="P3"><text:span text:style-name="Source_20_Text"><text:span text:style-name="T5"><text:s text:c="4"/></text:span></text:span><text:span text:style-name="Source_20_Text"><text:span text:style-name="T3">if</text:span></text:span><text:span text:style-name="Source_20_Text"><text:span text:style-name="T4"> os.path.exists(</text:span></text:span><text:span text:style-name="Source_20_Text"><text:span text:style-name="T8">'clientA.html'</text:span></text:span><text:span text:style-name="Source_20_Text"><text:span text:style-name="T4">):</text:span></text:span></text:p>
              <text:p text:style-name="P3"><text:span text:style-name="Source_20_Text"><text:span text:style-name="T5"><text:s text:c="8"/></text:span></text:span><text:span text:style-name="Source_20_Text"><text:span text:style-name="T3">return</text:span></text:span><text:span text:style-name="Source_20_Text"><text:span text:style-name="T4"> web.FileResponse(</text:span></text:span><text:span text:style-name="Source_20_Text"><text:span text:style-name="T8">'clientA.html'</text:span></text:span><text:span text:style-name="Source_20_Text"><text:span text:style-name="T4">)</text:span></text:span></text:p>
              <text:p text:style-name="P3"><text:span text:style-name="Source_20_Text"><text:span text:style-name="T5"><text:s text:c="4"/></text:span></text:span><text:span text:style-name="Source_20_Text"><text:span text:style-name="T3">else</text:span></text:span><text:span text:style-name="Source_20_Text"><text:span text:style-name="T4">:</text:span></text:span></text:p>
              <text:p text:style-name="P3"><text:span text:style-name="Source_20_Text"><text:span text:style-name="T5"><text:s text:c="8"/></text:span></text:span><text:span text:style-name="Source_20_Text"><text:span text:style-name="T3">return</text:span></text:span><text:span text:style-name="Source_20_Text"><text:span text:style-name="T4"> web.Response(text=</text:span></text:span><text:span text:style-name="Source_20_Text"><text:span text:style-name="T8">"Error: clientA.html not found in this directory."</text:span></text:span><text:span text:style-name="Source_20_Text"><text:span text:style-name="T4">, status=</text:span></text:span><text:span text:style-name="Source_20_Text"><text:span text:style-name="T12">404</text:span></text:span><text:span text:style-name="Source_20_Text"><text:span text:style-name="T4">)</text:span></text:span></text:p>
              <text:h text:style-name="P1" text:outline-level="3">2. Verify Your Router Configuration</text:h>
              <text:p text:style-name="P11"><text:span text:style-name="T16">Make sure the routing table at the bottom of </text:span><text:span text:style-name="Source_20_Text"><text:span text:style-name="T1">serverA.py</text:span></text:span><text:span text:style-name="T16"> looks </text:span><text:span text:style-name="T18">exactly</text:span><text:span text:style-name="T16"> like this, with </text:span><text:span text:style-name="T17">no other routes</text:span><text:span text:style-name="T16"> left over from your old script:</text:span></text:p>
              <text:p text:style-name="P26">Python</text:p>
              <text:p text:style-name="P3"><text:span text:style-name="Source_20_Text"><text:span text:style-name="T6"># Create the application and add routes</text:span></text:span></text:p>
              <text:p text:style-name="P4"><text:span text:style-name="Source_20_Text"><text:span text:style-name="T4">app = web.Application()</text:span></text:span></text:p>
              <text:p text:style-name="P4"><text:span text:style-name="Source_20_Text"><text:span text:style-name="T4">app.add_routes([</text:span></text:span></text:p>
              <text:p text:style-name="P3"><text:span text:style-name="Source_20_Text"><text:span text:style-name="T5"><text:s text:c="4"/></text:span></text:span><text:span text:style-name="Source_20_Text"><text:span text:style-name="T4">web.get(</text:span></text:span><text:span text:style-name="Source_20_Text"><text:span text:style-name="T8">'/'</text:span></text:span><text:span text:style-name="Source_20_Text"><text:span text:style-name="T4">, handle_index), <text:s text:c="8"/></text:span></text:span><text:span text:style-name="Source_20_Text"><text:span text:style-name="T6"># This handles http://&lt;IP-ADDRESS&gt;:8080/</text:span></text:span></text:p>
              <text:p text:style-name="P3"><text:span text:style-name="Source_20_Text"><text:span text:style-name="T5"><text:s text:c="4"/></text:span></text:span><text:span text:style-name="Source_20_Text"><text:span text:style-name="T4">web.get(</text:span></text:span><text:span text:style-name="Source_20_Text"><text:span text:style-name="T8">'/ws'</text:span></text:span><text:span text:style-name="Source_20_Text"><text:span text:style-name="T4">, websocket_handler), <text:s/></text:span></text:span><text:span text:style-name="Source_20_Text"><text:span text:style-name="T6"># This handles ws://&lt;IP-ADDRESS&gt;:8080/ws</text:span></text:span></text:p>
              <text:p text:style-name="P4"><text:span text:style-name="Source_20_Text"><text:span text:style-name="T4">])</text:span></text:span></text:p>
              <text:p text:style-name="P4"/>
              <text:p text:style-name="P3"><text:span text:style-name="Source_20_Text"><text:span text:style-name="T3">if</text:span></text:span><text:span text:style-name="Source_20_Text"><text:span text:style-name="T4"> __name__ == </text:span></text:span><text:span text:style-name="Source_20_Text"><text:span text:style-name="T8">'__main__'</text:span></text:span><text:span text:style-name="Source_20_Text"><text:span text:style-name="T4">:</text:span></text:span></text:p>
              <text:p text:style-name="P3"><text:span text:style-name="Source_20_Text"><text:span text:style-name="T5"><text:s text:c="4"/></text:span></text:span><text:span text:style-name="Source_20_Text"><text:span text:style-name="T4">print(</text:span></text:span><text:span text:style-name="Source_20_Text"><text:span text:style-name="T8">"Starting server on http://0.0.0.0:8080"</text:span></text:span><text:span text:style-name="Source_20_Text"><text:span text:style-name="T4">)</text:span></text:span></text:p>
              <text:p text:style-name="P3"><text:span text:style-name="Source_20_Text"><text:span text:style-name="T5"><text:s text:c="4"/></text:span></text:span><text:span text:style-name="Source_20_Text"><text:span text:style-name="T4">web.run_app(app, host=</text:span></text:span><text:span text:style-name="Source_20_Text"><text:span text:style-name="T8">'0.0.0.0'</text:span></text:span><text:span text:style-name="Source_20_Text"><text:span text:style-name="T4">, port=</text:span></text:span><text:span text:style-name="Source_20_Text"><text:span text:style-name="T12">8080</text:span></text:span><text:span text:style-name="Source_20_Text"><text:span text:style-name="T4">)</text:span></text:span></text:p>
              <text:h text:style-name="P1" text:outline-level="3">3. How to Access It (The URL)</text:h>
              <text:p text:style-name="P11"><text:span text:style-name="T16">Once you save the Python file, restart your server in the terminal (</text:span><text:span text:style-name="Source_20_Text"><text:span text:style-name="T1">Ctrl + C</text:span></text:span><text:span text:style-name="T16">, then </text:span><text:span text:style-name="Source_20_Text"><text:span text:style-name="T1">python serverA.py</text:span></text:span><text:span text:style-name="T16">).</text:span></text:p>
              <text:p text:style-name="P29">When you type the address into your browser on the local machine or the networked <text:soft-page-break/>machine, <text:span text:style-name="T22">do not type the file name in the URL</text:span>.</text:p>
              <text:list text:style-name="L11">
                <text:list-item>
                  <text:p text:style-name="P22"><text:span text:style-name="T17">Incorrect:</text:span><text:span text:style-name="T16"> </text:span><text:span text:style-name="Source_20_Text"><text:span text:style-name="T1">http://192.168.12.121:8080/clientA.html</text:span></text:span><text:span text:style-name="T16"> ❌ (This triggers a 404 because the server doesn't have a route named </text:span><text:span text:style-name="Source_20_Text"><text:span text:style-name="T1">/clientA.html</text:span></text:span><text:span text:style-name="T16">)</text:span></text:p>
                </text:list-item>
                <text:list-item>
                  <text:p text:style-name="P22"><text:span text:style-name="T17">Correct:</text:span><text:span text:style-name="T16"> </text:span><text:span text:style-name="Source_20_Text"><text:span text:style-name="T1">http://192.168.12.121:8080/</text:span></text:span><text:span text:style-name="T16"> or </text:span><text:span text:style-name="Source_20_Text"><text:span text:style-name="T1">http://192.168.12.121:8080</text:span></text:span><text:span text:style-name="T16"> (The </text:span><text:span text:style-name="Source_20_Text"><text:span text:style-name="T1">/</text:span></text:span><text:span text:style-name="T16"> route tells the server to fetch and display the </text:span><text:span text:style-name="Source_20_Text"><text:span text:style-name="T1">clientA.html</text:span></text:span><text:span text:style-name="T16"> file automatically).</text:span></text:p>
                </text:list-item>
              </text:list>
            </text:section>
            <text:p text:style-name="P8"/>
          </table:table-cell>
        </table:table-row>
      </table:table>
      <text:p text:style-name="Standard"/>
      <table:table table:name="Table17" table:style-name="Table17" table:template-name="Default Style">
        <table:table-column table:style-name="Table17.A"/>
        <table:table-row>
          <table:table-cell table:style-name="Table17.A1" office:value-type="string">
            <text:p text:style-name="P37"><text:span text:style-name="T16">Looking at your </text:span><text:span text:style-name="Source_20_Text"><text:span text:style-name="T2">serverC.py</text:span></text:span><text:span text:style-name="T16">, the core reason you are still hitting a </text:span><text:span text:style-name="T17">404: Not Found</text:span><text:span text:style-name="T16"> error is a mismatch between the filename on your hard drive (</text:span><text:span text:style-name="Source_20_Text"><text:span text:style-name="T2">clientA.html</text:span></text:span><text:span text:style-name="T16">) and the filename the server is looking for (</text:span><text:span text:style-name="Source_20_Text"><text:span text:style-name="T2">client.html</text:span></text:span><text:span text:style-name="T16">).</text:span></text:p>
            <text:section text:style-name="Sect1" text:name="model-response-message-contentr_e7bd1af3e94ff194">
              <text:p text:style-name="P11"><text:soft-page-break/><text:span text:style-name="T16">When you visit </text:span><text:span text:style-name="Source_20_Text"><text:span text:style-name="T1">http://&lt;IP_ADDRESS&gt;:8080/</text:span></text:span><text:span text:style-name="T16">, </text:span><text:span text:style-name="Source_20_Text"><text:span text:style-name="T1">serverC.py</text:span></text:span><text:span text:style-name="T16"> executes this block:</text:span></text:p>
              <text:p text:style-name="P26">Python</text:p>
              <text:p text:style-name="P3"><text:span text:style-name="Source_20_Text"><text:span text:style-name="T3">if</text:span></text:span><text:span text:style-name="Source_20_Text"><text:span text:style-name="T4"> os.path.exists(</text:span></text:span><text:span text:style-name="Source_20_Text"><text:span text:style-name="T8">'client.html'</text:span></text:span><text:span text:style-name="Source_20_Text"><text:span text:style-name="T4">):</text:span></text:span></text:p>
              <text:p text:style-name="P3"><text:span text:style-name="Source_20_Text"><text:span text:style-name="T5"><text:s text:c="4"/></text:span></text:span><text:span text:style-name="Source_20_Text"><text:span text:style-name="T3">return</text:span></text:span><text:span text:style-name="Source_20_Text"><text:span text:style-name="T4"> web.FileResponse(</text:span></text:span><text:span text:style-name="Source_20_Text"><text:span text:style-name="T8">'client.html'</text:span></text:span><text:span text:style-name="Source_20_Text"><text:span text:style-name="T4">)</text:span></text:span></text:p>
              <text:p text:style-name="P3"><text:span text:style-name="Source_20_Text"><text:span text:style-name="T3">else</text:span></text:span><text:span text:style-name="Source_20_Text"><text:span text:style-name="T4">:</text:span></text:span></text:p>
              <text:p text:style-name="P3"><text:span text:style-name="Source_20_Text"><text:span text:style-name="T5"><text:s text:c="4"/></text:span></text:span><text:span text:style-name="Source_20_Text"><text:span text:style-name="T3">return</text:span></text:span><text:span text:style-name="Source_20_Text"><text:span text:style-name="T4"> web.Response(text=</text:span></text:span><text:span text:style-name="Source_20_Text"><text:span text:style-name="T8">"Error: client.html not found in this directory."</text:span></text:span><text:span text:style-name="Source_20_Text"><text:span text:style-name="T4">, status=</text:span></text:span><text:span text:style-name="Source_20_Text"><text:span text:style-name="T12">404</text:span></text:span><text:span text:style-name="Source_20_Text"><text:span text:style-name="T4">)</text:span></text:span></text:p>
              <text:p text:style-name="P11"><text:span text:style-name="T16">Because your file is named </text:span><text:span text:style-name="Source_20_Text"><text:span text:style-name="T1">clientA.html</text:span></text:span><text:span text:style-name="T16">, </text:span><text:span text:style-name="Source_20_Text"><text:span text:style-name="T1">os.path.exists('client.html')</text:span></text:span><text:span text:style-name="T16"> evaluates to </text:span><text:span text:style-name="T17">False</text:span><text:span text:style-name="T16">, causing the server to return a </text:span><text:span text:style-name="Source_20_Text"><text:span text:style-name="T1">404</text:span></text:span><text:span text:style-name="T16"> error code.</text:span></text:p>
              <text:p text:style-name="P29">Here is how to fix it depending on whether you want to rename your file or update your code.</text:p>
              <text:h text:style-name="P1" text:outline-level="3">Option 1: The Quickest Fix (Rename the file)</text:h>
              <text:p text:style-name="P11"><text:span text:style-name="T16">The easiest solution is to leave your python code exactly as it is in </text:span><text:span text:style-name="Source_20_Text"><text:span text:style-name="T1">serverC.py</text:span></text:span><text:span text:style-name="T16">, but rename your HTML file on your computer:</text:span></text:p>
              <text:list text:style-name="L12">
                <text:list-item>
                  <text:p text:style-name="P23"><text:span text:style-name="T16">Change the name from </text:span><text:span text:style-name="Source_20_Text"><text:span text:style-name="T1">clientA.html</text:span></text:span><text:span text:style-name="T16"> to </text:span><text:span text:style-name="Source_20_Text"><text:span text:style-name="T1">client.html</text:span></text:span><text:span text:style-name="T16">.</text:span></text:p>
                </text:list-item>
              </text:list>
              <text:p text:style-name="P11"><text:span text:style-name="T16">Once renamed, restart </text:span><text:span text:style-name="Source_20_Text"><text:span text:style-name="T1">serverC.py</text:span></text:span><text:span text:style-name="T16"> and refresh your browser at </text:span><text:span text:style-name="Source_20_Text"><text:span text:style-name="T1">http://&lt;IP_ADDRESS&gt;:8080/</text:span></text:span><text:span text:style-name="T16">.</text:span></text:p>
              <text:h text:style-name="P2" text:outline-level="3"><text:span text:style-name="T20">Option 2: Update </text:span><text:span text:style-name="Source_20_Text"><text:span text:style-name="T1">serverC.py</text:span></text:span><text:span text:style-name="T20"> to match </text:span><text:span text:style-name="Source_20_Text"><text:span text:style-name="T1">clientA.html</text:span></text:span></text:h>
              <text:p text:style-name="P11"><text:span text:style-name="T16">If you prefer to keep the file named </text:span><text:span text:style-name="Source_20_Text"><text:span text:style-name="T1">clientA.html</text:span></text:span><text:span text:style-name="T16">, update the </text:span><text:span text:style-name="Source_20_Text"><text:span text:style-name="T1">handle_index</text:span></text:span><text:span text:style-name="T16"> function inside your </text:span><text:span text:style-name="Source_20_Text"><text:span text:style-name="T1">serverC.py</text:span></text:span><text:span text:style-name="T16"> file to point to it explicitly:</text:span></text:p>
              <text:p text:style-name="P26">Python</text:p>
              <text:p text:style-name="P3"><text:span text:style-name="Source_20_Text"><text:span text:style-name="T6"># Serve the clientA.html file</text:span></text:span></text:p>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handle_index</text:span></text:span><text:span text:style-name="Source_20_Text"><text:span text:style-name="T4">(request):</text:span></text:span></text:p>
              <text:p text:style-name="P3"><text:span text:style-name="Source_20_Text"><text:span text:style-name="T5"><text:s text:c="4"/></text:span></text:span><text:span text:style-name="Source_20_Text"><text:span text:style-name="T6"># Updated from 'client.html' to 'clientA.html'</text:span></text:span></text:p>
              <text:p text:style-name="P3"><text:span text:style-name="Source_20_Text"><text:span text:style-name="T5"><text:s text:c="4"/></text:span></text:span><text:span text:style-name="Source_20_Text"><text:span text:style-name="T3">if</text:span></text:span><text:span text:style-name="Source_20_Text"><text:span text:style-name="T4"> os.path.exists(</text:span></text:span><text:span text:style-name="Source_20_Text"><text:span text:style-name="T8">'clientA.html'</text:span></text:span><text:span text:style-name="Source_20_Text"><text:span text:style-name="T4">):</text:span></text:span></text:p>
              <text:p text:style-name="P3"><text:span text:style-name="Source_20_Text"><text:span text:style-name="T5"><text:s text:c="8"/></text:span></text:span><text:span text:style-name="Source_20_Text"><text:span text:style-name="T3">return</text:span></text:span><text:span text:style-name="Source_20_Text"><text:span text:style-name="T4"> web.FileResponse(</text:span></text:span><text:span text:style-name="Source_20_Text"><text:span text:style-name="T8">'clientA.html'</text:span></text:span><text:span text:style-name="Source_20_Text"><text:span text:style-name="T4">)</text:span></text:span></text:p>
              <text:p text:style-name="P3"><text:span text:style-name="Source_20_Text"><text:span text:style-name="T5"><text:s text:c="4"/></text:span></text:span><text:span text:style-name="Source_20_Text"><text:span text:style-name="T3">else</text:span></text:span><text:span text:style-name="Source_20_Text"><text:span text:style-name="T4">:</text:span></text:span></text:p>
              <text:p text:style-name="P3"><text:span text:style-name="Source_20_Text"><text:span text:style-name="T5"><text:s text:c="8"/></text:span></text:span><text:span text:style-name="Source_20_Text"><text:span text:style-name="T3">return</text:span></text:span><text:span text:style-name="Source_20_Text"><text:span text:style-name="T4"> web.Response(text=</text:span></text:span><text:span text:style-name="Source_20_Text"><text:span text:style-name="T8">"Error: clientA.html not found in this directory."</text:span></text:span><text:span text:style-name="Source_20_Text"><text:span text:style-name="T4">, status=</text:span></text:span><text:span text:style-name="Source_20_Text"><text:span text:style-name="T12">404</text:span></text:span><text:span text:style-name="Source_20_Text"><text:span text:style-name="T4">)</text:span></text:span></text:p>
              <text:h text:style-name="P1" text:outline-level="3">Crucial Reminder on URLs</text:h>
              <text:p text:style-name="P29">When accessing the app from your local machine or a networked machine, <text:span text:style-name="T22">do not type the filename in the address bar</text:span>.</text:p>
              <text:list text:style-name="L13">
                <text:list-item>
                  <text:p text:style-name="P24"><text:span text:style-name="T21">❌ </text:span><text:span text:style-name="T17">Do not use:</text:span><text:span text:style-name="T16"> </text:span><text:span text:style-name="Source_20_Text"><text:span text:style-name="T1">http://192.168.12.121:8080/clientA.html</text:span></text:span><text:span text:style-name="T16"> (This will always return a 404 because </text:span><text:span text:style-name="Source_20_Text"><text:span text:style-name="T1">aiohttp</text:span></text:span><text:span text:style-name="T16"> treats everything after the </text:span><text:span text:style-name="Source_20_Text"><text:span text:style-name="T1">/</text:span></text:span><text:span text:style-name="T16"> as a literal path route, and we only have </text:span><text:span text:style-name="Source_20_Text"><text:span text:style-name="T1">/</text:span></text:span><text:span text:style-name="T16"> and </text:span><text:span text:style-name="Source_20_Text"><text:span text:style-name="T1">/ws</text:span></text:span><text:span text:style-name="T16"> defined).</text:span></text:p>
                </text:list-item>
                <text:list-item>
                  <text:p text:style-name="P24"><text:span text:style-name="T17">text_fields_only:</text:span><text:span text:style-name="T16"> </text:span><text:span text:style-name="Source_20_Text"><text:span text:style-name="T1">http://192.168.12.121:8080/</text:span></text:span><text:span text:style-name="T16"> (The root path tells the python script to look for your HTML file on disk and send it to the browser automatically).</text:span></text:p>
                </text:list-item>
              </text:list>
            </text:section>
            <text:p text:style-name="P8"/>
          </table:table-cell>
        </table:table-row>
      </table:table>
      <text:p text:style-name="Standard"/>
      <table:table table:name="Table18" table:style-name="Table18" table:template-name="Default Style">
        <table:table-column table:style-name="Table18.A"/>
        <table:table-row>
          <table:table-cell table:style-name="Table18.A1" office:value-type="string">
            <text:p text:style-name="P8">The attached is using key board events. I would like to merge this file with serverC.py. Also replacing <text:soft-page-break/>the keyboard arrow keys with touch events.</text:p>
          </table:table-cell>
        </table:table-row>
      </table:table>
      <text:p text:style-name="Standard"/>
      <table:table table:name="Table19" table:style-name="Table19" table:template-name="Default Style">
        <table:table-column table:style-name="Table19.A"/>
        <table:table-row>
          <table:table-cell table:style-name="Table19.A1" office:value-type="string">
            <text:p text:style-name="P37"><text:span text:style-name="T16">To merge your </text:span><text:span text:style-name="Source_20_Text"><text:span text:style-name="T2">breakout.py</text:span></text:span><text:span text:style-name="T16"> game with </text:span><text:span text:style-name="Source_20_Text"><text:span text:style-name="T2">serverC.py</text:span></text:span><text:span text:style-name="T16"> and replace the keyboard arrow keys with the incoming touch events, we need to adapt the game to handle an asynchronous server loop.</text:span></text:p>
            <text:section text:style-name="Sect1" text:name="model-response-message-contentr_ac15e35100537fb4">
              <text:p text:style-name="P11"><text:soft-page-break/><text:span text:style-name="T16">Because Pygame runs on a blocking </text:span><text:span text:style-name="Source_20_Text"><text:span text:style-name="T1">while True</text:span></text:span><text:span text:style-name="T16"> loop and </text:span><text:span text:style-name="Source_20_Text"><text:span text:style-name="T1">aiohttp</text:span></text:span><text:span text:style-name="T16"> runs on an asynchronous event loop, running them together requires integrating Pygame into an </text:span><text:span text:style-name="Source_20_Text"><text:span text:style-name="T1">asyncio</text:span></text:span><text:span text:style-name="T16"> routine. Additionally, we will map the incoming touch </text:span><text:span text:style-name="T19">$X$</text:span><text:span text:style-name="T16"> coordinate to directly control the paddle's center position.</text:span></text:p>
              <text:p text:style-name="P11"><text:span text:style-name="T16">Here is the fully merged and modified </text:span><text:span text:style-name="Source_20_Text"><text:span text:style-name="T1">server_breakout.py</text:span></text:span><text:span text:style-name="T16"> script:</text:span></text:p>
              <text:p text:style-name="P26">Python</text:p>
              <text:p text:style-name="P3"><text:span text:style-name="Source_20_Text"><text:span text:style-name="T3">import</text:span></text:span><text:span text:style-name="Source_20_Text"><text:span text:style-name="T4"> asyncio</text:span></text:span></text:p>
              <text:p text:style-name="P3"><text:span text:style-name="Source_20_Text"><text:span text:style-name="T3">import</text:span></text:span><text:span text:style-name="Source_20_Text"><text:span text:style-name="T4"> json</text:span></text:span></text:p>
              <text:p text:style-name="P3"><text:span text:style-name="Source_20_Text"><text:span text:style-name="T3">import</text:span></text:span><text:span text:style-name="Source_20_Text"><text:span text:style-name="T4"> os</text:span></text:span></text:p>
              <text:p text:style-name="P3"><text:span text:style-name="Source_20_Text"><text:span text:style-name="T3">import</text:span></text:span><text:span text:style-name="Source_20_Text"><text:span text:style-name="T4"> sys</text:span></text:span></text:p>
              <text:p text:style-name="P3"><text:span text:style-name="Source_20_Text"><text:span text:style-name="T3">from</text:span></text:span><text:span text:style-name="Source_20_Text"><text:span text:style-name="T4"> dataclasses </text:span></text:span><text:span text:style-name="Source_20_Text"><text:span text:style-name="T3">import</text:span></text:span><text:span text:style-name="Source_20_Text"><text:span text:style-name="T4"> dataclass</text:span></text:span></text:p>
              <text:p text:style-name="P3"><text:span text:style-name="Source_20_Text"><text:span text:style-name="T3">from</text:span></text:span><text:span text:style-name="Source_20_Text"><text:span text:style-name="T4"> typing </text:span></text:span><text:span text:style-name="Source_20_Text"><text:span text:style-name="T3">import</text:span></text:span><text:span text:style-name="Source_20_Text"><text:span text:style-name="T4"> List</text:span></text:span></text:p>
              <text:p text:style-name="P3"><text:span text:style-name="Source_20_Text"><text:span text:style-name="T3">import</text:span></text:span><text:span text:style-name="Source_20_Text"><text:span text:style-name="T4"> pygame</text:span></text:span></text:p>
              <text:p text:style-name="P3"><text:span text:style-name="Source_20_Text"><text:span text:style-name="T3">from</text:span></text:span><text:span text:style-name="Source_20_Text"><text:span text:style-name="T4"> aiohttp </text:span></text:span><text:span text:style-name="Source_20_Text"><text:span text:style-name="T3">import</text:span></text:span><text:span text:style-name="Source_20_Text"><text:span text:style-name="T4"> web</text:span></text:span></text:p>
              <text:p text:style-name="P4"/>
              <text:p text:style-name="P3"><text:span text:style-name="Source_20_Text"><text:span text:style-name="T6"># ============================================================</text:span></text:span></text:p>
              <text:p text:style-name="P3"><text:span text:style-name="Source_20_Text"><text:span text:style-name="T6"># GAME SETTINGS / CONSTANTS</text:span></text:span></text:p>
              <text:p text:style-name="P3"><text:span text:style-name="Source_20_Text"><text:span text:style-name="T6"># ============================================================</text:span></text:span></text:p>
              <text:p text:style-name="P3"><text:span text:style-name="Source_20_Text"><text:span text:style-name="T4">SCREEN_WIDTH = </text:span></text:span><text:span text:style-name="Source_20_Text"><text:span text:style-name="T12">800</text:span></text:span></text:p>
              <text:p text:style-name="P3"><text:span text:style-name="Source_20_Text"><text:span text:style-name="T4">SCREEN_HEIGHT = </text:span></text:span><text:span text:style-name="Source_20_Text"><text:span text:style-name="T12">600</text:span></text:span></text:p>
              <text:p text:style-name="P3"><text:span text:style-name="Source_20_Text"><text:span text:style-name="T4">FPS = </text:span></text:span><text:span text:style-name="Source_20_Text"><text:span text:style-name="T12">60</text:span></text:span></text:p>
              <text:p text:style-name="P4"/>
              <text:p text:style-name="P3"><text:span text:style-name="Source_20_Text"><text:span text:style-name="T4">WHITE = (</text:span></text:span><text:span text:style-name="Source_20_Text"><text:span text:style-name="T12">255</text:span></text:span><text:span text:style-name="Source_20_Text"><text:span text:style-name="T4">, </text:span></text:span><text:span text:style-name="Source_20_Text"><text:span text:style-name="T12">255</text:span></text:span><text:span text:style-name="Source_20_Text"><text:span text:style-name="T4">, </text:span></text:span><text:span text:style-name="Source_20_Text"><text:span text:style-name="T12">255</text:span></text:span><text:span text:style-name="Source_20_Text"><text:span text:style-name="T4">)</text:span></text:span></text:p>
              <text:p text:style-name="P3"><text:span text:style-name="Source_20_Text"><text:span text:style-name="T4">BLACK = (</text:span></text:span><text:span text:style-name="Source_20_Text"><text:span text:style-name="T12">18</text:span></text:span><text:span text:style-name="Source_20_Text"><text:span text:style-name="T4">, </text:span></text:span><text:span text:style-name="Source_20_Text"><text:span text:style-name="T12">18</text:span></text:span><text:span text:style-name="Source_20_Text"><text:span text:style-name="T4">, </text:span></text:span><text:span text:style-name="Source_20_Text"><text:span text:style-name="T12">18</text:span></text:span><text:span text:style-name="Source_20_Text"><text:span text:style-name="T4">)</text:span></text:span></text:p>
              <text:p text:style-name="P3"><text:span text:style-name="Source_20_Text"><text:span text:style-name="T4">LIGHT_BLUE = (</text:span></text:span><text:span text:style-name="Source_20_Text"><text:span text:style-name="T12">80</text:span></text:span><text:span text:style-name="Source_20_Text"><text:span text:style-name="T4">, </text:span></text:span><text:span text:style-name="Source_20_Text"><text:span text:style-name="T12">160</text:span></text:span><text:span text:style-name="Source_20_Text"><text:span text:style-name="T4">, </text:span></text:span><text:span text:style-name="Source_20_Text"><text:span text:style-name="T12">255</text:span></text:span><text:span text:style-name="Source_20_Text"><text:span text:style-name="T4">)</text:span></text:span></text:p>
              <text:p text:style-name="P3"><text:span text:style-name="Source_20_Text"><text:span text:style-name="T4">RED = (</text:span></text:span><text:span text:style-name="Source_20_Text"><text:span text:style-name="T12">220</text:span></text:span><text:span text:style-name="Source_20_Text"><text:span text:style-name="T4">, </text:span></text:span><text:span text:style-name="Source_20_Text"><text:span text:style-name="T12">70</text:span></text:span><text:span text:style-name="Source_20_Text"><text:span text:style-name="T4">, </text:span></text:span><text:span text:style-name="Source_20_Text"><text:span text:style-name="T12">70</text:span></text:span><text:span text:style-name="Source_20_Text"><text:span text:style-name="T4">)</text:span></text:span></text:p>
              <text:p text:style-name="P3"><text:span text:style-name="Source_20_Text"><text:span text:style-name="T4">GREEN = (</text:span></text:span><text:span text:style-name="Source_20_Text"><text:span text:style-name="T12">70</text:span></text:span><text:span text:style-name="Source_20_Text"><text:span text:style-name="T4">, </text:span></text:span><text:span text:style-name="Source_20_Text"><text:span text:style-name="T12">190</text:span></text:span><text:span text:style-name="Source_20_Text"><text:span text:style-name="T4">, </text:span></text:span><text:span text:style-name="Source_20_Text"><text:span text:style-name="T12">120</text:span></text:span><text:span text:style-name="Source_20_Text"><text:span text:style-name="T4">)</text:span></text:span></text:p>
              <text:p text:style-name="P3"><text:span text:style-name="Source_20_Text"><text:span text:style-name="T4">YELLOW = (</text:span></text:span><text:span text:style-name="Source_20_Text"><text:span text:style-name="T12">245</text:span></text:span><text:span text:style-name="Source_20_Text"><text:span text:style-name="T4">, </text:span></text:span><text:span text:style-name="Source_20_Text"><text:span text:style-name="T12">210</text:span></text:span><text:span text:style-name="Source_20_Text"><text:span text:style-name="T4">, </text:span></text:span><text:span text:style-name="Source_20_Text"><text:span text:style-name="T12">80</text:span></text:span><text:span text:style-name="Source_20_Text"><text:span text:style-name="T4">)</text:span></text:span></text:p>
              <text:p text:style-name="P3"><text:span text:style-name="Source_20_Text"><text:span text:style-name="T4">PURPLE = (</text:span></text:span><text:span text:style-name="Source_20_Text"><text:span text:style-name="T12">160</text:span></text:span><text:span text:style-name="Source_20_Text"><text:span text:style-name="T4">, </text:span></text:span><text:span text:style-name="Source_20_Text"><text:span text:style-name="T12">100</text:span></text:span><text:span text:style-name="Source_20_Text"><text:span text:style-name="T4">, </text:span></text:span><text:span text:style-name="Source_20_Text"><text:span text:style-name="T12">220</text:span></text:span><text:span text:style-name="Source_20_Text"><text:span text:style-name="T4">)</text:span></text:span></text:p>
              <text:p text:style-name="P3"><text:span text:style-name="Source_20_Text"><text:span text:style-name="T4">GRAY = (</text:span></text:span><text:span text:style-name="Source_20_Text"><text:span text:style-name="T12">180</text:span></text:span><text:span text:style-name="Source_20_Text"><text:span text:style-name="T4">, </text:span></text:span><text:span text:style-name="Source_20_Text"><text:span text:style-name="T12">180</text:span></text:span><text:span text:style-name="Source_20_Text"><text:span text:style-name="T4">, </text:span></text:span><text:span text:style-name="Source_20_Text"><text:span text:style-name="T12">180</text:span></text:span><text:span text:style-name="Source_20_Text"><text:span text:style-name="T4">)</text:span></text:span></text:p>
              <text:p text:style-name="P4"/>
              <text:p text:style-name="P3"><text:span text:style-name="Source_20_Text"><text:span text:style-name="T4">PADDLE_WIDTH = </text:span></text:span><text:span text:style-name="Source_20_Text"><text:span text:style-name="T12">120</text:span></text:span></text:p>
              <text:p text:style-name="P3"><text:span text:style-name="Source_20_Text"><text:span text:style-name="T4">PADDLE_HEIGHT = </text:span></text:span><text:span text:style-name="Source_20_Text"><text:span text:style-name="T12">15</text:span></text:span></text:p>
              <text:p text:style-name="P4"/>
              <text:p text:style-name="P3"><text:span text:style-name="Source_20_Text"><text:span text:style-name="T4">BALL_SIZE = </text:span></text:span><text:span text:style-name="Source_20_Text"><text:span text:style-name="T12">14</text:span></text:span></text:p>
              <text:p text:style-name="P3"><text:span text:style-name="Source_20_Text"><text:span text:style-name="T4">BALL_START_SPEED_X = </text:span></text:span><text:span text:style-name="Source_20_Text"><text:span text:style-name="T12">4</text:span></text:span></text:p>
              <text:p text:style-name="P3"><text:span text:style-name="Source_20_Text"><text:span text:style-name="T4">BALL_START_SPEED_Y = -</text:span></text:span><text:span text:style-name="Source_20_Text"><text:span text:style-name="T12">4</text:span></text:span></text:p>
              <text:p text:style-name="P4"/>
              <text:p text:style-name="P3"><text:span text:style-name="Source_20_Text"><text:span text:style-name="T4">BRICK_ROWS = </text:span></text:span><text:span text:style-name="Source_20_Text"><text:span text:style-name="T12">5</text:span></text:span></text:p>
              <text:p text:style-name="P3"><text:span text:style-name="Source_20_Text"><text:span text:style-name="T4">BRICK_COLUMNS = </text:span></text:span><text:span text:style-name="Source_20_Text"><text:span text:style-name="T12">10</text:span></text:span></text:p>
              <text:p text:style-name="P3"><text:span text:style-name="Source_20_Text"><text:span text:style-name="T4">BRICK_WIDTH = </text:span></text:span><text:span text:style-name="Source_20_Text"><text:span text:style-name="T12">70</text:span></text:span></text:p>
              <text:p text:style-name="P3"><text:soft-page-break/><text:span text:style-name="Source_20_Text"><text:span text:style-name="T4">BRICK_HEIGHT = </text:span></text:span><text:span text:style-name="Source_20_Text"><text:span text:style-name="T12">25</text:span></text:span></text:p>
              <text:p text:style-name="P3"><text:span text:style-name="Source_20_Text"><text:span text:style-name="T4">BRICK_PADDING = </text:span></text:span><text:span text:style-name="Source_20_Text"><text:span text:style-name="T12">8</text:span></text:span></text:p>
              <text:p text:style-name="P3"><text:span text:style-name="Source_20_Text"><text:span text:style-name="T4">BRICK_TOP_OFFSET = </text:span></text:span><text:span text:style-name="Source_20_Text"><text:span text:style-name="T12">80</text:span></text:span></text:p>
              <text:p text:style-name="P3"><text:span text:style-name="Source_20_Text"><text:span text:style-name="T4">BRICK_LEFT_OFFSET = </text:span></text:span><text:span text:style-name="Source_20_Text"><text:span text:style-name="T12">35</text:span></text:span></text:p>
              <text:p text:style-name="P4"/>
              <text:p text:style-name="P3"><text:span text:style-name="Source_20_Text"><text:span text:style-name="T4">STARTING_LIVES = </text:span></text:span><text:span text:style-name="Source_20_Text"><text:span text:style-name="T12">3</text:span></text:span></text:p>
              <text:p text:style-name="P4"/>
              <text:p text:style-name="P3"><text:span text:style-name="Source_20_Text"><text:span text:style-name="T6"># Global reference to allow the WebSocket to influence the game state</text:span></text:span></text:p>
              <text:p text:style-name="P3"><text:span text:style-name="Source_20_Text"><text:span text:style-name="T4">game_instance = </text:span></text:span><text:span text:style-name="Source_20_Text"><text:span text:style-name="T12">None</text:span></text:span></text:p>
              <text:p text:style-name="P4"/>
              <text:p text:style-name="P3"><text:span text:style-name="Source_20_Text"><text:span text:style-name="T6"># ============================================================</text:span></text:span></text:p>
              <text:p text:style-name="P3"><text:span text:style-name="Source_20_Text"><text:span text:style-name="T6"># GAME CLASSES (PADDLE, BALL, BRICK)</text:span></text:span></text:p>
              <text:p text:style-name="P3"><text:span text:style-name="Source_20_Text"><text:span text:style-name="T6"># ============================================================</text:span></text:span></text:p>
              <text:p text:style-name="P3"><text:span text:style-name="Source_20_Text"><text:span text:style-name="T9">@dataclass</text:span></text:span></text:p>
              <text:p text:style-name="P3"><text:span text:style-name="Source_20_Text"><text:span text:style-name="T3">class</text:span></text:span><text:span text:style-name="Source_20_Text"><text:span text:style-name="T7"> Paddle:</text:span></text:span></text:p>
              <text:p text:style-name="P3"><text:span text:style-name="Source_20_Text"><text:span text:style-name="T5"><text:s text:c="4"/></text:span></text:span><text:span text:style-name="Source_20_Text"><text:span text:style-name="T4">x: </text:span></text:span><text:span text:style-name="Source_20_Text"><text:span text:style-name="T9">int</text:span></text:span></text:p>
              <text:p text:style-name="P3"><text:span text:style-name="Source_20_Text"><text:span text:style-name="T5"><text:s text:c="4"/></text:span></text:span><text:span text:style-name="Source_20_Text"><text:span text:style-name="T4">y: </text:span></text:span><text:span text:style-name="Source_20_Text"><text:span text:style-name="T9">int</text:span></text:span></text:p>
              <text:p text:style-name="P3"><text:span text:style-name="Source_20_Text"><text:span text:style-name="T5"><text:s text:c="4"/></text:span></text:span><text:span text:style-name="Source_20_Text"><text:span text:style-name="T4">width: </text:span></text:span><text:span text:style-name="Source_20_Text"><text:span text:style-name="T9">int</text:span></text:span><text:span text:style-name="Source_20_Text"><text:span text:style-name="T4"> = PADDLE_WIDTH</text:span></text:span></text:p>
              <text:p text:style-name="P3"><text:span text:style-name="Source_20_Text"><text:span text:style-name="T5"><text:s text:c="4"/></text:span></text:span><text:span text:style-name="Source_20_Text"><text:span text:style-name="T4">height: </text:span></text:span><text:span text:style-name="Source_20_Text"><text:span text:style-name="T9">int</text:span></text:span><text:span text:style-name="Source_20_Text"><text:span text:style-name="T4"> = PADDLE_HEIGHT</text:span></text:span></text:p>
              <text:p text:style-name="P4"/>
              <text:p text:style-name="P3"><text:span text:style-name="Source_20_Text"><text:span text:style-name="T11"><text:s text:c="4"/></text:span></text:span><text:span text:style-name="Source_20_Text"><text:span text:style-name="T9">@property</text:span></text:span></text:p>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rect</text:span></text:span><text:span text:style-name="Source_20_Text"><text:span text:style-name="T4">(self) -&gt; pygame.Rect:</text:span></text:span></text:p>
              <text:p text:style-name="P3"><text:span text:style-name="Source_20_Text"><text:span text:style-name="T5"><text:s text:c="8"/></text:span></text:span><text:span text:style-name="Source_20_Text"><text:span text:style-name="T3">return</text:span></text:span><text:span text:style-name="Source_20_Text"><text:span text:style-name="T4"> pygame.Rect(self.x, self.y, self.width, self.height)</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moveToX</text:span></text:span><text:span text:style-name="Source_20_Text"><text:span text:style-name="T4">(self, target_x: </text:span></text:span><text:span text:style-name="Source_20_Text"><text:span text:style-name="T9">int</text:span></text:span><text:span text:style-name="Source_20_Text"><text:span text:style-name="T4">)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8">"""Directly positions the paddle center using touch X coordinates."""</text:span></text:span></text:p>
              <text:p text:style-name="P3"><text:span text:style-name="Source_20_Text"><text:span text:style-name="T5"><text:s text:c="8"/></text:span></text:span><text:span text:style-name="Source_20_Text"><text:span text:style-name="T6"># Center the paddle on the touch point</text:span></text:span></text:p>
              <text:p text:style-name="P3"><text:span text:style-name="Source_20_Text"><text:span text:style-name="T5"><text:s text:c="8"/></text:span></text:span><text:span text:style-name="Source_20_Text"><text:span text:style-name="T4">self.x = target_x - (self.width // </text:span></text:span><text:span text:style-name="Source_20_Text"><text:span text:style-name="T12">2</text:span></text:span><text:span text:style-name="Source_20_Text"><text:span text:style-name="T4">)</text:span></text:span></text:p>
              <text:p text:style-name="P4"><text:span text:style-name="Source_20_Text"><text:span text:style-name="T5"><text:s text:c="8"/></text:span></text:span></text:p>
              <text:p text:style-name="P3"><text:span text:style-name="Source_20_Text"><text:span text:style-name="T5"><text:s text:c="8"/></text:span></text:span><text:span text:style-name="Source_20_Text"><text:span text:style-name="T6"># Keep paddle within screen boundaries</text:span></text:span></text:p>
              <text:p text:style-name="P3"><text:span text:style-name="Source_20_Text"><text:span text:style-name="T5"><text:s text:c="8"/></text:span></text:span><text:span text:style-name="Source_20_Text"><text:span text:style-name="T3">if</text:span></text:span><text:span text:style-name="Source_20_Text"><text:span text:style-name="T4"> self.x &lt; </text:span></text:span><text:span text:style-name="Source_20_Text"><text:span text:style-name="T12">0</text:span></text:span><text:span text:style-name="Source_20_Text"><text:span text:style-name="T4">:</text:span></text:span></text:p>
              <text:p text:style-name="P3"><text:span text:style-name="Source_20_Text"><text:span text:style-name="T5"><text:s text:c="12"/></text:span></text:span><text:span text:style-name="Source_20_Text"><text:span text:style-name="T4">self.x = </text:span></text:span><text:span text:style-name="Source_20_Text"><text:span text:style-name="T12">0</text:span></text:span></text:p>
              <text:p text:style-name="P3"><text:span text:style-name="Source_20_Text"><text:span text:style-name="T5"><text:s text:c="8"/></text:span></text:span><text:span text:style-name="Source_20_Text"><text:span text:style-name="T3">elif</text:span></text:span><text:span text:style-name="Source_20_Text"><text:span text:style-name="T4"> self.x + self.width &gt; SCREEN_WIDTH:</text:span></text:span></text:p>
              <text:p text:style-name="P4"><text:span text:style-name="Source_20_Text"><text:span text:style-name="T5"><text:s text:c="12"/></text:span></text:span><text:span text:style-name="Source_20_Text"><text:span text:style-name="T4">self.x = SCREEN_WIDTH - self.width</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draw</text:span></text:span><text:span text:style-name="Source_20_Text"><text:span text:style-name="T4">(self, screen: pygame.Surface)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pygame.draw.rect(screen, LIGHT_BLUE, self.rect, border_radius=</text:span></text:span><text:span text:style-name="Source_20_Text"><text:span text:style-name="T12">8</text:span></text:span><text:span text:style-name="Source_20_Text"><text:span text:style-name="T4">)</text:span></text:span></text:p>
              <text:p text:style-name="P4"/>
              <text:p text:style-name="P4"/>
              <text:p text:style-name="P3"><text:span text:style-name="Source_20_Text"><text:span text:style-name="T9">@dataclass</text:span></text:span></text:p>
              <text:p text:style-name="P3"><text:span text:style-name="Source_20_Text"><text:span text:style-name="T3">class</text:span></text:span><text:span text:style-name="Source_20_Text"><text:span text:style-name="T7"> Ball:</text:span></text:span></text:p>
              <text:p text:style-name="P3"><text:span text:style-name="Source_20_Text"><text:span text:style-name="T5"><text:s text:c="4"/></text:span></text:span><text:span text:style-name="Source_20_Text"><text:span text:style-name="T4">x: </text:span></text:span><text:span text:style-name="Source_20_Text"><text:span text:style-name="T9">float</text:span></text:span></text:p>
              <text:p text:style-name="P3"><text:span text:style-name="Source_20_Text"><text:span text:style-name="T5"><text:s text:c="4"/></text:span></text:span><text:span text:style-name="Source_20_Text"><text:span text:style-name="T4">y: </text:span></text:span><text:span text:style-name="Source_20_Text"><text:span text:style-name="T9">float</text:span></text:span></text:p>
              <text:p text:style-name="P3"><text:soft-page-break/><text:span text:style-name="Source_20_Text"><text:span text:style-name="T5"><text:s text:c="4"/></text:span></text:span><text:span text:style-name="Source_20_Text"><text:span text:style-name="T4">speed_x: </text:span></text:span><text:span text:style-name="Source_20_Text"><text:span text:style-name="T9">float</text:span></text:span><text:span text:style-name="Source_20_Text"><text:span text:style-name="T4"> = BALL_START_SPEED_X</text:span></text:span></text:p>
              <text:p text:style-name="P3"><text:span text:style-name="Source_20_Text"><text:span text:style-name="T5"><text:s text:c="4"/></text:span></text:span><text:span text:style-name="Source_20_Text"><text:span text:style-name="T4">speed_y: </text:span></text:span><text:span text:style-name="Source_20_Text"><text:span text:style-name="T9">float</text:span></text:span><text:span text:style-name="Source_20_Text"><text:span text:style-name="T4"> = BALL_START_SPEED_Y</text:span></text:span></text:p>
              <text:p text:style-name="P3"><text:span text:style-name="Source_20_Text"><text:span text:style-name="T5"><text:s text:c="4"/></text:span></text:span><text:span text:style-name="Source_20_Text"><text:span text:style-name="T4">size: </text:span></text:span><text:span text:style-name="Source_20_Text"><text:span text:style-name="T9">int</text:span></text:span><text:span text:style-name="Source_20_Text"><text:span text:style-name="T4"> = BALL_SIZE</text:span></text:span></text:p>
              <text:p text:style-name="P4"/>
              <text:p text:style-name="P3"><text:span text:style-name="Source_20_Text"><text:span text:style-name="T11"><text:s text:c="4"/></text:span></text:span><text:span text:style-name="Source_20_Text"><text:span text:style-name="T9">@property</text:span></text:span></text:p>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rect</text:span></text:span><text:span text:style-name="Source_20_Text"><text:span text:style-name="T4">(self) -&gt; pygame.Rect:</text:span></text:span></text:p>
              <text:p text:style-name="P3"><text:span text:style-name="Source_20_Text"><text:span text:style-name="T5"><text:s text:c="8"/></text:span></text:span><text:span text:style-name="Source_20_Text"><text:span text:style-name="T3">return</text:span></text:span><text:span text:style-name="Source_20_Text"><text:span text:style-name="T4"> pygame.Rect(</text:span></text:span><text:span text:style-name="Source_20_Text"><text:span text:style-name="T9">int</text:span></text:span><text:span text:style-name="Source_20_Text"><text:span text:style-name="T4">(self.x), </text:span></text:span><text:span text:style-name="Source_20_Text"><text:span text:style-name="T9">int</text:span></text:span><text:span text:style-name="Source_20_Text"><text:span text:style-name="T4">(self.y), self.size, self.size)</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reset</text:span></text:span><text:span text:style-name="Source_20_Text"><text:span text:style-name="T4">(self, level: </text:span></text:span><text:span text:style-name="Source_20_Text"><text:span text:style-name="T9">int</text:span></text:span><text:span text:style-name="Source_20_Text"><text:span text:style-name="T4">)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self.x = SCREEN_WIDTH // </text:span></text:span><text:span text:style-name="Source_20_Text"><text:span text:style-name="T12">2</text:span></text:span><text:span text:style-name="Source_20_Text"><text:span text:style-name="T4"> - self.size // </text:span></text:span><text:span text:style-name="Source_20_Text"><text:span text:style-name="T12">2</text:span></text:span></text:p>
              <text:p text:style-name="P3"><text:span text:style-name="Source_20_Text"><text:span text:style-name="T5"><text:s text:c="8"/></text:span></text:span><text:span text:style-name="Source_20_Text"><text:span text:style-name="T4">self.y = SCREEN_HEIGHT // </text:span></text:span><text:span text:style-name="Source_20_Text"><text:span text:style-name="T12">2</text:span></text:span></text:p>
              <text:p text:style-name="P3"><text:span text:style-name="Source_20_Text"><text:span text:style-name="T5"><text:s text:c="8"/></text:span></text:span><text:span text:style-name="Source_20_Text"><text:span text:style-name="T4">speed_multiplier = </text:span></text:span><text:span text:style-name="Source_20_Text"><text:span text:style-name="T12">1</text:span></text:span><text:span text:style-name="Source_20_Text"><text:span text:style-name="T4"> + ((level - </text:span></text:span><text:span text:style-name="Source_20_Text"><text:span text:style-name="T12">1</text:span></text:span><text:span text:style-name="Source_20_Text"><text:span text:style-name="T4">) * </text:span></text:span><text:span text:style-name="Source_20_Text"><text:span text:style-name="T12">0.10</text:span></text:span><text:span text:style-name="Source_20_Text"><text:span text:style-name="T4">)</text:span></text:span></text:p>
              <text:p text:style-name="P4"><text:span text:style-name="Source_20_Text"><text:span text:style-name="T5"><text:s text:c="8"/></text:span></text:span><text:span text:style-name="Source_20_Text"><text:span text:style-name="T4">self.speed_x = BALL_START_SPEED_X * speed_multiplier</text:span></text:span></text:p>
              <text:p text:style-name="P4"><text:span text:style-name="Source_20_Text"><text:span text:style-name="T5"><text:s text:c="8"/></text:span></text:span><text:span text:style-name="Source_20_Text"><text:span text:style-name="T4">self.speed_y = BALL_START_SPEED_Y * speed_multiplier</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move</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4"><text:span text:style-name="Source_20_Text"><text:span text:style-name="T5"><text:s text:c="8"/></text:span></text:span><text:span text:style-name="Source_20_Text"><text:span text:style-name="T4">self.x += self.speed_x</text:span></text:span></text:p>
              <text:p text:style-name="P4"><text:span text:style-name="Source_20_Text"><text:span text:style-name="T5"><text:s text:c="8"/></text:span></text:span><text:span text:style-name="Source_20_Text"><text:span text:style-name="T4">self.y += self.speed_y</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bounce_x</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self.speed_x *= -</text:span></text:span><text:span text:style-name="Source_20_Text"><text:span text:style-name="T12">1</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bounce_y</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self.speed_y *= -</text:span></text:span><text:span text:style-name="Source_20_Text"><text:span text:style-name="T12">1</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draw</text:span></text:span><text:span text:style-name="Source_20_Text"><text:span text:style-name="T4">(self, screen: pygame.Surface) -&gt; </text:span></text:span><text:span text:style-name="Source_20_Text"><text:span text:style-name="T3">None</text:span></text:span><text:span text:style-name="Source_20_Text"><text:span text:style-name="T4">:</text:span></text:span></text:p>
              <text:p text:style-name="P4"><text:span text:style-name="Source_20_Text"><text:span text:style-name="T5"><text:s text:c="8"/></text:span></text:span><text:span text:style-name="Source_20_Text"><text:span text:style-name="T4">pygame.draw.ellipse(screen, WHITE, self.rect)</text:span></text:span></text:p>
              <text:p text:style-name="P4"/>
              <text:p text:style-name="P4"/>
              <text:p text:style-name="P3"><text:span text:style-name="Source_20_Text"><text:span text:style-name="T9">@dataclass</text:span></text:span></text:p>
              <text:p text:style-name="P3"><text:span text:style-name="Source_20_Text"><text:span text:style-name="T3">class</text:span></text:span><text:span text:style-name="Source_20_Text"><text:span text:style-name="T7"> Brick:</text:span></text:span></text:p>
              <text:p text:style-name="P3"><text:span text:style-name="Source_20_Text"><text:span text:style-name="T5"><text:s text:c="4"/></text:span></text:span><text:span text:style-name="Source_20_Text"><text:span text:style-name="T4">x: </text:span></text:span><text:span text:style-name="Source_20_Text"><text:span text:style-name="T9">int</text:span></text:span></text:p>
              <text:p text:style-name="P3"><text:span text:style-name="Source_20_Text"><text:span text:style-name="T5"><text:s text:c="4"/></text:span></text:span><text:span text:style-name="Source_20_Text"><text:span text:style-name="T4">y: </text:span></text:span><text:span text:style-name="Source_20_Text"><text:span text:style-name="T9">int</text:span></text:span></text:p>
              <text:p text:style-name="P3"><text:span text:style-name="Source_20_Text"><text:span text:style-name="T5"><text:s text:c="4"/></text:span></text:span><text:span text:style-name="Source_20_Text"><text:span text:style-name="T4">width: </text:span></text:span><text:span text:style-name="Source_20_Text"><text:span text:style-name="T9">int</text:span></text:span></text:p>
              <text:p text:style-name="P3"><text:span text:style-name="Source_20_Text"><text:span text:style-name="T5"><text:s text:c="4"/></text:span></text:span><text:span text:style-name="Source_20_Text"><text:span text:style-name="T4">height: </text:span></text:span><text:span text:style-name="Source_20_Text"><text:span text:style-name="T9">int</text:span></text:span></text:p>
              <text:p text:style-name="P3"><text:span text:style-name="Source_20_Text"><text:span text:style-name="T5"><text:s text:c="4"/></text:span></text:span><text:span text:style-name="Source_20_Text"><text:span text:style-name="T4">color: </text:span></text:span><text:span text:style-name="Source_20_Text"><text:span text:style-name="T9">tuple</text:span></text:span></text:p>
              <text:p text:style-name="P3"><text:span text:style-name="Source_20_Text"><text:span text:style-name="T5"><text:s text:c="4"/></text:span></text:span><text:span text:style-name="Source_20_Text"><text:span text:style-name="T4">points: </text:span></text:span><text:span text:style-name="Source_20_Text"><text:span text:style-name="T9">int</text:span></text:span><text:span text:style-name="Source_20_Text"><text:span text:style-name="T4"> = </text:span></text:span><text:span text:style-name="Source_20_Text"><text:span text:style-name="T12">10</text:span></text:span></text:p>
              <text:p text:style-name="P3"><text:span text:style-name="Source_20_Text"><text:span text:style-name="T5"><text:s text:c="4"/></text:span></text:span><text:span text:style-name="Source_20_Text"><text:span text:style-name="T4">active: </text:span></text:span><text:span text:style-name="Source_20_Text"><text:span text:style-name="T9">bool</text:span></text:span><text:span text:style-name="Source_20_Text"><text:span text:style-name="T4"> = </text:span></text:span><text:span text:style-name="Source_20_Text"><text:span text:style-name="T12">True</text:span></text:span></text:p>
              <text:p text:style-name="P4"/>
              <text:p text:style-name="P3"><text:span text:style-name="Source_20_Text"><text:span text:style-name="T11"><text:s text:c="4"/></text:span></text:span><text:span text:style-name="Source_20_Text"><text:span text:style-name="T9">@property</text:span></text:span></text:p>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rect</text:span></text:span><text:span text:style-name="Source_20_Text"><text:span text:style-name="T4">(self) -&gt; pygame.Rect:</text:span></text:span></text:p>
              <text:p text:style-name="P3"><text:span text:style-name="Source_20_Text"><text:span text:style-name="T5"><text:s text:c="8"/></text:span></text:span><text:span text:style-name="Source_20_Text"><text:span text:style-name="T3">return</text:span></text:span><text:span text:style-name="Source_20_Text"><text:span text:style-name="T4"> pygame.Rect(self.x, self.y, self.width, self.height)</text:span></text:span></text:p>
              <text:p text:style-name="P4"/>
              <text:p text:style-name="P3"><text:soft-page-break/><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draw</text:span></text:span><text:span text:style-name="Source_20_Text"><text:span text:style-name="T4">(self, screen: pygame.Surface)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3">if</text:span></text:span><text:span text:style-name="Source_20_Text"><text:span text:style-name="T4"> self.active:</text:span></text:span></text:p>
              <text:p text:style-name="P3"><text:span text:style-name="Source_20_Text"><text:span text:style-name="T5"><text:s text:c="12"/></text:span></text:span><text:span text:style-name="Source_20_Text"><text:span text:style-name="T4">pygame.draw.rect(screen, self.color, self.rect, border_radius=</text:span></text:span><text:span text:style-name="Source_20_Text"><text:span text:style-name="T12">5</text:span></text:span><text:span text:style-name="Source_20_Text"><text:span text:style-name="T4">)</text:span></text:span></text:p>
              <text:p text:style-name="P3"><text:span text:style-name="Source_20_Text"><text:span text:style-name="T5"><text:s text:c="12"/></text:span></text:span><text:span text:style-name="Source_20_Text"><text:span text:style-name="T4">pygame.draw.rect(screen, WHITE, self.rect, </text:span></text:span><text:span text:style-name="Source_20_Text"><text:span text:style-name="T12">2</text:span></text:span><text:span text:style-name="Source_20_Text"><text:span text:style-name="T4">, border_radius=</text:span></text:span><text:span text:style-name="Source_20_Text"><text:span text:style-name="T12">5</text:span></text:span><text:span text:style-name="Source_20_Text"><text:span text:style-name="T4">)</text:span></text:span></text:p>
              <text:p text:style-name="P4"/>
              <text:p text:style-name="P4"/>
              <text:p text:style-name="P3"><text:span text:style-name="Source_20_Text"><text:span text:style-name="T6"># ============================================================</text:span></text:span></text:p>
              <text:p text:style-name="P3"><text:span text:style-name="Source_20_Text"><text:span text:style-name="T6"># MAIN GAME LOGIC</text:span></text:span></text:p>
              <text:p text:style-name="P3"><text:span text:style-name="Source_20_Text"><text:span text:style-name="T6"># ============================================================</text:span></text:span></text:p>
              <text:p text:style-name="P3"><text:span text:style-name="Source_20_Text"><text:span text:style-name="T3">class</text:span></text:span><text:span text:style-name="Source_20_Text"><text:span text:style-name="T7"> Game:</text:span></text:span></text:p>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__init__</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4"><text:span text:style-name="Source_20_Text"><text:span text:style-name="T5"><text:s text:c="8"/></text:span></text:span><text:span text:style-name="Source_20_Text"><text:span text:style-name="T4">pygame.init()</text:span></text:span></text:p>
              <text:p text:style-name="P3"><text:span text:style-name="Source_20_Text"><text:span text:style-name="T5"><text:s text:c="8"/></text:span></text:span><text:span text:style-name="Source_20_Text"><text:span text:style-name="T4">pygame.display.set_caption(</text:span></text:span><text:span text:style-name="Source_20_Text"><text:span text:style-name="T8">"Breakout Game - Server Edition"</text:span></text:span><text:span text:style-name="Source_20_Text"><text:span text:style-name="T4">)</text:span></text:span></text:p>
              <text:p text:style-name="P4"><text:span text:style-name="Source_20_Text"><text:span text:style-name="T5"><text:s text:c="8"/></text:span></text:span><text:span text:style-name="Source_20_Text"><text:span text:style-name="T4">self.screen = pygame.display.set_mode((SCREEN_WIDTH, SCREEN_HEIGHT))</text:span></text:span></text:p>
              <text:p text:style-name="P4"><text:span text:style-name="Source_20_Text"><text:span text:style-name="T5"><text:s text:c="8"/></text:span></text:span><text:span text:style-name="Source_20_Text"><text:span text:style-name="T4">self.clock = pygame.time.Clock()</text:span></text:span></text:p>
              <text:p text:style-name="P4"/>
              <text:p text:style-name="P3"><text:span text:style-name="Source_20_Text"><text:span text:style-name="T5"><text:s text:c="8"/></text:span></text:span><text:span text:style-name="Source_20_Text"><text:span text:style-name="T4">self.title_font = pygame.font.SysFont(</text:span></text:span><text:span text:style-name="Source_20_Text"><text:span text:style-name="T8">"arial"</text:span></text:span><text:span text:style-name="Source_20_Text"><text:span text:style-name="T4">, </text:span></text:span><text:span text:style-name="Source_20_Text"><text:span text:style-name="T12">42</text:span></text:span><text:span text:style-name="Source_20_Text"><text:span text:style-name="T4">, bold=</text:span></text:span><text:span text:style-name="Source_20_Text"><text:span text:style-name="T12">True</text:span></text:span><text:span text:style-name="Source_20_Text"><text:span text:style-name="T4">)</text:span></text:span></text:p>
              <text:p text:style-name="P3"><text:span text:style-name="Source_20_Text"><text:span text:style-name="T5"><text:s text:c="8"/></text:span></text:span><text:span text:style-name="Source_20_Text"><text:span text:style-name="T4">self.medium_font = pygame.font.SysFont(</text:span></text:span><text:span text:style-name="Source_20_Text"><text:span text:style-name="T8">"arial"</text:span></text:span><text:span text:style-name="Source_20_Text"><text:span text:style-name="T4">, </text:span></text:span><text:span text:style-name="Source_20_Text"><text:span text:style-name="T12">28</text:span></text:span><text:span text:style-name="Source_20_Text"><text:span text:style-name="T4">, bold=</text:span></text:span><text:span text:style-name="Source_20_Text"><text:span text:style-name="T12">True</text:span></text:span><text:span text:style-name="Source_20_Text"><text:span text:style-name="T4">)</text:span></text:span></text:p>
              <text:p text:style-name="P3"><text:span text:style-name="Source_20_Text"><text:span text:style-name="T5"><text:s text:c="8"/></text:span></text:span><text:span text:style-name="Source_20_Text"><text:span text:style-name="T4">self.small_font = pygame.font.SysFont(</text:span></text:span><text:span text:style-name="Source_20_Text"><text:span text:style-name="T8">"arial"</text:span></text:span><text:span text:style-name="Source_20_Text"><text:span text:style-name="T4">, </text:span></text:span><text:span text:style-name="Source_20_Text"><text:span text:style-name="T12">22</text:span></text:span><text:span text:style-name="Source_20_Text"><text:span text:style-name="T4">)</text:span></text:span></text:p>
              <text:p text:style-name="P4"/>
              <text:p text:style-name="P3"><text:span text:style-name="Source_20_Text"><text:span text:style-name="T5"><text:s text:c="8"/></text:span></text:span><text:span text:style-name="Source_20_Text"><text:span text:style-name="T4">self.paddle = Paddle(x=SCREEN_WIDTH // </text:span></text:span><text:span text:style-name="Source_20_Text"><text:span text:style-name="T12">2</text:span></text:span><text:span text:style-name="Source_20_Text"><text:span text:style-name="T4"> - PADDLE_WIDTH // </text:span></text:span><text:span text:style-name="Source_20_Text"><text:span text:style-name="T12">2</text:span></text:span><text:span text:style-name="Source_20_Text"><text:span text:style-name="T4">, y=SCREEN_HEIGHT - </text:span></text:span><text:span text:style-name="Source_20_Text"><text:span text:style-name="T12">50</text:span></text:span><text:span text:style-name="Source_20_Text"><text:span text:style-name="T4">)</text:span></text:span></text:p>
              <text:p text:style-name="P3"><text:span text:style-name="Source_20_Text"><text:span text:style-name="T5"><text:s text:c="8"/></text:span></text:span><text:span text:style-name="Source_20_Text"><text:span text:style-name="T4">self.ball = Ball(x=SCREEN_WIDTH // </text:span></text:span><text:span text:style-name="Source_20_Text"><text:span text:style-name="T12">2</text:span></text:span><text:span text:style-name="Source_20_Text"><text:span text:style-name="T4"> - BALL_SIZE // </text:span></text:span><text:span text:style-name="Source_20_Text"><text:span text:style-name="T12">2</text:span></text:span><text:span text:style-name="Source_20_Text"><text:span text:style-name="T4">, y=SCREEN_HEIGHT // </text:span></text:span><text:span text:style-name="Source_20_Text"><text:span text:style-name="T12">2</text:span></text:span><text:span text:style-name="Source_20_Text"><text:span text:style-name="T4">)</text:span></text:span></text:p>
              <text:p text:style-name="P4"/>
              <text:p text:style-name="P3"><text:span text:style-name="Source_20_Text"><text:span text:style-name="T5"><text:s text:c="8"/></text:span></text:span><text:span text:style-name="Source_20_Text"><text:span text:style-name="T4">self.score = </text:span></text:span><text:span text:style-name="Source_20_Text"><text:span text:style-name="T12">0</text:span></text:span></text:p>
              <text:p text:style-name="P4"><text:span text:style-name="Source_20_Text"><text:span text:style-name="T5"><text:s text:c="8"/></text:span></text:span><text:span text:style-name="Source_20_Text"><text:span text:style-name="T4">self.lives = STARTING_LIVES</text:span></text:span></text:p>
              <text:p text:style-name="P3"><text:span text:style-name="Source_20_Text"><text:span text:style-name="T5"><text:s text:c="8"/></text:span></text:span><text:span text:style-name="Source_20_Text"><text:span text:style-name="T4">self.level = </text:span></text:span><text:span text:style-name="Source_20_Text"><text:span text:style-name="T12">1</text:span></text:span></text:p>
              <text:p text:style-name="P3"><text:span text:style-name="Source_20_Text"><text:span text:style-name="T5"><text:s text:c="8"/></text:span></text:span><text:span text:style-name="Source_20_Text"><text:span text:style-name="T4">self.game_state = </text:span></text:span><text:span text:style-name="Source_20_Text"><text:span text:style-name="T8">"START"</text:span></text:span></text:p>
              <text:p text:style-name="P4"><text:span text:style-name="Source_20_Text"><text:span text:style-name="T5"><text:s text:c="8"/></text:span></text:span><text:span text:style-name="Source_20_Text"><text:span text:style-name="T4">self.bricks: List[Brick] = []</text:span></text:span></text:p>
              <text:p text:style-name="P4"><text:span text:style-name="Source_20_Text"><text:span text:style-name="T5"><text:s text:c="8"/></text:span></text:span><text:span text:style-name="Source_20_Text"><text:span text:style-name="T4">self.create_bricks()</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create_bricks</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4"><text:span text:style-name="Source_20_Text"><text:span text:style-name="T5"><text:s text:c="8"/></text:span></text:span><text:span text:style-name="Source_20_Text"><text:span text:style-name="T4">self.bricks.clear()</text:span></text:span></text:p>
              <text:p text:style-name="P4"><text:span text:style-name="Source_20_Text"><text:span text:style-name="T5"><text:s text:c="8"/></text:span></text:span><text:span text:style-name="Source_20_Text"><text:span text:style-name="T4">colors = [RED, YELLOW, GREEN, LIGHT_BLUE, PURPLE]</text:span></text:span></text:p>
              <text:p text:style-name="P3"><text:span text:style-name="Source_20_Text"><text:span text:style-name="T5"><text:s text:c="8"/></text:span></text:span><text:span text:style-name="Source_20_Text"><text:span text:style-name="T3">for</text:span></text:span><text:span text:style-name="Source_20_Text"><text:span text:style-name="T4"> row </text:span></text:span><text:span text:style-name="Source_20_Text"><text:span text:style-name="T3">in</text:span></text:span><text:span text:style-name="Source_20_Text"><text:span text:style-name="T4"> </text:span></text:span><text:span text:style-name="Source_20_Text"><text:span text:style-name="T9">range</text:span></text:span><text:span text:style-name="Source_20_Text"><text:span text:style-name="T4">(BRICK_ROWS):</text:span></text:span></text:p>
              <text:p text:style-name="P3"><text:span text:style-name="Source_20_Text"><text:span text:style-name="T5"><text:s text:c="12"/></text:span></text:span><text:span text:style-name="Source_20_Text"><text:span text:style-name="T3">for</text:span></text:span><text:span text:style-name="Source_20_Text"><text:span text:style-name="T4"> col </text:span></text:span><text:span text:style-name="Source_20_Text"><text:span text:style-name="T3">in</text:span></text:span><text:span text:style-name="Source_20_Text"><text:span text:style-name="T4"> </text:span></text:span><text:span text:style-name="Source_20_Text"><text:span text:style-name="T9">range</text:span></text:span><text:span text:style-name="Source_20_Text"><text:span text:style-name="T4">(BRICK_COLUMNS):</text:span></text:span></text:p>
              <text:p text:style-name="P4"><text:span text:style-name="Source_20_Text"><text:span text:style-name="T5"><text:s text:c="16"/></text:span></text:span><text:span text:style-name="Source_20_Text"><text:span text:style-name="T4">x = BRICK_LEFT_OFFSET + col * (BRICK_WIDTH + BRICK_PADDING)</text:span></text:span></text:p>
              <text:p text:style-name="P4"><text:span text:style-name="Source_20_Text"><text:span text:style-name="T5"><text:s text:c="16"/></text:span></text:span><text:span text:style-name="Source_20_Text"><text:span text:style-name="T4">y = BRICK_TOP_OFFSET + row * (BRICK_HEIGHT + BRICK_PADDING)</text:span></text:span></text:p>
              <text:p text:style-name="P3"><text:span text:style-name="Source_20_Text"><text:span text:style-name="T5"><text:s text:c="16"/></text:span></text:span><text:span text:style-name="Source_20_Text"><text:span text:style-name="T4">brick = Brick(x=x, y=y, width=BRICK_WIDTH, height=BRICK_HEIGHT, color=colors[row % </text:span></text:span><text:span text:style-name="Source_20_Text"><text:span text:style-name="T9">len</text:span></text:span><text:span text:style-name="Source_20_Text"><text:span text:style-name="T4">(colors)])</text:span></text:span></text:p>
              <text:p text:style-name="P4"><text:span text:style-name="Source_20_Text"><text:span text:style-name="T5"><text:s text:c="16"/></text:span></text:span><text:span text:style-name="Source_20_Text"><text:span text:style-name="T4">self.bricks.append(brick)</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reset_round</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oft-page-break/><text:span text:style-name="Source_20_Text"><text:span text:style-name="T5"><text:s text:c="8"/></text:span></text:span><text:span text:style-name="Source_20_Text"><text:span text:style-name="T4">self.paddle.x = SCREEN_WIDTH // </text:span></text:span><text:span text:style-name="Source_20_Text"><text:span text:style-name="T12">2</text:span></text:span><text:span text:style-name="Source_20_Text"><text:span text:style-name="T4"> - PADDLE_WIDTH // </text:span></text:span><text:span text:style-name="Source_20_Text"><text:span text:style-name="T12">2</text:span></text:span></text:p>
              <text:p text:style-name="P4"><text:span text:style-name="Source_20_Text"><text:span text:style-name="T5"><text:s text:c="8"/></text:span></text:span><text:span text:style-name="Source_20_Text"><text:span text:style-name="T4">self.ball.reset(self.level)</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reset_game</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self.score = </text:span></text:span><text:span text:style-name="Source_20_Text"><text:span text:style-name="T12">0</text:span></text:span></text:p>
              <text:p text:style-name="P4"><text:span text:style-name="Source_20_Text"><text:span text:style-name="T5"><text:s text:c="8"/></text:span></text:span><text:span text:style-name="Source_20_Text"><text:span text:style-name="T4">self.lives = STARTING_LIVES</text:span></text:span></text:p>
              <text:p text:style-name="P3"><text:span text:style-name="Source_20_Text"><text:span text:style-name="T5"><text:s text:c="8"/></text:span></text:span><text:span text:style-name="Source_20_Text"><text:span text:style-name="T4">self.level = </text:span></text:span><text:span text:style-name="Source_20_Text"><text:span text:style-name="T12">1</text:span></text:span></text:p>
              <text:p text:style-name="P3"><text:span text:style-name="Source_20_Text"><text:span text:style-name="T5"><text:s text:c="8"/></text:span></text:span><text:span text:style-name="Source_20_Text"><text:span text:style-name="T4">self.game_state = </text:span></text:span><text:span text:style-name="Source_20_Text"><text:span text:style-name="T8">"PLAYING"</text:span></text:span></text:p>
              <text:p text:style-name="P4"><text:span text:style-name="Source_20_Text"><text:span text:style-name="T5"><text:s text:c="8"/></text:span></text:span><text:span text:style-name="Source_20_Text"><text:span text:style-name="T4">self.create_bricks()</text:span></text:span></text:p>
              <text:p text:style-name="P4"><text:span text:style-name="Source_20_Text"><text:span text:style-name="T5"><text:s text:c="8"/></text:span></text:span><text:span text:style-name="Source_20_Text"><text:span text:style-name="T4">self.reset_round()</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handle_touch_input</text:span></text:span><text:span text:style-name="Source_20_Text"><text:span text:style-name="T4">(self, event_type: </text:span></text:span><text:span text:style-name="Source_20_Text"><text:span text:style-name="T9">str</text:span></text:span><text:span text:style-name="Source_20_Text"><text:span text:style-name="T4">, client_x: </text:span></text:span><text:span text:style-name="Source_20_Text"><text:span text:style-name="T9">int</text:span></text:span><text:span text:style-name="Source_20_Text"><text:span text:style-name="T4">)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8">"""Processes interaction messages coming from the mobile device."""</text:span></text:span></text:p>
              <text:p text:style-name="P3"><text:span text:style-name="Source_20_Text"><text:span text:style-name="T5"><text:s text:c="8"/></text:span></text:span><text:span text:style-name="Source_20_Text"><text:span text:style-name="T6"># Convert coordinates if your client area width differs from game screen width</text:span></text:span></text:p>
              <text:p text:style-name="P3"><text:span text:style-name="Source_20_Text"><text:span text:style-name="T5"><text:s text:c="8"/></text:span></text:span><text:span text:style-name="Source_20_Text"><text:span text:style-name="T6"># Assuming direct pixel mapping or relative scaling</text:span></text:span></text:p>
              <text:p text:style-name="P3"><text:span text:style-name="Source_20_Text"><text:span text:style-name="T5"><text:s text:c="8"/></text:span></text:span><text:span text:style-name="Source_20_Text"><text:span text:style-name="T3">if</text:span></text:span><text:span text:style-name="Source_20_Text"><text:span text:style-name="T4"> self.game_state == </text:span></text:span><text:span text:style-name="Source_20_Text"><text:span text:style-name="T8">"PLAYING"</text:span></text:span><text:span text:style-name="Source_20_Text"><text:span text:style-name="T4">:</text:span></text:span></text:p>
              <text:p text:style-name="P3"><text:span text:style-name="Source_20_Text"><text:span text:style-name="T5"><text:s text:c="12"/></text:span></text:span><text:span text:style-name="Source_20_Text"><text:span text:style-name="T3">if</text:span></text:span><text:span text:style-name="Source_20_Text"><text:span text:style-name="T4"> </text:span></text:span><text:span text:style-name="Source_20_Text"><text:span text:style-name="T8">"move"</text:span></text:span><text:span text:style-name="Source_20_Text"><text:span text:style-name="T4"> </text:span></text:span><text:span text:style-name="Source_20_Text"><text:span text:style-name="T3">in</text:span></text:span><text:span text:style-name="Source_20_Text"><text:span text:style-name="T4"> event_type </text:span></text:span><text:span text:style-name="Source_20_Text"><text:span text:style-name="T3">or</text:span></text:span><text:span text:style-name="Source_20_Text"><text:span text:style-name="T4"> </text:span></text:span><text:span text:style-name="Source_20_Text"><text:span text:style-name="T8">"start"</text:span></text:span><text:span text:style-name="Source_20_Text"><text:span text:style-name="T4"> </text:span></text:span><text:span text:style-name="Source_20_Text"><text:span text:style-name="T3">in</text:span></text:span><text:span text:style-name="Source_20_Text"><text:span text:style-name="T4"> event_type </text:span></text:span><text:span text:style-name="Source_20_Text"><text:span text:style-name="T3">or</text:span></text:span><text:span text:style-name="Source_20_Text"><text:span text:style-name="T4"> </text:span></text:span><text:span text:style-name="Source_20_Text"><text:span text:style-name="T8">"down"</text:span></text:span><text:span text:style-name="Source_20_Text"><text:span text:style-name="T4"> </text:span></text:span><text:span text:style-name="Source_20_Text"><text:span text:style-name="T3">in</text:span></text:span><text:span text:style-name="Source_20_Text"><text:span text:style-name="T4"> event_type:</text:span></text:span></text:p>
              <text:p text:style-name="P4"><text:span text:style-name="Source_20_Text"><text:span text:style-name="T5"><text:s text:c="16"/></text:span></text:span><text:span text:style-name="Source_20_Text"><text:span text:style-name="T4">self.paddle.moveToX(client_x)</text:span></text:span></text:p>
              <text:p text:style-name="P4"><text:span text:style-name="Source_20_Text"><text:span text:style-name="T5"><text:s text:c="8"/></text:span></text:span></text:p>
              <text:p text:style-name="P3"><text:span text:style-name="Source_20_Text"><text:span text:style-name="T5"><text:s text:c="8"/></text:span></text:span><text:span text:style-name="Source_20_Text"><text:span text:style-name="T3">elif</text:span></text:span><text:span text:style-name="Source_20_Text"><text:span text:style-name="T4"> self.game_state == </text:span></text:span><text:span text:style-name="Source_20_Text"><text:span text:style-name="T8">"START"</text:span></text:span><text:span text:style-name="Source_20_Text"><text:span text:style-name="T4">:</text:span></text:span></text:p>
              <text:p text:style-name="P3"><text:span text:style-name="Source_20_Text"><text:span text:style-name="T5"><text:s text:c="12"/></text:span></text:span><text:span text:style-name="Source_20_Text"><text:span text:style-name="T3">if</text:span></text:span><text:span text:style-name="Source_20_Text"><text:span text:style-name="T4"> event_type </text:span></text:span><text:span text:style-name="Source_20_Text"><text:span text:style-name="T3">in</text:span></text:span><text:span text:style-name="Source_20_Text"><text:span text:style-name="T4"> [</text:span></text:span><text:span text:style-name="Source_20_Text"><text:span text:style-name="T8">"touchstart"</text:span></text:span><text:span text:style-name="Source_20_Text"><text:span text:style-name="T4">, </text:span></text:span><text:span text:style-name="Source_20_Text"><text:span text:style-name="T8">"mousedown"</text:span></text:span><text:span text:style-name="Source_20_Text"><text:span text:style-name="T4">]:</text:span></text:span></text:p>
              <text:p text:style-name="P4"><text:span text:style-name="Source_20_Text"><text:span text:style-name="T5"><text:s text:c="16"/></text:span></text:span><text:span text:style-name="Source_20_Text"><text:span text:style-name="T4">self.reset_game()</text:span></text:span></text:p>
              <text:p text:style-name="P4"><text:span text:style-name="Source_20_Text"><text:span text:style-name="T5"><text:s text:c="16"/></text:span></text:span></text:p>
              <text:p text:style-name="P3"><text:span text:style-name="Source_20_Text"><text:span text:style-name="T5"><text:s text:c="8"/></text:span></text:span><text:span text:style-name="Source_20_Text"><text:span text:style-name="T3">elif</text:span></text:span><text:span text:style-name="Source_20_Text"><text:span text:style-name="T4"> self.game_state </text:span></text:span><text:span text:style-name="Source_20_Text"><text:span text:style-name="T3">in</text:span></text:span><text:span text:style-name="Source_20_Text"><text:span text:style-name="T4"> [</text:span></text:span><text:span text:style-name="Source_20_Text"><text:span text:style-name="T8">"GAME_OVER"</text:span></text:span><text:span text:style-name="Source_20_Text"><text:span text:style-name="T4">, </text:span></text:span><text:span text:style-name="Source_20_Text"><text:span text:style-name="T8">"WIN"</text:span></text:span><text:span text:style-name="Source_20_Text"><text:span text:style-name="T4">]:</text:span></text:span></text:p>
              <text:p text:style-name="P3"><text:span text:style-name="Source_20_Text"><text:span text:style-name="T5"><text:s text:c="12"/></text:span></text:span><text:span text:style-name="Source_20_Text"><text:span text:style-name="T3">if</text:span></text:span><text:span text:style-name="Source_20_Text"><text:span text:style-name="T4"> event_type </text:span></text:span><text:span text:style-name="Source_20_Text"><text:span text:style-name="T3">in</text:span></text:span><text:span text:style-name="Source_20_Text"><text:span text:style-name="T4"> [</text:span></text:span><text:span text:style-name="Source_20_Text"><text:span text:style-name="T8">"touchstart"</text:span></text:span><text:span text:style-name="Source_20_Text"><text:span text:style-name="T4">, </text:span></text:span><text:span text:style-name="Source_20_Text"><text:span text:style-name="T8">"mousedown"</text:span></text:span><text:span text:style-name="Source_20_Text"><text:span text:style-name="T4">]:</text:span></text:span></text:p>
              <text:p text:style-name="P4"><text:span text:style-name="Source_20_Text"><text:span text:style-name="T5"><text:s text:c="16"/></text:span></text:span><text:span text:style-name="Source_20_Text"><text:span text:style-name="T4">self.reset_game()</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handle_events</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3">for</text:span></text:span><text:span text:style-name="Source_20_Text"><text:span text:style-name="T4"> event </text:span></text:span><text:span text:style-name="Source_20_Text"><text:span text:style-name="T3">in</text:span></text:span><text:span text:style-name="Source_20_Text"><text:span text:style-name="T4"> pygame.event.get():</text:span></text:span></text:p>
              <text:p text:style-name="P3"><text:span text:style-name="Source_20_Text"><text:span text:style-name="T5"><text:s text:c="12"/></text:span></text:span><text:span text:style-name="Source_20_Text"><text:span text:style-name="T3">if</text:span></text:span><text:span text:style-name="Source_20_Text"><text:span text:style-name="T4"> event.</text:span></text:span><text:span text:style-name="Source_20_Text"><text:span text:style-name="T9">type</text:span></text:span><text:span text:style-name="Source_20_Text"><text:span text:style-name="T4"> == pygame.QUIT:</text:span></text:span></text:p>
              <text:p text:style-name="P4"><text:span text:style-name="Source_20_Text"><text:span text:style-name="T5"><text:s text:c="16"/></text:span></text:span><text:span text:style-name="Source_20_Text"><text:span text:style-name="T4">self.quit_game()</text:span></text:span></text:p>
              <text:p text:style-name="P3"><text:span text:style-name="Source_20_Text"><text:span text:style-name="T5"><text:s text:c="12"/></text:span></text:span><text:span text:style-name="Source_20_Text"><text:span text:style-name="T3">if</text:span></text:span><text:span text:style-name="Source_20_Text"><text:span text:style-name="T4"> event.</text:span></text:span><text:span text:style-name="Source_20_Text"><text:span text:style-name="T9">type</text:span></text:span><text:span text:style-name="Source_20_Text"><text:span text:style-name="T4"> == pygame.KEYDOWN </text:span></text:span><text:span text:style-name="Source_20_Text"><text:span text:style-name="T3">and</text:span></text:span><text:span text:style-name="Source_20_Text"><text:span text:style-name="T4"> event.key == pygame.K_ESCAPE:</text:span></text:span></text:p>
              <text:p text:style-name="P4"><text:span text:style-name="Source_20_Text"><text:span text:style-name="T5"><text:s text:c="16"/></text:span></text:span><text:span text:style-name="Source_20_Text"><text:span text:style-name="T4">self.quit_game()</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handle_wall_collisions</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4"><text:span text:style-name="Source_20_Text"><text:span text:style-name="T5"><text:s text:c="8"/></text:span></text:span><text:span text:style-name="Source_20_Text"><text:span text:style-name="T4">ball_rect = self.ball.rect</text:span></text:span></text:p>
              <text:p text:style-name="P3"><text:span text:style-name="Source_20_Text"><text:span text:style-name="T5"><text:s text:c="8"/></text:span></text:span><text:span text:style-name="Source_20_Text"><text:span text:style-name="T3">if</text:span></text:span><text:span text:style-name="Source_20_Text"><text:span text:style-name="T4"> ball_rect.left &lt;= </text:span></text:span><text:span text:style-name="Source_20_Text"><text:span text:style-name="T12">0</text:span></text:span><text:span text:style-name="Source_20_Text"><text:span text:style-name="T4">:</text:span></text:span></text:p>
              <text:p text:style-name="P3"><text:span text:style-name="Source_20_Text"><text:span text:style-name="T5"><text:s text:c="12"/></text:span></text:span><text:span text:style-name="Source_20_Text"><text:span text:style-name="T4">self.ball.x = </text:span></text:span><text:span text:style-name="Source_20_Text"><text:span text:style-name="T12">0</text:span></text:span></text:p>
              <text:p text:style-name="P4"><text:span text:style-name="Source_20_Text"><text:span text:style-name="T5"><text:s text:c="12"/></text:span></text:span><text:span text:style-name="Source_20_Text"><text:span text:style-name="T4">self.ball.bounce_x()</text:span></text:span></text:p>
              <text:p text:style-name="P3"><text:span text:style-name="Source_20_Text"><text:span text:style-name="T5"><text:s text:c="8"/></text:span></text:span><text:span text:style-name="Source_20_Text"><text:span text:style-name="T3">if</text:span></text:span><text:span text:style-name="Source_20_Text"><text:span text:style-name="T4"> ball_rect.right &gt;= SCREEN_WIDTH:</text:span></text:span></text:p>
              <text:p text:style-name="P4"><text:span text:style-name="Source_20_Text"><text:span text:style-name="T5"><text:s text:c="12"/></text:span></text:span><text:span text:style-name="Source_20_Text"><text:span text:style-name="T4">self.ball.x = SCREEN_WIDTH - self.ball.size</text:span></text:span></text:p>
              <text:p text:style-name="P4"><text:span text:style-name="Source_20_Text"><text:span text:style-name="T5"><text:s text:c="12"/></text:span></text:span><text:span text:style-name="Source_20_Text"><text:span text:style-name="T4">self.ball.bounce_x()</text:span></text:span></text:p>
              <text:p text:style-name="P3"><text:soft-page-break/><text:span text:style-name="Source_20_Text"><text:span text:style-name="T5"><text:s text:c="8"/></text:span></text:span><text:span text:style-name="Source_20_Text"><text:span text:style-name="T3">if</text:span></text:span><text:span text:style-name="Source_20_Text"><text:span text:style-name="T4"> ball_rect.top &lt;= </text:span></text:span><text:span text:style-name="Source_20_Text"><text:span text:style-name="T12">0</text:span></text:span><text:span text:style-name="Source_20_Text"><text:span text:style-name="T4">:</text:span></text:span></text:p>
              <text:p text:style-name="P3"><text:span text:style-name="Source_20_Text"><text:span text:style-name="T5"><text:s text:c="12"/></text:span></text:span><text:span text:style-name="Source_20_Text"><text:span text:style-name="T4">self.ball.y = </text:span></text:span><text:span text:style-name="Source_20_Text"><text:span text:style-name="T12">0</text:span></text:span></text:p>
              <text:p text:style-name="P4"><text:span text:style-name="Source_20_Text"><text:span text:style-name="T5"><text:s text:c="12"/></text:span></text:span><text:span text:style-name="Source_20_Text"><text:span text:style-name="T4">self.ball.bounce_y()</text:span></text:span></text:p>
              <text:p text:style-name="P3"><text:span text:style-name="Source_20_Text"><text:span text:style-name="T5"><text:s text:c="8"/></text:span></text:span><text:span text:style-name="Source_20_Text"><text:span text:style-name="T3">if</text:span></text:span><text:span text:style-name="Source_20_Text"><text:span text:style-name="T4"> ball_rect.top &gt; SCREEN_HEIGHT:</text:span></text:span></text:p>
              <text:p text:style-name="P3"><text:span text:style-name="Source_20_Text"><text:span text:style-name="T5"><text:s text:c="12"/></text:span></text:span><text:span text:style-name="Source_20_Text"><text:span text:style-name="T4">self.lives -= </text:span></text:span><text:span text:style-name="Source_20_Text"><text:span text:style-name="T12">1</text:span></text:span></text:p>
              <text:p text:style-name="P3"><text:span text:style-name="Source_20_Text"><text:span text:style-name="T5"><text:s text:c="12"/></text:span></text:span><text:span text:style-name="Source_20_Text"><text:span text:style-name="T3">if</text:span></text:span><text:span text:style-name="Source_20_Text"><text:span text:style-name="T4"> self.lives &lt;= </text:span></text:span><text:span text:style-name="Source_20_Text"><text:span text:style-name="T12">0</text:span></text:span><text:span text:style-name="Source_20_Text"><text:span text:style-name="T4">:</text:span></text:span></text:p>
              <text:p text:style-name="P3"><text:span text:style-name="Source_20_Text"><text:span text:style-name="T5"><text:s text:c="16"/></text:span></text:span><text:span text:style-name="Source_20_Text"><text:span text:style-name="T4">self.game_state = </text:span></text:span><text:span text:style-name="Source_20_Text"><text:span text:style-name="T8">"GAME_OVER"</text:span></text:span></text:p>
              <text:p text:style-name="P3"><text:span text:style-name="Source_20_Text"><text:span text:style-name="T5"><text:s text:c="12"/></text:span></text:span><text:span text:style-name="Source_20_Text"><text:span text:style-name="T3">else</text:span></text:span><text:span text:style-name="Source_20_Text"><text:span text:style-name="T4">:</text:span></text:span></text:p>
              <text:p text:style-name="P4"><text:span text:style-name="Source_20_Text"><text:span text:style-name="T5"><text:s text:c="16"/></text:span></text:span><text:span text:style-name="Source_20_Text"><text:span text:style-name="T4">self.reset_round()</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handle_paddle_collision</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3">if</text:span></text:span><text:span text:style-name="Source_20_Text"><text:span text:style-name="T4"> self.ball.rect.colliderect(self.paddle.rect) </text:span></text:span><text:span text:style-name="Source_20_Text"><text:span text:style-name="T3">and</text:span></text:span><text:span text:style-name="Source_20_Text"><text:span text:style-name="T4"> self.ball.speed_y &gt; </text:span></text:span><text:span text:style-name="Source_20_Text"><text:span text:style-name="T12">0</text:span></text:span><text:span text:style-name="Source_20_Text"><text:span text:style-name="T4">:</text:span></text:span></text:p>
              <text:p text:style-name="P4"><text:span text:style-name="Source_20_Text"><text:span text:style-name="T5"><text:s text:c="12"/></text:span></text:span><text:span text:style-name="Source_20_Text"><text:span text:style-name="T4">self.ball.y = self.paddle.y - self.ball.size</text:span></text:span></text:p>
              <text:p text:style-name="P4"><text:span text:style-name="Source_20_Text"><text:span text:style-name="T5"><text:s text:c="12"/></text:span></text:span><text:span text:style-name="Source_20_Text"><text:span text:style-name="T4">self.ball.bounce_y()</text:span></text:span></text:p>
              <text:p text:style-name="P3"><text:span text:style-name="Source_20_Text"><text:span text:style-name="T5"><text:s text:c="12"/></text:span></text:span><text:span text:style-name="Source_20_Text"><text:span text:style-name="T4">paddle_center = self.paddle.x + self.paddle.width / </text:span></text:span><text:span text:style-name="Source_20_Text"><text:span text:style-name="T12">2</text:span></text:span></text:p>
              <text:p text:style-name="P3"><text:span text:style-name="Source_20_Text"><text:span text:style-name="T5"><text:s text:c="12"/></text:span></text:span><text:span text:style-name="Source_20_Text"><text:span text:style-name="T4">ball_center = self.ball.x + self.ball.size / </text:span></text:span><text:span text:style-name="Source_20_Text"><text:span text:style-name="T12">2</text:span></text:span></text:p>
              <text:p text:style-name="P4"><text:span text:style-name="Source_20_Text"><text:span text:style-name="T5"><text:s text:c="12"/></text:span></text:span><text:span text:style-name="Source_20_Text"><text:span text:style-name="T4">distance_from_center = ball_center - paddle_center</text:span></text:span></text:p>
              <text:p text:style-name="P3"><text:span text:style-name="Source_20_Text"><text:span text:style-name="T5"><text:s text:c="12"/></text:span></text:span><text:span text:style-name="Source_20_Text"><text:span text:style-name="T4">self.ball.speed_x = distance_from_center / </text:span></text:span><text:span text:style-name="Source_20_Text"><text:span text:style-name="T12">15</text:span></text:span></text:p>
              <text:p text:style-name="P3"><text:span text:style-name="Source_20_Text"><text:span text:style-name="T5"><text:s text:c="12"/></text:span></text:span><text:span text:style-name="Source_20_Text"><text:span text:style-name="T3">if</text:span></text:span><text:span text:style-name="Source_20_Text"><text:span text:style-name="T4"> -</text:span></text:span><text:span text:style-name="Source_20_Text"><text:span text:style-name="T12">1</text:span></text:span><text:span text:style-name="Source_20_Text"><text:span text:style-name="T4"> &lt; self.ball.speed_x &lt; </text:span></text:span><text:span text:style-name="Source_20_Text"><text:span text:style-name="T12">1</text:span></text:span><text:span text:style-name="Source_20_Text"><text:span text:style-name="T4">:</text:span></text:span></text:p>
              <text:p text:style-name="P3"><text:span text:style-name="Source_20_Text"><text:span text:style-name="T5"><text:s text:c="16"/></text:span></text:span><text:span text:style-name="Source_20_Text"><text:span text:style-name="T4">self.ball.speed_x = </text:span></text:span><text:span text:style-name="Source_20_Text"><text:span text:style-name="T12">1</text:span></text:span><text:span text:style-name="Source_20_Text"><text:span text:style-name="T4"> </text:span></text:span><text:span text:style-name="Source_20_Text"><text:span text:style-name="T3">if</text:span></text:span><text:span text:style-name="Source_20_Text"><text:span text:style-name="T4"> self.ball.speed_x &gt;= </text:span></text:span><text:span text:style-name="Source_20_Text"><text:span text:style-name="T12">0</text:span></text:span><text:span text:style-name="Source_20_Text"><text:span text:style-name="T4"> </text:span></text:span><text:span text:style-name="Source_20_Text"><text:span text:style-name="T3">else</text:span></text:span><text:span text:style-name="Source_20_Text"><text:span text:style-name="T4"> -</text:span></text:span><text:span text:style-name="Source_20_Text"><text:span text:style-name="T12">1</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handle_brick_collisions</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3">for</text:span></text:span><text:span text:style-name="Source_20_Text"><text:span text:style-name="T4"> brick </text:span></text:span><text:span text:style-name="Source_20_Text"><text:span text:style-name="T3">in</text:span></text:span><text:span text:style-name="Source_20_Text"><text:span text:style-name="T4"> self.bricks:</text:span></text:span></text:p>
              <text:p text:style-name="P3"><text:span text:style-name="Source_20_Text"><text:span text:style-name="T5"><text:s text:c="12"/></text:span></text:span><text:span text:style-name="Source_20_Text"><text:span text:style-name="T3">if</text:span></text:span><text:span text:style-name="Source_20_Text"><text:span text:style-name="T4"> brick.active </text:span></text:span><text:span text:style-name="Source_20_Text"><text:span text:style-name="T3">and</text:span></text:span><text:span text:style-name="Source_20_Text"><text:span text:style-name="T4"> self.ball.rect.colliderect(brick.rect):</text:span></text:span></text:p>
              <text:p text:style-name="P3"><text:span text:style-name="Source_20_Text"><text:span text:style-name="T5"><text:s text:c="16"/></text:span></text:span><text:span text:style-name="Source_20_Text"><text:span text:style-name="T4">brick.active = </text:span></text:span><text:span text:style-name="Source_20_Text"><text:span text:style-name="T12">False</text:span></text:span></text:p>
              <text:p text:style-name="P4"><text:span text:style-name="Source_20_Text"><text:span text:style-name="T5"><text:s text:c="16"/></text:span></text:span><text:span text:style-name="Source_20_Text"><text:span text:style-name="T4">self.score += brick.points</text:span></text:span></text:p>
              <text:p text:style-name="P4"><text:span text:style-name="Source_20_Text"><text:span text:style-name="T5"><text:s text:c="16"/></text:span></text:span><text:span text:style-name="Source_20_Text"><text:span text:style-name="T4">self.ball.bounce_y()</text:span></text:span></text:p>
              <text:p text:style-name="P3"><text:span text:style-name="Source_20_Text"><text:span text:style-name="T5"><text:s text:c="16"/></text:span></text:span><text:span text:style-name="Source_20_Text"><text:span text:style-name="T3">break</text:span></text:span></text:p>
              <text:p text:style-name="P4"/>
              <text:p text:style-name="P3"><text:span text:style-name="Source_20_Text"><text:span text:style-name="T5"><text:s text:c="8"/></text:span></text:span><text:span text:style-name="Source_20_Text"><text:span text:style-name="T3">if</text:span></text:span><text:span text:style-name="Source_20_Text"><text:span text:style-name="T4"> </text:span></text:span><text:span text:style-name="Source_20_Text"><text:span text:style-name="T9">all</text:span></text:span><text:span text:style-name="Source_20_Text"><text:span text:style-name="T4">(</text:span></text:span><text:span text:style-name="Source_20_Text"><text:span text:style-name="T3">not</text:span></text:span><text:span text:style-name="Source_20_Text"><text:span text:style-name="T4"> brick.active </text:span></text:span><text:span text:style-name="Source_20_Text"><text:span text:style-name="T3">for</text:span></text:span><text:span text:style-name="Source_20_Text"><text:span text:style-name="T4"> brick </text:span></text:span><text:span text:style-name="Source_20_Text"><text:span text:style-name="T3">in</text:span></text:span><text:span text:style-name="Source_20_Text"><text:span text:style-name="T4"> self.bricks):</text:span></text:span></text:p>
              <text:p text:style-name="P3"><text:span text:style-name="Source_20_Text"><text:span text:style-name="T5"><text:s text:c="12"/></text:span></text:span><text:span text:style-name="Source_20_Text"><text:span text:style-name="T3">if</text:span></text:span><text:span text:style-name="Source_20_Text"><text:span text:style-name="T4"> self.level &gt;= </text:span></text:span><text:span text:style-name="Source_20_Text"><text:span text:style-name="T12">3</text:span></text:span><text:span text:style-name="Source_20_Text"><text:span text:style-name="T4">:</text:span></text:span></text:p>
              <text:p text:style-name="P3"><text:span text:style-name="Source_20_Text"><text:span text:style-name="T5"><text:s text:c="16"/></text:span></text:span><text:span text:style-name="Source_20_Text"><text:span text:style-name="T4">self.game_state = </text:span></text:span><text:span text:style-name="Source_20_Text"><text:span text:style-name="T8">"WIN"</text:span></text:span></text:p>
              <text:p text:style-name="P3"><text:span text:style-name="Source_20_Text"><text:span text:style-name="T5"><text:s text:c="12"/></text:span></text:span><text:span text:style-name="Source_20_Text"><text:span text:style-name="T3">else</text:span></text:span><text:span text:style-name="Source_20_Text"><text:span text:style-name="T4">:</text:span></text:span></text:p>
              <text:p text:style-name="P3"><text:span text:style-name="Source_20_Text"><text:span text:style-name="T5"><text:s text:c="16"/></text:span></text:span><text:span text:style-name="Source_20_Text"><text:span text:style-name="T4">self.level += </text:span></text:span><text:span text:style-name="Source_20_Text"><text:span text:style-name="T12">1</text:span></text:span></text:p>
              <text:p text:style-name="P4"><text:span text:style-name="Source_20_Text"><text:span text:style-name="T5"><text:s text:c="16"/></text:span></text:span><text:span text:style-name="Source_20_Text"><text:span text:style-name="T4">self.create_bricks()</text:span></text:span></text:p>
              <text:p text:style-name="P4"><text:span text:style-name="Source_20_Text"><text:span text:style-name="T5"><text:s text:c="16"/></text:span></text:span><text:span text:style-name="Source_20_Text"><text:span text:style-name="T4">self.reset_round()</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update</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3">if</text:span></text:span><text:span text:style-name="Source_20_Text"><text:span text:style-name="T4"> self.game_state == </text:span></text:span><text:span text:style-name="Source_20_Text"><text:span text:style-name="T8">"PLAYING"</text:span></text:span><text:span text:style-name="Source_20_Text"><text:span text:style-name="T4">:</text:span></text:span></text:p>
              <text:p text:style-name="P4"><text:span text:style-name="Source_20_Text"><text:span text:style-name="T5"><text:s text:c="12"/></text:span></text:span><text:span text:style-name="Source_20_Text"><text:span text:style-name="T4">self.ball.move()</text:span></text:span></text:p>
              <text:p text:style-name="P4"><text:span text:style-name="Source_20_Text"><text:span text:style-name="T5"><text:s text:c="12"/></text:span></text:span><text:span text:style-name="Source_20_Text"><text:span text:style-name="T4">self.handle_wall_collisions()</text:span></text:span></text:p>
              <text:p text:style-name="P4"><text:span text:style-name="Source_20_Text"><text:span text:style-name="T5"><text:s text:c="12"/></text:span></text:span><text:span text:style-name="Source_20_Text"><text:span text:style-name="T4">self.handle_paddle_collision()</text:span></text:span></text:p>
              <text:p text:style-name="P4"><text:soft-page-break/><text:span text:style-name="Source_20_Text"><text:span text:style-name="T5"><text:s text:c="12"/></text:span></text:span><text:span text:style-name="Source_20_Text"><text:span text:style-name="T4">self.handle_brick_collisions()</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draw_text_centered</text:span></text:span><text:span text:style-name="Source_20_Text"><text:span text:style-name="T4">(self, text: </text:span></text:span><text:span text:style-name="Source_20_Text"><text:span text:style-name="T9">str</text:span></text:span><text:span text:style-name="Source_20_Text"><text:span text:style-name="T4">, font: pygame.font.Font, color: </text:span></text:span><text:span text:style-name="Source_20_Text"><text:span text:style-name="T9">tuple</text:span></text:span><text:span text:style-name="Source_20_Text"><text:span text:style-name="T4">, y: </text:span></text:span><text:span text:style-name="Source_20_Text"><text:span text:style-name="T9">int</text:span></text:span><text:span text:style-name="Source_20_Text"><text:span text:style-name="T4">)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text_surface = font.render(text, </text:span></text:span><text:span text:style-name="Source_20_Text"><text:span text:style-name="T12">True</text:span></text:span><text:span text:style-name="Source_20_Text"><text:span text:style-name="T4">, color)</text:span></text:span></text:p>
              <text:p text:style-name="P3"><text:span text:style-name="Source_20_Text"><text:span text:style-name="T5"><text:s text:c="8"/></text:span></text:span><text:span text:style-name="Source_20_Text"><text:span text:style-name="T4">text_rect = text_surface.get_rect(center=(SCREEN_WIDTH // </text:span></text:span><text:span text:style-name="Source_20_Text"><text:span text:style-name="T12">2</text:span></text:span><text:span text:style-name="Source_20_Text"><text:span text:style-name="T4">, y))</text:span></text:span></text:p>
              <text:p text:style-name="P4"><text:span text:style-name="Source_20_Text"><text:span text:style-name="T5"><text:s text:c="8"/></text:span></text:span><text:span text:style-name="Source_20_Text"><text:span text:style-name="T4">self.screen.blit(text_surface, text_rect)</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draw_hud</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score_text = self.small_font.render(</text:span></text:span><text:span text:style-name="Source_20_Text"><text:span text:style-name="T8">f"Score: {self.score}"</text:span></text:span><text:span text:style-name="Source_20_Text"><text:span text:style-name="T4">, </text:span></text:span><text:span text:style-name="Source_20_Text"><text:span text:style-name="T12">True</text:span></text:span><text:span text:style-name="Source_20_Text"><text:span text:style-name="T4">, WHITE)</text:span></text:span></text:p>
              <text:p text:style-name="P3"><text:span text:style-name="Source_20_Text"><text:span text:style-name="T5"><text:s text:c="8"/></text:span></text:span><text:span text:style-name="Source_20_Text"><text:span text:style-name="T4">lives_text = self.small_font.render(</text:span></text:span><text:span text:style-name="Source_20_Text"><text:span text:style-name="T8">f"Lives: {self.lives}"</text:span></text:span><text:span text:style-name="Source_20_Text"><text:span text:style-name="T4">, </text:span></text:span><text:span text:style-name="Source_20_Text"><text:span text:style-name="T12">True</text:span></text:span><text:span text:style-name="Source_20_Text"><text:span text:style-name="T4">, WHITE)</text:span></text:span></text:p>
              <text:p text:style-name="P3"><text:span text:style-name="Source_20_Text"><text:span text:style-name="T5"><text:s text:c="8"/></text:span></text:span><text:span text:style-name="Source_20_Text"><text:span text:style-name="T4">level_text = self.small_font.render(</text:span></text:span><text:span text:style-name="Source_20_Text"><text:span text:style-name="T8">f"Level: {self.level}"</text:span></text:span><text:span text:style-name="Source_20_Text"><text:span text:style-name="T4">, </text:span></text:span><text:span text:style-name="Source_20_Text"><text:span text:style-name="T12">True</text:span></text:span><text:span text:style-name="Source_20_Text"><text:span text:style-name="T4">, WHITE)</text:span></text:span></text:p>
              <text:p text:style-name="P3"><text:span text:style-name="Source_20_Text"><text:span text:style-name="T5"><text:s text:c="8"/></text:span></text:span><text:span text:style-name="Source_20_Text"><text:span text:style-name="T4">self.screen.blit(score_text, (</text:span></text:span><text:span text:style-name="Source_20_Text"><text:span text:style-name="T12">20</text:span></text:span><text:span text:style-name="Source_20_Text"><text:span text:style-name="T4">, </text:span></text:span><text:span text:style-name="Source_20_Text"><text:span text:style-name="T12">20</text:span></text:span><text:span text:style-name="Source_20_Text"><text:span text:style-name="T4">))</text:span></text:span></text:p>
              <text:p text:style-name="P3"><text:span text:style-name="Source_20_Text"><text:span text:style-name="T5"><text:s text:c="8"/></text:span></text:span><text:span text:style-name="Source_20_Text"><text:span text:style-name="T4">self.screen.blit(lives_text, (SCREEN_WIDTH // </text:span></text:span><text:span text:style-name="Source_20_Text"><text:span text:style-name="T12">2</text:span></text:span><text:span text:style-name="Source_20_Text"><text:span text:style-name="T4"> - </text:span></text:span><text:span text:style-name="Source_20_Text"><text:span text:style-name="T12">45</text:span></text:span><text:span text:style-name="Source_20_Text"><text:span text:style-name="T4">, </text:span></text:span><text:span text:style-name="Source_20_Text"><text:span text:style-name="T12">20</text:span></text:span><text:span text:style-name="Source_20_Text"><text:span text:style-name="T4">))</text:span></text:span></text:p>
              <text:p text:style-name="P3"><text:span text:style-name="Source_20_Text"><text:span text:style-name="T5"><text:s text:c="8"/></text:span></text:span><text:span text:style-name="Source_20_Text"><text:span text:style-name="T4">self.screen.blit(level_text, (SCREEN_WIDTH - </text:span></text:span><text:span text:style-name="Source_20_Text"><text:span text:style-name="T12">110</text:span></text:span><text:span text:style-name="Source_20_Text"><text:span text:style-name="T4">, </text:span></text:span><text:span text:style-name="Source_20_Text"><text:span text:style-name="T12">20</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draw_start_screen</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BREAKOUT"</text:span></text:span><text:span text:style-name="Source_20_Text"><text:span text:style-name="T4">, self.title_font, LIGHT_BLUE, </text:span></text:span><text:span text:style-name="Source_20_Text"><text:span text:style-name="T12">190</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Server + Touch Edition"</text:span></text:span><text:span text:style-name="Source_20_Text"><text:span text:style-name="T4">, self.medium_font, WHITE, </text:span></text:span><text:span text:style-name="Source_20_Text"><text:span text:style-name="T12">240</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Tap/Click device screen to Start"</text:span></text:span><text:span text:style-name="Source_20_Text"><text:span text:style-name="T4">, self.small_font, WHITE, </text:span></text:span><text:span text:style-name="Source_20_Text"><text:span text:style-name="T12">310</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Drag on your mobile screen to track paddle"</text:span></text:span><text:span text:style-name="Source_20_Text"><text:span text:style-name="T4">, self.small_font, GRAY, </text:span></text:span><text:span text:style-name="Source_20_Text"><text:span text:style-name="T12">350</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Press ESC on desktop to quit"</text:span></text:span><text:span text:style-name="Source_20_Text"><text:span text:style-name="T4">, self.small_font, GRAY, </text:span></text:span><text:span text:style-name="Source_20_Text"><text:span text:style-name="T12">385</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draw_game_over_screen</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GAME OVER"</text:span></text:span><text:span text:style-name="Source_20_Text"><text:span text:style-name="T4">, self.title_font, RED, </text:span></text:span><text:span text:style-name="Source_20_Text"><text:span text:style-name="T12">230</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f"Final Score: {self.score}"</text:span></text:span><text:span text:style-name="Source_20_Text"><text:span text:style-name="T4">, self.medium_font, WHITE, </text:span></text:span><text:span text:style-name="Source_20_Text"><text:span text:style-name="T12">290</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Tap device screen to Restart"</text:span></text:span><text:span text:style-name="Source_20_Text"><text:span text:style-name="T4">, self.small_font, GRAY, </text:span></text:span><text:span text:style-name="Source_20_Text"><text:span text:style-name="T12">350</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draw_win_screen</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YOU WIN!"</text:span></text:span><text:span text:style-name="Source_20_Text"><text:span text:style-name="T4">, self.title_font, GREEN, </text:span></text:span><text:span text:style-name="Source_20_Text"><text:span text:style-name="T12">230</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f"Final Score: {self.score}"</text:span></text:span><text:span text:style-name="Source_20_Text"><text:span text:style-name="T4">, self.medium_font, WHITE, </text:span></text:span><text:span text:style-name="Source_20_Text"><text:span text:style-name="T12">290</text:span></text:span><text:span text:style-name="Source_20_Text"><text:span text:style-name="T4">)</text:span></text:span></text:p>
              <text:p text:style-name="P3"><text:span text:style-name="Source_20_Text"><text:span text:style-name="T5"><text:s text:c="8"/></text:span></text:span><text:span text:style-name="Source_20_Text"><text:span text:style-name="T4">self.draw_text_centered(</text:span></text:span><text:span text:style-name="Source_20_Text"><text:span text:style-name="T8">"Tap device screen to Play Again"</text:span></text:span><text:span text:style-name="Source_20_Text"><text:span text:style-name="T4">, self.small_font, GRAY, </text:span></text:span><text:span text:style-name="Source_20_Text"><text:span text:style-name="T12">350</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draw</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4"><text:span text:style-name="Source_20_Text"><text:span text:style-name="T5"><text:s text:c="8"/></text:span></text:span><text:span text:style-name="Source_20_Text"><text:span text:style-name="T4">self.screen.fill(BLACK)</text:span></text:span></text:p>
              <text:p text:style-name="P3"><text:span text:style-name="Source_20_Text"><text:span text:style-name="T5"><text:s text:c="8"/></text:span></text:span><text:span text:style-name="Source_20_Text"><text:span text:style-name="T3">if</text:span></text:span><text:span text:style-name="Source_20_Text"><text:span text:style-name="T4"> self.game_state == </text:span></text:span><text:span text:style-name="Source_20_Text"><text:span text:style-name="T8">"START"</text:span></text:span><text:span text:style-name="Source_20_Text"><text:span text:style-name="T4">:</text:span></text:span></text:p>
              <text:p text:style-name="P4"><text:span text:style-name="Source_20_Text"><text:span text:style-name="T5"><text:s text:c="12"/></text:span></text:span><text:span text:style-name="Source_20_Text"><text:span text:style-name="T4">self.draw_start_screen()</text:span></text:span></text:p>
              <text:p text:style-name="P3"><text:span text:style-name="Source_20_Text"><text:span text:style-name="T5"><text:s text:c="8"/></text:span></text:span><text:span text:style-name="Source_20_Text"><text:span text:style-name="T3">elif</text:span></text:span><text:span text:style-name="Source_20_Text"><text:span text:style-name="T4"> self.game_state == </text:span></text:span><text:span text:style-name="Source_20_Text"><text:span text:style-name="T8">"PLAYING"</text:span></text:span><text:span text:style-name="Source_20_Text"><text:span text:style-name="T4">:</text:span></text:span></text:p>
              <text:p text:style-name="P4"><text:span text:style-name="Source_20_Text"><text:span text:style-name="T5"><text:s text:c="12"/></text:span></text:span><text:span text:style-name="Source_20_Text"><text:span text:style-name="T4">self.draw_hud()</text:span></text:span></text:p>
              <text:p text:style-name="P4"><text:span text:style-name="Source_20_Text"><text:span text:style-name="T5"><text:s text:c="12"/></text:span></text:span><text:span text:style-name="Source_20_Text"><text:span text:style-name="T4">self.paddle.draw(self.screen)</text:span></text:span></text:p>
              <text:p text:style-name="P4"><text:span text:style-name="Source_20_Text"><text:span text:style-name="T5"><text:s text:c="12"/></text:span></text:span><text:span text:style-name="Source_20_Text"><text:span text:style-name="T4">self.ball.draw(self.screen)</text:span></text:span></text:p>
              <text:p text:style-name="P3"><text:span text:style-name="Source_20_Text"><text:span text:style-name="T5"><text:s text:c="12"/></text:span></text:span><text:span text:style-name="Source_20_Text"><text:span text:style-name="T3">for</text:span></text:span><text:span text:style-name="Source_20_Text"><text:span text:style-name="T4"> brick </text:span></text:span><text:span text:style-name="Source_20_Text"><text:span text:style-name="T3">in</text:span></text:span><text:span text:style-name="Source_20_Text"><text:span text:style-name="T4"> self.bricks:</text:span></text:span></text:p>
              <text:p text:style-name="P4"><text:soft-page-break/><text:span text:style-name="Source_20_Text"><text:span text:style-name="T5"><text:s text:c="16"/></text:span></text:span><text:span text:style-name="Source_20_Text"><text:span text:style-name="T4">brick.draw(self.screen)</text:span></text:span></text:p>
              <text:p text:style-name="P3"><text:span text:style-name="Source_20_Text"><text:span text:style-name="T5"><text:s text:c="8"/></text:span></text:span><text:span text:style-name="Source_20_Text"><text:span text:style-name="T3">elif</text:span></text:span><text:span text:style-name="Source_20_Text"><text:span text:style-name="T4"> self.game_state == </text:span></text:span><text:span text:style-name="Source_20_Text"><text:span text:style-name="T8">"GAME_OVER"</text:span></text:span><text:span text:style-name="Source_20_Text"><text:span text:style-name="T4">:</text:span></text:span></text:p>
              <text:p text:style-name="P4"><text:span text:style-name="Source_20_Text"><text:span text:style-name="T5"><text:s text:c="12"/></text:span></text:span><text:span text:style-name="Source_20_Text"><text:span text:style-name="T4">self.draw_game_over_screen()</text:span></text:span></text:p>
              <text:p text:style-name="P3"><text:span text:style-name="Source_20_Text"><text:span text:style-name="T5"><text:s text:c="8"/></text:span></text:span><text:span text:style-name="Source_20_Text"><text:span text:style-name="T3">elif</text:span></text:span><text:span text:style-name="Source_20_Text"><text:span text:style-name="T4"> self.game_state == </text:span></text:span><text:span text:style-name="Source_20_Text"><text:span text:style-name="T8">"WIN"</text:span></text:span><text:span text:style-name="Source_20_Text"><text:span text:style-name="T4">:</text:span></text:span></text:p>
              <text:p text:style-name="P4"><text:span text:style-name="Source_20_Text"><text:span text:style-name="T5"><text:s text:c="12"/></text:span></text:span><text:span text:style-name="Source_20_Text"><text:span text:style-name="T4">self.draw_win_screen()</text:span></text:span></text:p>
              <text:p text:style-name="P4"><text:span text:style-name="Source_20_Text"><text:span text:style-name="T5"><text:s text:c="8"/></text:span></text:span><text:span text:style-name="Source_20_Text"><text:span text:style-name="T4">pygame.display.flip()</text:span></text:span></text:p>
              <text:p text:style-name="P4"/>
              <text:p text:style-name="P3"><text:span text:style-name="Source_20_Text"><text:span text:style-name="T5"><text:s text:c="4"/></text:span></text:span><text:span text:style-name="Source_20_Text"><text:span text:style-name="T3">def</text:span></text:span><text:span text:style-name="Source_20_Text"><text:span text:style-name="T4"> </text:span></text:span><text:span text:style-name="Source_20_Text"><text:span text:style-name="T7">quit_game</text:span></text:span><text:span text:style-name="Source_20_Text"><text:span text:style-name="T4">(self) -&gt; </text:span></text:span><text:span text:style-name="Source_20_Text"><text:span text:style-name="T3">None</text:span></text:span><text:span text:style-name="Source_20_Text"><text:span text:style-name="T4">:</text:span></text:span></text:p>
              <text:p text:style-name="P4"><text:span text:style-name="Source_20_Text"><text:span text:style-name="T5"><text:s text:c="8"/></text:span></text:span><text:span text:style-name="Source_20_Text"><text:span text:style-name="T4">pygame.quit()</text:span></text:span></text:p>
              <text:p text:style-name="P4"><text:span text:style-name="Source_20_Text"><text:span text:style-name="T5"><text:s text:c="8"/></text:span></text:span><text:span text:style-name="Source_20_Text"><text:span text:style-name="T4">sys.exit()</text:span></text:span></text:p>
              <text:p text:style-name="P4"/>
              <text:p text:style-name="P4"/>
              <text:p text:style-name="P3"><text:span text:style-name="Source_20_Text"><text:span text:style-name="T6"># ============================================================</text:span></text:span></text:p>
              <text:p text:style-name="P3"><text:span text:style-name="Source_20_Text"><text:span text:style-name="T6"># ASYNC SERVER &amp; GAME LOOP INTEGRATION</text:span></text:span></text:p>
              <text:p text:style-name="P3"><text:span text:style-name="Source_20_Text"><text:span text:style-name="T6"># ============================================================</text:span></text:span></text:p>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handle_index</text:span></text:span><text:span text:style-name="Source_20_Text"><text:span text:style-name="T4">(request):</text:span></text:span></text:p>
              <text:p text:style-name="P3"><text:span text:style-name="Source_20_Text"><text:span text:style-name="T5"><text:s text:c="4"/></text:span></text:span><text:span text:style-name="Source_20_Text"><text:span text:style-name="T8">"""Serves your clientA.html template."""</text:span></text:span></text:p>
              <text:p text:style-name="P3"><text:span text:style-name="Source_20_Text"><text:span text:style-name="T5"><text:s text:c="4"/></text:span></text:span><text:span text:style-name="Source_20_Text"><text:span text:style-name="T3">if</text:span></text:span><text:span text:style-name="Source_20_Text"><text:span text:style-name="T4"> os.path.exists(</text:span></text:span><text:span text:style-name="Source_20_Text"><text:span text:style-name="T8">'clientA.html'</text:span></text:span><text:span text:style-name="Source_20_Text"><text:span text:style-name="T4">):</text:span></text:span></text:p>
              <text:p text:style-name="P3"><text:span text:style-name="Source_20_Text"><text:span text:style-name="T5"><text:s text:c="8"/></text:span></text:span><text:span text:style-name="Source_20_Text"><text:span text:style-name="T3">return</text:span></text:span><text:span text:style-name="Source_20_Text"><text:span text:style-name="T4"> web.FileResponse(</text:span></text:span><text:span text:style-name="Source_20_Text"><text:span text:style-name="T8">'clientA.html'</text:span></text:span><text:span text:style-name="Source_20_Text"><text:span text:style-name="T4">)</text:span></text:span></text:p>
              <text:p text:style-name="P3"><text:span text:style-name="Source_20_Text"><text:span text:style-name="T5"><text:s text:c="4"/></text:span></text:span><text:span text:style-name="Source_20_Text"><text:span text:style-name="T3">else</text:span></text:span><text:span text:style-name="Source_20_Text"><text:span text:style-name="T4">:</text:span></text:span></text:p>
              <text:p text:style-name="P3"><text:span text:style-name="Source_20_Text"><text:span text:style-name="T5"><text:s text:c="8"/></text:span></text:span><text:span text:style-name="Source_20_Text"><text:span text:style-name="T3">return</text:span></text:span><text:span text:style-name="Source_20_Text"><text:span text:style-name="T4"> web.Response(text=</text:span></text:span><text:span text:style-name="Source_20_Text"><text:span text:style-name="T8">"Error: clientA.html not found."</text:span></text:span><text:span text:style-name="Source_20_Text"><text:span text:style-name="T4">, status=</text:span></text:span><text:span text:style-name="Source_20_Text"><text:span text:style-name="T12">404</text:span></text:span><text:span text:style-name="Source_20_Text"><text:span text:style-name="T4">)</text:span></text:span></text:p>
              <text:p text:style-name="P4"/>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websocket_handler</text:span></text:span><text:span text:style-name="Source_20_Text"><text:span text:style-name="T4">(request):</text:span></text:span></text:p>
              <text:p text:style-name="P3"><text:span text:style-name="Source_20_Text"><text:span text:style-name="T5"><text:s text:c="4"/></text:span></text:span><text:span text:style-name="Source_20_Text"><text:span text:style-name="T8">"""Streams mobile touch configurations straight into the Pygame logic."""</text:span></text:span></text:p>
              <text:p text:style-name="P4"><text:span text:style-name="Source_20_Text"><text:span text:style-name="T5"><text:s text:c="4"/></text:span></text:span><text:span text:style-name="Source_20_Text"><text:span text:style-name="T4">ws = web.WebSocketResponse()</text:span></text:span></text:p>
              <text:p text:style-name="P3"><text:span text:style-name="Source_20_Text"><text:span text:style-name="T5"><text:s text:c="4"/></text:span></text:span><text:span text:style-name="Source_20_Text"><text:span text:style-name="T3">await</text:span></text:span><text:span text:style-name="Source_20_Text"><text:span text:style-name="T4"> ws.prepare(request)</text:span></text:span></text:p>
              <text:p text:style-name="P4"/>
              <text:p text:style-name="P3"><text:span text:style-name="Source_20_Text"><text:span text:style-name="T5"><text:s text:c="4"/></text:span></text:span><text:span text:style-name="Source_20_Text"><text:span text:style-name="T4">print(</text:span></text:span><text:span text:style-name="Source_20_Text"><text:span text:style-name="T8">"⚡ Mobile Controller Linked via WebSocket!"</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3">async</text:span></text:span><text:span text:style-name="Source_20_Text"><text:span text:style-name="T4"> </text:span></text:span><text:span text:style-name="Source_20_Text"><text:span text:style-name="T3">for</text:span></text:span><text:span text:style-name="Source_20_Text"><text:span text:style-name="T4"> msg </text:span></text:span><text:span text:style-name="Source_20_Text"><text:span text:style-name="T3">in</text:span></text:span><text:span text:style-name="Source_20_Text"><text:span text:style-name="T4"> ws:</text:span></text:span></text:p>
              <text:p text:style-name="P3"><text:span text:style-name="Source_20_Text"><text:span text:style-name="T5"><text:s text:c="8"/></text:span></text:span><text:span text:style-name="Source_20_Text"><text:span text:style-name="T3">if</text:span></text:span><text:span text:style-name="Source_20_Text"><text:span text:style-name="T4"> msg.</text:span></text:span><text:span text:style-name="Source_20_Text"><text:span text:style-name="T9">type</text:span></text:span><text:span text:style-name="Source_20_Text"><text:span text:style-name="T4"> == web.WSMsgType.TEXT:</text:span></text:span></text:p>
              <text:p text:style-name="P3"><text:span text:style-name="Source_20_Text"><text:span text:style-name="T5"><text:s text:c="12"/></text:span></text:span><text:span text:style-name="Source_20_Text"><text:span text:style-name="T3">try</text:span></text:span><text:span text:style-name="Source_20_Text"><text:span text:style-name="T4">:</text:span></text:span></text:p>
              <text:p text:style-name="P4"><text:span text:style-name="Source_20_Text"><text:span text:style-name="T5"><text:s text:c="16"/></text:span></text:span><text:span text:style-name="Source_20_Text"><text:span text:style-name="T4">data = json.loads(msg.data)</text:span></text:span></text:p>
              <text:p text:style-name="P3"><text:span text:style-name="Source_20_Text"><text:span text:style-name="T5"><text:s text:c="16"/></text:span></text:span><text:span text:style-name="Source_20_Text"><text:span text:style-name="T4">event_type = data.get(</text:span></text:span><text:span text:style-name="Source_20_Text"><text:span text:style-name="T8">'event'</text:span></text:span><text:span text:style-name="Source_20_Text"><text:span text:style-name="T4">)</text:span></text:span></text:p>
              <text:p text:style-name="P3"><text:span text:style-name="Source_20_Text"><text:span text:style-name="T5"><text:s text:c="16"/></text:span></text:span><text:span text:style-name="Source_20_Text"><text:span text:style-name="T4">x_coord = data.get(</text:span></text:span><text:span text:style-name="Source_20_Text"><text:span text:style-name="T8">'x'</text:span></text:span><text:span text:style-name="Source_20_Text"><text:span text:style-name="T4">, </text:span></text:span><text:span text:style-name="Source_20_Text"><text:span text:style-name="T12">0</text:span></text:span><text:span text:style-name="Source_20_Text"><text:span text:style-name="T4">)</text:span></text:span></text:p>
              <text:p text:style-name="P4"><text:span text:style-name="Source_20_Text"><text:span text:style-name="T5"><text:s text:c="16"/></text:span></text:span></text:p>
              <text:p text:style-name="P3"><text:span text:style-name="Source_20_Text"><text:span text:style-name="T5"><text:s text:c="16"/></text:span></text:span><text:span text:style-name="Source_20_Text"><text:span text:style-name="T6"># Pass the touch coordinate into the active game loop</text:span></text:span></text:p>
              <text:p text:style-name="P3"><text:span text:style-name="Source_20_Text"><text:span text:style-name="T5"><text:s text:c="16"/></text:span></text:span><text:span text:style-name="Source_20_Text"><text:span text:style-name="T3">if</text:span></text:span><text:span text:style-name="Source_20_Text"><text:span text:style-name="T4"> game_instance </text:span></text:span><text:span text:style-name="Source_20_Text"><text:span text:style-name="T3">is</text:span></text:span><text:span text:style-name="Source_20_Text"><text:span text:style-name="T4"> </text:span></text:span><text:span text:style-name="Source_20_Text"><text:span text:style-name="T3">not</text:span></text:span><text:span text:style-name="Source_20_Text"><text:span text:style-name="T4"> </text:span></text:span><text:span text:style-name="Source_20_Text"><text:span text:style-name="T12">None</text:span></text:span><text:span text:style-name="Source_20_Text"><text:span text:style-name="T4">:</text:span></text:span></text:p>
              <text:p text:style-name="P3"><text:span text:style-name="Source_20_Text"><text:span text:style-name="T5"><text:s text:c="20"/></text:span></text:span><text:span text:style-name="Source_20_Text"><text:span text:style-name="T4">game_instance.handle_touch_input(event_type, </text:span></text:span><text:span text:style-name="Source_20_Text"><text:span text:style-name="T9">int</text:span></text:span><text:span text:style-name="Source_20_Text"><text:span text:style-name="T4">(x_coord))</text:span></text:span></text:p>
              <text:p text:style-name="P4"><text:span text:style-name="Source_20_Text"><text:span text:style-name="T5"><text:s text:c="20"/></text:span></text:span></text:p>
              <text:p text:style-name="P3"><text:span text:style-name="Source_20_Text"><text:span text:style-name="T5"><text:s text:c="12"/></text:span></text:span><text:span text:style-name="Source_20_Text"><text:span text:style-name="T3">except</text:span></text:span><text:span text:style-name="Source_20_Text"><text:span text:style-name="T4"> (json.JSONDecodeError, ValueError):</text:span></text:span></text:p>
              <text:p text:style-name="P3"><text:span text:style-name="Source_20_Text"><text:span text:style-name="T5"><text:s text:c="16"/></text:span></text:span><text:span text:style-name="Source_20_Text"><text:span text:style-name="T3">pass</text:span></text:span></text:p>
              <text:p text:style-name="P3"><text:soft-page-break/><text:span text:style-name="Source_20_Text"><text:span text:style-name="T5"><text:s text:c="4"/></text:span></text:span><text:span text:style-name="Source_20_Text"><text:span text:style-name="T3">return</text:span></text:span><text:span text:style-name="Source_20_Text"><text:span text:style-name="T4"> ws</text:span></text:span></text:p>
              <text:p text:style-name="P4"/>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main_game_loop</text:span></text:span><text:span text:style-name="Source_20_Text"><text:span text:style-name="T4">(game):</text:span></text:span></text:p>
              <text:p text:style-name="P3"><text:span text:style-name="Source_20_Text"><text:span text:style-name="T5"><text:s text:c="4"/></text:span></text:span><text:span text:style-name="Source_20_Text"><text:span text:style-name="T8">"""Asynchronous wrapper running alongside the HTTP/WS server."""</text:span></text:span></text:p>
              <text:p text:style-name="P3"><text:span text:style-name="Source_20_Text"><text:span text:style-name="T5"><text:s text:c="4"/></text:span></text:span><text:span text:style-name="Source_20_Text"><text:span text:style-name="T3">while</text:span></text:span><text:span text:style-name="Source_20_Text"><text:span text:style-name="T4"> </text:span></text:span><text:span text:style-name="Source_20_Text"><text:span text:style-name="T12">True</text:span></text:span><text:span text:style-name="Source_20_Text"><text:span text:style-name="T4">:</text:span></text:span></text:p>
              <text:p text:style-name="P4"><text:span text:style-name="Source_20_Text"><text:span text:style-name="T5"><text:s text:c="8"/></text:span></text:span><text:span text:style-name="Source_20_Text"><text:span text:style-name="T4">game.handle_events()</text:span></text:span></text:p>
              <text:p text:style-name="P4"><text:span text:style-name="Source_20_Text"><text:span text:style-name="T5"><text:s text:c="8"/></text:span></text:span><text:span text:style-name="Source_20_Text"><text:span text:style-name="T4">game.update()</text:span></text:span></text:p>
              <text:p text:style-name="P4"><text:span text:style-name="Source_20_Text"><text:span text:style-name="T5"><text:s text:c="8"/></text:span></text:span><text:span text:style-name="Source_20_Text"><text:span text:style-name="T4">game.draw()</text:span></text:span></text:p>
              <text:p text:style-name="P4"><text:span text:style-name="Source_20_Text"><text:span text:style-name="T5"><text:s text:c="8"/></text:span></text:span></text:p>
              <text:p text:style-name="P3"><text:span text:style-name="Source_20_Text"><text:span text:style-name="T5"><text:s text:c="8"/></text:span></text:span><text:span text:style-name="Source_20_Text"><text:span text:style-name="T6"># yield control to let aiohttp process network requests </text:span></text:span></text:p>
              <text:p text:style-name="P3"><text:span text:style-name="Source_20_Text"><text:span text:style-name="T5"><text:s text:c="8"/></text:span></text:span><text:span text:style-name="Source_20_Text"><text:span text:style-name="T6"># 1/60th of a second delay matches our target 60 FPS</text:span></text:span></text:p>
              <text:p text:style-name="P3"><text:span text:style-name="Source_20_Text"><text:span text:style-name="T5"><text:s text:c="8"/></text:span></text:span><text:span text:style-name="Source_20_Text"><text:span text:style-name="T3">await</text:span></text:span><text:span text:style-name="Source_20_Text"><text:span text:style-name="T4"> asyncio.sleep(</text:span></text:span><text:span text:style-name="Source_20_Text"><text:span text:style-name="T12">1</text:span></text:span><text:span text:style-name="Source_20_Text"><text:span text:style-name="T4"> / FPS)</text:span></text:span></text:p>
              <text:p text:style-name="P4"/>
              <text:p text:style-name="P3"><text:span text:style-name="Source_20_Text"><text:span text:style-name="T3">async</text:span></text:span><text:span text:style-name="Source_20_Text"><text:span text:style-name="T4"> </text:span></text:span><text:span text:style-name="Source_20_Text"><text:span text:style-name="T3">def</text:span></text:span><text:span text:style-name="Source_20_Text"><text:span text:style-name="T4"> </text:span></text:span><text:span text:style-name="Source_20_Text"><text:span text:style-name="T7">start_async_app</text:span></text:span><text:span text:style-name="Source_20_Text"><text:span text:style-name="T4">():</text:span></text:span></text:p>
              <text:p text:style-name="P3"><text:span text:style-name="Source_20_Text"><text:span text:style-name="T5"><text:s text:c="4"/></text:span></text:span><text:span text:style-name="Source_20_Text"><text:span text:style-name="T3">global</text:span></text:span><text:span text:style-name="Source_20_Text"><text:span text:style-name="T4"> game_instance</text:span></text:span></text:p>
              <text:p text:style-name="P4"><text:span text:style-name="Source_20_Text"><text:span text:style-name="T5"><text:s text:c="4"/></text:span></text:span><text:span text:style-name="Source_20_Text"><text:span text:style-name="T4">game_instance = Game()</text:span></text:span></text:p>
              <text:p text:style-name="P4"/>
              <text:p text:style-name="P4"><text:span text:style-name="Source_20_Text"><text:span text:style-name="T5"><text:s text:c="4"/></text:span></text:span><text:span text:style-name="Source_20_Text"><text:span text:style-name="T4">app = web.Application()</text:span></text:span></text:p>
              <text:p text:style-name="P4"><text:span text:style-name="Source_20_Text"><text:span text:style-name="T5"><text:s text:c="4"/></text:span></text:span><text:span text:style-name="Source_20_Text"><text:span text:style-name="T4">app.add_routes([</text:span></text:span></text:p>
              <text:p text:style-name="P3"><text:span text:style-name="Source_20_Text"><text:span text:style-name="T5"><text:s text:c="8"/></text:span></text:span><text:span text:style-name="Source_20_Text"><text:span text:style-name="T4">web.get(</text:span></text:span><text:span text:style-name="Source_20_Text"><text:span text:style-name="T8">'/'</text:span></text:span><text:span text:style-name="Source_20_Text"><text:span text:style-name="T4">, handle_index),</text:span></text:span></text:p>
              <text:p text:style-name="P3"><text:span text:style-name="Source_20_Text"><text:span text:style-name="T5"><text:s text:c="8"/></text:span></text:span><text:span text:style-name="Source_20_Text"><text:span text:style-name="T4">web.get(</text:span></text:span><text:span text:style-name="Source_20_Text"><text:span text:style-name="T8">'/ws'</text:span></text:span><text:span text:style-name="Source_20_Text"><text:span text:style-name="T4">, websocket_handler),</text:span></text:span></text:p>
              <text:p text:style-name="P4"><text:span text:style-name="Source_20_Text"><text:span text:style-name="T5"><text:s text:c="4"/></text:span></text:span><text:span text:style-name="Source_20_Text"><text:span text:style-name="T4">])</text:span></text:span></text:p>
              <text:p text:style-name="P4"><text:span text:style-name="Source_20_Text"><text:span text:style-name="T5"><text:s text:c="4"/></text:span></text:span></text:p>
              <text:p text:style-name="P3"><text:span text:style-name="Source_20_Text"><text:span text:style-name="T5"><text:s text:c="4"/></text:span></text:span><text:span text:style-name="Source_20_Text"><text:span text:style-name="T6"># Configure runner to execute asynchronously without blocking </text:span></text:span></text:p>
              <text:p text:style-name="P4"><text:span text:style-name="Source_20_Text"><text:span text:style-name="T5"><text:s text:c="4"/></text:span></text:span><text:span text:style-name="Source_20_Text"><text:span text:style-name="T4">runner = web.AppRunner(app)</text:span></text:span></text:p>
              <text:p text:style-name="P3"><text:span text:style-name="Source_20_Text"><text:span text:style-name="T5"><text:s text:c="4"/></text:span></text:span><text:span text:style-name="Source_20_Text"><text:span text:style-name="T3">await</text:span></text:span><text:span text:style-name="Source_20_Text"><text:span text:style-name="T4"> runner.setup()</text:span></text:span></text:p>
              <text:p text:style-name="P3"><text:span text:style-name="Source_20_Text"><text:span text:style-name="T5"><text:s text:c="4"/></text:span></text:span><text:span text:style-name="Source_20_Text"><text:span text:style-name="T4">site = web.TCPSite(runner, </text:span></text:span><text:span text:style-name="Source_20_Text"><text:span text:style-name="T8">'0.0.0.0'</text:span></text:span><text:span text:style-name="Source_20_Text"><text:span text:style-name="T4">, </text:span></text:span><text:span text:style-name="Source_20_Text"><text:span text:style-name="T12">8080</text:span></text:span><text:span text:style-name="Source_20_Text"><text:span text:style-name="T4">)</text:span></text:span></text:p>
              <text:p text:style-name="P3"><text:span text:style-name="Source_20_Text"><text:span text:style-name="T5"><text:s text:c="4"/></text:span></text:span><text:span text:style-name="Source_20_Text"><text:span text:style-name="T3">await</text:span></text:span><text:span text:style-name="Source_20_Text"><text:span text:style-name="T4"> site.start()</text:span></text:span></text:p>
              <text:p text:style-name="P3"><text:span text:style-name="Source_20_Text"><text:span text:style-name="T5"><text:s text:c="4"/></text:span></text:span><text:span text:style-name="Source_20_Text"><text:span text:style-name="T4">print(</text:span></text:span><text:span text:style-name="Source_20_Text"><text:span text:style-name="T8">"🚀 Server active on http://localhost:8080 (or your local network IP)"</text:span></text:span><text:span text:style-name="Source_20_Text"><text:span text:style-name="T4">)</text:span></text:span></text:p>
              <text:p text:style-name="P4"/>
              <text:p text:style-name="P3"><text:span text:style-name="Source_20_Text"><text:span text:style-name="T5"><text:s text:c="4"/></text:span></text:span><text:span text:style-name="Source_20_Text"><text:span text:style-name="T6"># Execute the game loop alongside network handlers concurrently</text:span></text:span></text:p>
              <text:p text:style-name="P3"><text:span text:style-name="Source_20_Text"><text:span text:style-name="T5"><text:s text:c="4"/></text:span></text:span><text:span text:style-name="Source_20_Text"><text:span text:style-name="T3">await</text:span></text:span><text:span text:style-name="Source_20_Text"><text:span text:style-name="T4"> main_game_loop(game_instance)</text:span></text:span></text:p>
              <text:p text:style-name="P4"/>
              <text:p text:style-name="P3"><text:span text:style-name="Source_20_Text"><text:span text:style-name="T3">if</text:span></text:span><text:span text:style-name="Source_20_Text"><text:span text:style-name="T4"> __name__ == </text:span></text:span><text:span text:style-name="Source_20_Text"><text:span text:style-name="T8">'__main__'</text:span></text:span><text:span text:style-name="Source_20_Text"><text:span text:style-name="T4">:</text:span></text:span></text:p>
              <text:p text:style-name="P3"><text:span text:style-name="Source_20_Text"><text:span text:style-name="T5"><text:s text:c="4"/></text:span></text:span><text:span text:style-name="Source_20_Text"><text:span text:style-name="T6"># Initialize the unified async runner environment</text:span></text:span></text:p>
              <text:p text:style-name="P4"><text:span text:style-name="Source_20_Text"><text:span text:style-name="T5"><text:s text:c="4"/></text:span></text:span><text:span text:style-name="Source_20_Text"><text:span text:style-name="T4">asyncio.run(start_async_app())</text:span></text:span></text:p>
              <text:h text:style-name="P1" text:outline-level="3">Key Enhancements Made:</text:h>
              <text:list text:style-name="L14">
                <text:list-item>
                  <text:p text:style-name="P25"><text:span text:style-name="T17">Asynchronous Co-existence:</text:span><text:span text:style-name="T16"> Instead of calling </text:span><text:span text:style-name="Source_20_Text"><text:span text:style-name="T1">game.run()</text:span></text:span><text:span text:style-name="T16"> which locks down execution with an infinite synchronous block (</text:span><text:span text:style-name="Source_20_Text"><text:span text:style-name="T1">while True</text:span></text:span><text:span text:style-name="T16">), the engine uses </text:span><text:span text:style-name="Source_20_Text"><text:span text:style-name="T1">asyncio.sleep(1/60)</text:span></text:span><text:span text:style-name="T16"> inside an async loop. This gives the background </text:span><text:span text:style-name="Source_20_Text"><text:span text:style-name="T1">aiohttp</text:span></text:span><text:span text:style-name="T16"> web server structural breathing room to accept socket interactions while sustaining smooth 60 </text:span><text:soft-page-break/><text:span text:style-name="T16">FPS visual rendering.</text:span></text:p>
                </text:list-item>
                <text:list-item>
                  <text:p text:style-name="P25"><text:span text:style-name="T17">Dynamic Position Mapping (</text:span><text:span text:style-name="Source_20_Text"><text:span text:style-name="T1">moveToX</text:span></text:span><text:span text:style-name="T17">)</text:span><text:span text:style-name="T16">: The rigid </text:span><text:span text:style-name="Source_20_Text"><text:span text:style-name="T1">PADDLE_SPEED</text:span></text:span><text:span text:style-name="T16"> calculations have been replaced. When your device streams a </text:span><text:span text:style-name="Source_20_Text"><text:span text:style-name="T1">touchmove</text:span></text:span><text:span text:style-name="T16"> coordinate, the function shifts the center position of the paddle precisely to match the client's </text:span><text:span text:style-name="T19">$X$</text:span><text:span text:style-name="T16">-axis value.</text:span></text:p>
                </text:list-item>
                <text:list-item>
                  <text:p text:style-name="P25"><text:span text:style-name="T17">Menu Flow Overhaul</text:span><text:span text:style-name="T16">: Standard key tracking (</text:span><text:span text:style-name="Source_20_Text"><text:span text:style-name="T1">SPACE</text:span></text:span><text:span text:style-name="T16"> to start, </text:span><text:span text:style-name="Source_20_Text"><text:span text:style-name="T1">R</text:span></text:span><text:span text:style-name="T16"> to restart) has been updated to track click/touch actions. Tapping or dragging on the client screen automatically shifts state out of the start/game-over states into gameplay.</text:span></text:p>
                </text:list-item>
              </text:list>
            </text:section>
            <text:p text:style-name="P8"/>
          </table:table-cell>
        </table:table-row>
      </table:table>
      <text:p text:style-name="Standard"/>
      <table:table table:name="Table20" table:style-name="Table20" table:template-name="Default Style">
        <table:table-column table:style-name="Table20.A"/>
        <table:table-row>
          <table:table-cell table:style-name="Table20.A1" office:value-type="string">
            <text:p text:style-name="P8">rlyman@8470p:~/breakout_2$ pixi run python3 server_breakout.py</text:p>
            <text:p text:style-name="P8">Traceback (most recent call last):</text:p>
            <text:p text:style-name="P8"><text:s text:c="2"/>File "/home/rlyman/breakout_2/server_breakout.py", line 7, in &lt;module&gt;</text:p>
            <text:p text:style-name="P8"><text:s text:c="4"/>import pygame</text:p>
            <text:p text:style-name="P8">ModuleNotFoundError: No module named 'pygame'</text:p>
            <text:p text:style-name="P8">rlyman@8470p:~/breakout_2$ </text:p>
          </table:table-cell>
        </table:table-row>
      </table:table>
      <text:p text:style-name="Standard"/>
      <table:table table:name="Table21" table:style-name="Table21" table:template-name="Default Style">
        <table:table-column table:style-name="Table21.A"/>
        <table:table-row>
          <table:table-cell table:style-name="Table21.A1" office:value-type="string">
            <text:p text:style-name="P37"><text:span text:style-name="T16">This error happens because </text:span><text:span text:style-name="Source_20_Text"><text:span text:style-name="T2">pygame</text:span></text:span><text:span text:style-name="T16"> is not installed inside your </text:span><text:span text:style-name="T17">Pixi environment</text:span><text:span text:style-name="T16">.</text:span></text:p>
            <text:section text:style-name="Sect1" text:name="model-response-message-contentr_395d0d0b76a113a7">
              <text:p text:style-name="P29"><text:soft-page-break/>Pixi isolates your project's dependencies to ensure it runs consistently across different machines. Even if you have Pygame installed globally on your Ubuntu machine, your Pixi project cannot see it unless it is explicitly added to the environment configurations.</text:p>
              <text:p text:style-name="P29">You can fix this easily using your terminal by choosing one of the two methods below:</text:p>
              <text:h text:style-name="P1" text:outline-level="3">The Pixi Way (Recommended)</text:h>
              <text:p text:style-name="P11"><text:span text:style-name="T16">If you are managing your full workflow inside Pixi, you should tell Pixi to install </text:span><text:span text:style-name="Source_20_Text"><text:span text:style-name="T1">pygame</text:span></text:span><text:span text:style-name="T16"> directly into the environment. Run this command in your terminal:</text:span></text:p>
              <text:p text:style-name="P26">Bash</text:p>
              <text:p text:style-name="P3"><text:span text:style-name="Source_20_Text"><text:span text:style-name="T4">pixi add pygame</text:span></text:span></text:p>
              <text:p text:style-name="P29">Once Pixi finishes downloading and configuring the package, try running your server script again:</text:p>
              <text:p text:style-name="P26">Bash</text:p>
              <text:p text:style-name="P3"><text:span text:style-name="Source_20_Text"><text:span text:style-name="T4">pixi run python3 server_breakout.py</text:span></text:span></text:p>
              <text:h text:style-name="P1" text:outline-level="3">The Pip Way (Inside Pixi)</text:h>
              <text:p text:style-name="P11"><text:span text:style-name="T16">If </text:span><text:span text:style-name="Source_20_Text"><text:span text:style-name="T1">pygame</text:span></text:span><text:span text:style-name="T16"> is not available in the default Pixi package channels, you can tell Pixi to install it via </text:span><text:span text:style-name="Source_20_Text"><text:span text:style-name="T1">pip</text:span></text:span><text:span text:style-name="T16"> into your current environment profile. Run this command:</text:span></text:p>
              <text:p text:style-name="P26">Bash</text:p>
              <text:p text:style-name="P3"><text:span text:style-name="Source_20_Text"><text:span text:style-name="T4">pixi add --pip pygame</text:span></text:span></text:p>
              <text:p text:style-name="P29">After it completes, launch your breakout server:</text:p>
              <text:p text:style-name="P26">Bash</text:p>
              <text:p text:style-name="P3"><text:span text:style-name="Source_20_Text"><text:span text:style-name="T4">pixi run python3 server_breakout.py</text:span></text:span></text:p>
            </text:section>
            <text:p text:style-name="P8"/>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7T12:50:44.511420958</meta:creation-date>
    <dc:date>2026-06-07T13:37:44.432531725</dc:date>
    <meta:editing-duration>PT46M53S</meta:editing-duration>
    <meta:editing-cycles>17</meta:editing-cycles>
    <meta:generator>LibreOffice/24.2.7.2$Linux_X86_64 LibreOffice_project/420$Build-2</meta:generator>
    <meta:document-statistic meta:table-count="21" meta:image-count="0" meta:object-count="0" meta:page-count="35" meta:paragraph-count="871" meta:word-count="5527" meta:character-count="44531" meta:non-whitespace-character-count="35018"/>
  </office:meta>
</office:document-meta>
</file>