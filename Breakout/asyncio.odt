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Heading_20_3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"/>
    </style:style>
    <style:style style:name="P2" style:family="paragraph" style:parent-style-name="Heading_20_3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 Tex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/>
      <style:text-properties fo:color="#ffffff" loext:opacity="100%" style:font-name="Google Sans Text" loext:padding="0in" loext:border="none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loext:opacity="55%" style:font-name="Google Sans Text" fo:font-size="11.25pt" fo:font-style="normal" fo:font-weight="normal" loext:padding="0in" loext:border="none"/>
    </style:style>
    <style:style style:name="T2" style:family="text">
      <style:text-properties fo:font-variant="normal" fo:text-transform="none" fo:color="#000000" loext:opacity="55%" style:font-name="Google Sans Text" fo:font-size="11.25pt" loext:padding="0in" loext:border="none"/>
    </style:style>
    <style:style style:name="T3" style:family="text">
      <style:text-properties fo:font-variant="normal" fo:text-transform="none" fo:color="#ffffff" loext:opacity="100%" style:font-name="Google Sans Text" fo:font-size="10.5pt" fo:font-style="normal" fo:font-weight="normal" loext:padding="0in" loext:border="none"/>
    </style:style>
    <style:style style:name="T4" style:family="text">
      <style:text-properties fo:color="#1f1f1f" loext:opacity="100%" style:font-name="Google Sans Text"/>
    </style:style>
    <style:style style:name="T5" style:family="text">
      <style:text-properties fo:color="#1f1f1f" loext:opacity="100%" style:font-name="Google Sans Text" fo:font-weight="bold" loext:padding="0in" loext:border="none"/>
    </style:style>
    <style:style style:name="T6" style:family="text">
      <style:text-properties fo:color="#1f1f1f" loext:opacity="100%" style:font-name="Google Sans Text" fo:font-style="italic" loext:padding="0in" loext:border="none"/>
    </style:style>
    <style:style style:name="T7" style:family="text">
      <style:text-properties fo:color="#1f1f1f" loext:opacity="100%" style:font-name="Google Sans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4"/>
            <text:p text:style-name="P4">in python script.py:</text:p>
            <text:p text:style-name="P4"/>
            <text:p text:style-name="P4">import asyncio</text:p>
            <text:p text:style-name="P4">from websockets.asyncio.server import serve</text:p>
            <text:p text:style-name="P4"/>
            <text:p text:style-name="P4">command line (bash):</text:p>
            <text:p text:style-name="P4"/>
            <text:p text:style-name="P4">pixi add websockets</text:p>
            <text:p text:style-name="P4"/>
            <text:p text:style-name="P4">command line (bash):</text:p>
            <text:p text:style-name="P4"/>
            <text:p text:style-name="P4">python3 script.py</text:p>
            <text:p text:style-name="P4"/>
            <text:p text:style-name="P4">result:</text:p>
            <text:p text:style-name="P4"/>
            <text:p text:style-name="P4">    from websockets.asyncio.server import serve</text:p>
            <text:p text:style-name="P4">ModuleNotFoundError: No module named 'websockets.asyncio'</text:p>
          </table:table-cell>
        </table:table-row>
      </table:table>
      <text:p text:style-name="Standard"/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9"><text:span text:style-name="T4">Ah, the classic environment mismatch. It looks like you ran into a situation where you installed </text:span><text:span text:style-name="Source_20_Text"><text:span text:style-name="T2">websockets</text:span></text:span><text:span text:style-name="T4"> using </text:span><text:span text:style-name="Source_20_Text"><text:span text:style-name="T2">pixi</text:span></text:span><text:span text:style-name="T4">, but when you ran the script, your system's global Python interpreter (</text:span><text:span text:style-name="Source_20_Text"><text:span text:style-name="T2">python3</text:span></text:span><text:span text:style-name="T4">) couldn't find it.</text:span></text:p>
            <text:section text:style-name="Sect1" text:name="model-response-message-contentr_acc0a630c24bcfdc">
              <text:p text:style-name="P7"><text:soft-page-break/>There are two likely reasons this is happening:</text:p>
              <text:list text:style-name="L1">
                <text:list-item>
                  <text:p text:style-name="P6"><text:span text:style-name="T5">You didn't run the script inside the Pixi environment.</text:span><text:span text:style-name="T4"> </text:span><text:span text:style-name="Source_20_Text"><text:span text:style-name="T1">pixi add</text:span></text:span><text:span text:style-name="T4"> installs the package into a isolated project environment. If you just run </text:span><text:span text:style-name="Source_20_Text"><text:span text:style-name="T1">python3 script.py</text:span></text:span><text:span text:style-name="T4">, you are using your global Python, which doesn't know anything about Pixi's packages.</text:span></text:p>
                </text:list-item>
                <text:list-item>
                  <text:p text:style-name="P6"><text:span text:style-name="T5">The </text:span><text:span text:style-name="Source_20_Text"><text:span text:style-name="T1">websockets.asyncio</text:span></text:span><text:span text:style-name="T5"> module requires </text:span><text:span text:style-name="Source_20_Text"><text:span text:style-name="T1">websockets</text:span></text:span><text:span text:style-name="T5"> version 13.0 or higher.</text:span><text:span text:style-name="T4"> If an older version was installed by default, that submodule won't exist.</text:span></text:p>
                </text:list-item>
              </text:list>
              <text:p text:style-name="P7">Here is how to fix it, step-by-step.</text:p>
              <text:h text:style-name="P1" text:outline-level="3">Step 1: Run the script using Pixi</text:h>
              <text:p text:style-name="P5"><text:span text:style-name="T4">Instead of calling </text:span><text:span text:style-name="Source_20_Text"><text:span text:style-name="T1">python3</text:span></text:span><text:span text:style-name="T4"> directly, you need to tell Pixi to execute the script within its managed environment.</text:span></text:p>
              <text:p text:style-name="P7">Run this in your terminal:</text:p>
              <text:p text:style-name="P8">Bash</text:p>
              <text:p text:style-name="P3"><text:span text:style-name="Source_20_Text"><text:span text:style-name="T3">pixi run python script.py</text:span></text:span></text:p>
              <text:p text:style-name="P5"><text:span text:style-name="T6">Alternatively, you can shell into the environment first by running </text:span><text:span text:style-name="Source_20_Text"><text:span text:style-name="T1">pixi shell</text:span></text:span><text:span text:style-name="T6">, and then run </text:span><text:span text:style-name="Source_20_Text"><text:span text:style-name="T1">python script.py</text:span></text:span><text:span text:style-name="T6"> normally.</text:span></text:p>
              <text:h text:style-name="P2" text:outline-level="3"><text:span text:style-name="T7">Step 2: Verify the </text:span><text:span text:style-name="Source_20_Text"><text:span text:style-name="T1">websockets</text:span></text:span><text:span text:style-name="T7"> version</text:span></text:h>
              <text:p text:style-name="P5"><text:span text:style-name="T4">The </text:span><text:span text:style-name="Source_20_Text"><text:span text:style-name="T1">websockets.asyncio</text:span></text:span><text:span text:style-name="T4"> API is relatively new. If Step 1 still gives you an error, your environment might have installed an older version of the library.</text:span></text:p>
              <text:p text:style-name="P5"><text:span text:style-name="T4">Check your </text:span><text:span text:style-name="Source_20_Text"><text:span text:style-name="T1">pixi.toml</text:span></text:span><text:span text:style-name="T4"> file or run </text:span><text:span text:style-name="Source_20_Text"><text:span text:style-name="T1">pixi list</text:span></text:span><text:span text:style-name="T4"> to see what version was installed. If it is below version 13.0, force Pixi to update it:</text:span></text:p>
              <text:p text:style-name="P8">Bash</text:p>
              <text:p text:style-name="P3"><text:span text:style-name="Source_20_Text"><text:span text:style-name="T3">pixi add websockets&gt;=13.0</text:span></text:span></text:p>
              <text:p text:style-name="P5"><text:span text:style-name="T4">Once updated, running </text:span><text:span text:style-name="Source_20_Text"><text:span text:style-name="T1">pixi run python script.py</text:span></text:span><text:span text:style-name="T4"> should launch your server without any issues!</text:span></text:p>
            </text:section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7T08:57:34.599033632</meta:creation-date>
    <dc:date>2026-06-07T08:58:44.221266612</dc:date>
    <meta:editing-duration>PT1M11S</meta:editing-duration>
    <meta:editing-cycles>1</meta:editing-cycles>
    <meta:document-statistic meta:table-count="2" meta:image-count="0" meta:object-count="0" meta:page-count="2" meta:paragraph-count="27" meta:word-count="267" meta:character-count="1715" meta:non-whitespace-character-count="1473"/>
    <meta:generator>LibreOffice/24.2.7.2$Linux_X86_64 LibreOffice_project/420$Build-2</meta:generator>
  </office:meta>
</office:document-meta>
</file>